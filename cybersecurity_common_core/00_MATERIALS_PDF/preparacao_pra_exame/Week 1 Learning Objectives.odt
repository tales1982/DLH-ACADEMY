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officeooo:paragraph-rsid="00027fe8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Text_20_body" style:list-style-name="L4">
      <style:paragraph-properties fo:margin-top="0cm" fo:margin-bottom="0cm" style:contextual-spacing="false"/>
    </style:style>
    <style:style style:name="P6" style:family="paragraph" style:parent-style-name="Text_20_body" style:list-style-name="L5">
      <style:paragraph-properties fo:margin-top="0cm" fo:margin-bottom="0cm" style:contextual-spacing="false"/>
    </style:style>
    <style:style style:name="P7" style:family="paragraph" style:parent-style-name="Text_20_body" style:list-style-name="L6">
      <style:paragraph-properties fo:margin-top="0cm" fo:margin-bottom="0cm" style:contextual-spacing="false"/>
    </style:style>
    <style:style style:name="P8" style:family="paragraph" style:parent-style-name="Text_20_body" style:list-style-name="L7">
      <style:paragraph-properties fo:margin-top="0cm" fo:margin-bottom="0cm" style:contextual-spacing="false"/>
    </style:style>
    <style:style style:name="P9" style:family="paragraph" style:parent-style-name="Text_20_body" style:list-style-name="L8">
      <style:paragraph-properties fo:margin-top="0cm" fo:margin-bottom="0cm" style:contextual-spacing="false"/>
    </style:style>
    <style:style style:name="P10" style:family="paragraph" style:parent-style-name="Text_20_body" style:list-style-name="L9"/>
    <style:style style:name="P11" style:family="paragraph" style:parent-style-name="Heading_20_1">
      <style:paragraph-properties fo:margin-left="0cm" fo:margin-right="0cm" fo:margin-top="0cm" fo:margin-bottom="0cm" style:contextual-spacing="false" fo:line-height="115%" fo:text-indent="0cm" style:auto-text-indent="false"/>
      <style:text-properties fo:font-size="12pt" officeooo:paragraph-rsid="00027fe8" style:font-size-asian="12pt" style:font-size-complex="12pt"/>
    </style:style>
    <style:style style:name="P12" style:family="paragraph" style:parent-style-name="Text_20_body" style:list-style-name="L10">
      <style:paragraph-properties fo:margin-left="0cm" fo:margin-right="0cm" fo:margin-top="0cm" fo:margin-bottom="0cm" style:contextual-spacing="false" fo:line-height="115%" fo:text-indent="0cm" style:auto-text-indent="false"/>
      <style:text-properties fo:font-size="12pt" officeooo:paragraph-rsid="00027fe8" style:font-size-asian="12pt" style:font-size-complex="12pt"/>
    </style:style>
    <style:style style:name="P13" style:family="paragraph" style:parent-style-name="Text_20_body" style:list-style-name="L10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/>
      <style:text-properties style:font-size-asian="12pt"/>
    </style:style>
    <style:style style:name="P14" style:family="paragraph" style:parent-style-name="Text_20_body" style:list-style-name="L10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style:font-size-asian="12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/>
      <style:text-properties fo:color="#000000" loext:opacity="100%" fo:font-size="12pt" fo:background-color="#ffffff" style:font-size-asian="12pt" style:font-size-complex="12pt"/>
    </style:style>
    <style:style style:name="P16" style:family="paragraph" style:parent-style-name="Heading_20_1">
      <style:paragraph-properties fo:margin-left="0cm" fo:margin-right="0cm" fo:margin-top="0cm" fo:margin-bottom="0cm" style:contextual-spacing="false" fo:line-height="115%" fo:text-indent="0cm" style:auto-text-indent="false"/>
      <style:text-properties fo:color="#000000" loext:opacity="100%" fo:font-size="12pt" fo:background-color="#ffffff" style:font-size-asian="12pt" style:font-size-complex="12pt"/>
    </style:style>
    <style:style style:name="P17" style:family="paragraph" style:parent-style-name="Text_20_body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style:font-size-asian="12pt"/>
    </style:style>
    <style:style style:name="P18" style:family="paragraph" style:parent-style-name="Text_20_body" style:list-style-name="L11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/>
      <style:text-properties style:font-size-asian="12pt"/>
    </style:style>
    <style:style style:name="P19" style:family="paragraph" style:parent-style-name="Text_20_body" style:list-style-name="L11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style:font-size-asian="12pt"/>
    </style:style>
    <style:style style:name="P20" style:family="paragraph" style:parent-style-name="Text_20_body" style:list-style-name="L12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/>
      <style:text-properties style:font-size-asian="12pt"/>
    </style:style>
    <style:style style:name="P21" style:family="paragraph" style:parent-style-name="Text_20_body" style:list-style-name="L12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style:font-size-asian="12pt"/>
    </style:style>
    <style:style style:name="P22" style:family="paragraph" style:parent-style-name="Text_20_body" style:list-style-name="L13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/>
      <style:text-properties style:font-size-asian="12pt"/>
    </style:style>
    <style:style style:name="P23" style:family="paragraph" style:parent-style-name="Text_20_body" style:list-style-name="L13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style:font-size-asian="12pt"/>
    </style:style>
    <style:style style:name="P24" style:family="paragraph" style:parent-style-name="Text_20_body" style:list-style-name="L1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/>
      <style:text-properties style:font-size-asian="12pt"/>
    </style:style>
    <style:style style:name="P25" style:family="paragraph" style:parent-style-name="Text_20_body" style:list-style-name="L14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style:font-size-asian="12pt"/>
    </style:style>
    <style:style style:name="P26" style:family="paragraph" style:parent-style-name="Text_20_body" style:list-style-name="L15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/>
      <style:text-properties style:font-size-asian="12pt"/>
    </style:style>
    <style:style style:name="P27" style:family="paragraph" style:parent-style-name="Text_20_body" style:list-style-name="L15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style:font-size-asian="12pt"/>
    </style:style>
    <style:style style:name="P28" style:family="paragraph" style:parent-style-name="Text_20_body" style:list-style-name="L16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/>
      <style:text-properties style:font-size-asian="12pt"/>
    </style:style>
    <style:style style:name="P29" style:family="paragraph" style:parent-style-name="Text_20_body" style:list-style-name="L16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style:font-size-asian="12pt"/>
    </style:style>
    <style:style style:name="P30" style:family="paragraph" style:parent-style-name="Text_20_body" style:list-style-name="L17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/>
      <style:text-properties style:font-size-asian="12pt"/>
    </style:style>
    <style:style style:name="P31" style:family="paragraph" style:parent-style-name="Text_20_body" style:list-style-name="L17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style:font-size-asian="12pt"/>
    </style:style>
    <style:style style:name="P32" style:family="paragraph" style:parent-style-name="Text_20_body" style:list-style-name="L18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style:font-size-asian="12pt"/>
    </style:style>
    <style:style style:name="P33" style:family="paragraph" style:parent-style-name="Text_20_body" style:list-style-name="L19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style:font-size-asian="12pt"/>
    </style:style>
    <style:style style:name="P34" style:family="paragraph" style:parent-style-name="Heading_20_1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fo:font-size="14pt" fo:background-color="#ffffff" style:font-size-asian="14pt" style:font-size-complex="14pt"/>
    </style:style>
    <style:style style:name="P35" style:family="paragraph" style:parent-style-name="Text_20_body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fo:background-color="#ffffff" style:font-size-asian="12pt"/>
    </style:style>
    <style:style style:name="P36" style:family="paragraph" style:parent-style-name="Text_20_body">
      <loext:graphic-properties draw:fill="solid" draw:fill-color="#ffffff"/>
      <style:paragraph-properties fo:background-color="#ffffff"/>
      <style:text-properties fo:color="#000000" loext:opacity="100%" fo:background-color="#ffffff" style:font-size-asian="12pt"/>
    </style:style>
    <style:style style:name="P37" style:family="paragraph" style:parent-style-name="Heading_20_1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fo:background-color="#ffffff" style:font-size-asian="14pt"/>
    </style:style>
    <style:style style:name="P38" style:family="paragraph" style:parent-style-name="Text_20_body" style:list-style-name="L20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046f00" fo:background-color="#ffffff" style:font-size-asian="12pt"/>
    </style:style>
    <style:style style:name="P39" style:family="paragraph" style:parent-style-name="Text_20_body" style:list-style-name="L20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fo:background-color="#ffffff" style:font-size-asian="12pt"/>
    </style:style>
    <style:style style:name="P40" style:family="paragraph" style:parent-style-name="Text_20_body" style:list-style-name="L21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fo:background-color="#ffffff" style:font-size-asian="12pt"/>
    </style:style>
    <style:style style:name="P41" style:family="paragraph" style:parent-style-name="Text_20_body" style:list-style-name="L22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fo:background-color="#ffffff" style:font-size-asian="12pt"/>
    </style:style>
    <style:style style:name="P42" style:family="paragraph" style:parent-style-name="Text_20_body" style:list-style-name="L23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fo:background-color="#ffffff" style:font-size-asian="12pt"/>
    </style:style>
    <style:style style:name="P43" style:family="paragraph" style:parent-style-name="Text_20_body" style:list-style-name="L24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fo:background-color="#ffffff" style:font-size-asian="12pt"/>
    </style:style>
    <style:style style:name="P44" style:family="paragraph" style:parent-style-name="Text_20_body" style:list-style-name="L25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fo:background-color="#ffffff" style:font-size-asian="12pt"/>
    </style:style>
    <style:style style:name="P45" style:family="paragraph" style:parent-style-name="Text_20_body" style:list-style-name="L26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fo:background-color="#ffffff" style:font-size-asian="12pt"/>
    </style:style>
    <style:style style:name="P46" style:family="paragraph" style:parent-style-name="Text_20_body" style:list-style-name="L27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fo:background-color="#ffffff" style:font-size-asian="12pt"/>
    </style:style>
    <style:style style:name="P47" style:family="paragraph" style:parent-style-name="Text_20_body" style:list-style-name="L28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fo:background-color="#ffffff" style:font-size-asian="12pt"/>
    </style:style>
    <style:style style:name="P48" style:family="paragraph" style:parent-style-name="Text_20_body" style:list-style-name="L29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fo:background-color="#ffffff" style:font-size-asian="12pt"/>
    </style:style>
    <style:style style:name="P49" style:family="paragraph" style:parent-style-name="Text_20_body" style:list-style-name="L30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fo:background-color="#ffffff" style:font-size-asian="12pt"/>
    </style:style>
    <style:style style:name="P50" style:family="paragraph" style:parent-style-name="Text_20_body" style:list-style-name="L31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fo:background-color="#ffffff" style:font-size-asian="12pt"/>
    </style:style>
    <style:style style:name="P51" style:family="paragraph" style:parent-style-name="Text_20_body" style:list-style-name="L32">
      <loext:graphic-properties draw:fill="solid" draw:fill-color="#ffffff"/>
      <style:paragraph-properties fo:background-color="#ffffff"/>
      <style:text-properties fo:color="#000000" loext:opacity="100%" fo:background-color="#ffffff" style:font-size-asian="12pt"/>
    </style:style>
    <style:style style:name="P52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/>
      <style:text-properties fo:font-size="12pt" style:font-size-asian="12pt" style:font-size-complex="12pt"/>
    </style:style>
    <style:style style:name="T1" style:family="text">
      <style:text-properties officeooo:rsid="00027fe8"/>
    </style:style>
    <style:style style:name="T2" style:family="text">
      <style:text-properties fo:color="#000000" loext:opacity="100%" fo:font-size="12pt" fo:background-color="#ffffff" loext:char-shading-value="0" style:font-size-complex="12pt"/>
    </style:style>
    <style:style style:name="T3" style:family="text">
      <style:text-properties fo:color="#000000" loext:opacity="100%" fo:font-weight="normal" fo:background-color="#ffffff" loext:char-shading-value="0" style:font-weight-asian="normal" style:font-weight-complex="normal"/>
    </style:style>
    <style:style style:name="T4" style:family="text">
      <style:text-properties fo:color="#000000" loext:opacity="100%" fo:background-color="#ffffff" loext:char-shading-value="0"/>
    </style:style>
    <style:style style:name="T5" style:family="text">
      <style:text-properties fo:font-size="14pt" style:font-size-complex="14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Learning Objectives</text:span></text:span></text:p>
      <text:p text:style-name="P1"><text:span text:style-name="Strong_20_Emphasis"><text:span text:style-name="T1">GIT</text:span></text:span></text:p>
      <text:list text:style-name="L1">
        <text:list-item>
          <text:p text:style-name="P2"><text:span text:style-name="Strong_20_Emphasis">Install and configure:</text:span> Run <text:span text:style-name="Source_20_Text">git config --global user.name "Your Name"</text:span> and <text:span text:style-name="Source_20_Text">user.email</text:span> after installation. </text:p>
        </text:list-item>
      </text:list>
      <text:list text:style-name="L2">
        <text:list-item>
          <text:p text:style-name="P3"><text:span text:style-name="Strong_20_Emphasis">Create repo locally/remote:</text:span> Initialize with <text:span text:style-name="Source_20_Text">git init</text:span> locally and link to GitHub via <text:span text:style-name="Source_20_Text">git remote add origin &lt;url&gt;</text:span>. </text:p>
        </text:list-item>
      </text:list>
      <text:list text:style-name="L3">
        <text:list-item>
          <text:p text:style-name="P4"><text:span text:style-name="Strong_20_Emphasis">Track changes:</text:span> Use <text:span text:style-name="Source_20_Text">git add</text:span> to stage, <text:span text:style-name="Source_20_Text">git commit</text:span> to save to history, distinguishing the working directory from the staging area. </text:p>
        </text:list-item>
      </text:list>
      <text:list text:style-name="L4">
        <text:list-item>
          <text:p text:style-name="P5"><text:span text:style-name="Strong_20_Emphasis">Exclude files:</text:span> Create a <text:span text:style-name="Source_20_Text">.gitignore</text:span> file listing patterns (like <text:span text:style-name="Source_20_Text">*.log</text:span>) to prevent specific files from being tracked. </text:p>
        </text:list-item>
      </text:list>
      <text:list text:style-name="L5">
        <text:list-item>
          <text:p text:style-name="P6"><text:span text:style-name="Strong_20_Emphasis">Push/pull auth:</text:span> Sync with <text:span text:style-name="Source_20_Text">git push</text:span> or <text:span text:style-name="Source_20_Text">git pull</text:span>, authenticating via a Personal Access Token instead of your password. </text:p>
        </text:list-item>
      </text:list>
      <text:list text:style-name="L6">
        <text:list-item>
          <text:p text:style-name="P7"><text:span text:style-name="Strong_20_Emphasis">Work with branches:</text:span> Isolate work using <text:span text:style-name="Source_20_Text">git checkout -b branch-name</text:span> to create and switch contexts safely. </text:p>
        </text:list-item>
      </text:list>
      <text:list text:style-name="L7">
        <text:list-item>
          <text:p text:style-name="P8"><text:span text:style-name="Strong_20_Emphasis">Merge conflicts:</text:span> Execute <text:span text:style-name="Source_20_Text">git merge branch-name</text:span> and manually edit conflicted files before finalizing with <text:span text:style-name="Source_20_Text">git commit</text:span>. </text:p>
        </text:list-item>
      </text:list>
      <text:list text:style-name="L8">
        <text:list-item>
          <text:p text:style-name="P9"><text:span text:style-name="Strong_20_Emphasis">Perform rollbacks:</text:span> Use <text:span text:style-name="Source_20_Text">git reset</text:span> to rewrite history locally or <text:span text:style-name="Source_20_Text">git revert</text:span> to create safe, new undo commits. </text:p>
        </text:list-item>
      </text:list>
      <text:list text:style-name="L9">
        <text:list-item>
          <text:p text:style-name="P10"><text:span text:style-name="Strong_20_Emphasis">Apply GitHub Flow:</text:span> Iterate by branching, committing, pushing, opening Pull Requests, resolving conflicts, merging, and rolling back as needed.</text:p>
        </text:list-item>
      </text:list>
      <text:h text:style-name="P11" text:outline-level="1"/>
      <text:h text:style-name="P11" text:outline-level="1">Introduction to Cyber Security</text:h>
      <text:list text:style-name="L10">
        <text:list-item>
          <text:p text:style-name="P12"><text:span text:style-name="Strong_20_Emphasis"><text:span text:style-name="T2">What is Cybersecurity?</text:span></text:span><text:span text:style-name="Strong_20_Emphasis"><text:span text:style-name="T3"> It's the practice of protecting systems, networks, and data from digital attacks, theft, or damage.</text:span></text:span></text:p>
        </text:list-item>
        <text:list-item>
          <text:p text:style-name="P13"><text:span text:style-name="Strong_20_Emphasis"><text:span text:style-name="T4">What are the core principles of cybersecurity?</text:span></text:span><text:span text:style-name="T4"> The CIA Triad consists of Confidentiality, Integrity, and Availability. </text:span></text:p>
        </text:list-item>
        <text:list-item>
          <text:p text:style-name="P13"><text:span text:style-name="Strong_20_Emphasis"><text:span text:style-name="T4">How does encryption contribute to security?</text:span></text:span><text:span text:style-name="T4"> It transforms readable data into unreadable ciphertext to ensure confidentiality even if intercepted. </text:span></text:p>
        </text:list-item>
        <text:list-item>
          <text:p text:style-name="P13"><text:span text:style-name="Strong_20_Emphasis"><text:span text:style-name="T4">What is risk management in cybersecurity?</text:span></text:span><text:span text:style-name="T4"> It is the process of identifying, assessing, and prioritizing risks followed by coordinated efforts to minimize their impact. </text:span></text:p>
        </text:list-item>
        <text:list-item>
          <text:p text:style-name="P13"><text:span text:style-name="Strong_20_Emphasis"><text:span text:style-name="T4">What are the different types of cybersecurity threats?</text:span></text:span><text:span text:style-name="T4"> Common threats include malware, phishing, ransomware, DDoS attacks, and insider threats. </text:span></text:p>
        </text:list-item>
        <text:list-item>
          <text:p text:style-name="P13"><text:span text:style-name="Strong_20_Emphasis"><text:span text:style-name="T4">What is the difference between a virus and a worm?</text:span></text:span><text:span text:style-name="T4"> A virus requires human action to spread, while a worm replicates itself automatically across networks. </text:span></text:p>
        </text:list-item>
        <text:list-item>
          <text:p text:style-name="P13"><text:span text:style-name="Strong_20_Emphasis"><text:span text:style-name="T4">What is social engineering in the context of security?</text:span></text:span><text:span text:style-name="T4"> It is the psychological manipulation of people into performing actions or divulging confidential information. </text:span></text:p>
        </text:list-item>
        <text:list-item>
          <text:p text:style-name="P13"><text:span text:style-name="Strong_20_Emphasis"><text:span text:style-name="T4">What are the key components of an information security program?</text:span></text:span><text:span text:style-name="T4"> Essential components include governance, risk management, security controls, awareness training, and incident response. </text:span></text:p>
        </text:list-item>
        <text:list-item>
          <text:p text:style-name="P13"><text:span text:style-name="Strong_20_Emphasis"><text:span text:style-name="T4">How do security policies and frameworks contribute to an organization's security posture?</text:span></text:span><text:span text:style-name="T4"> They establish standardized rules, procedures, and best practices to consistently manage and mitigate security risks. </text:span></text:p>
        </text:list-item>
        <text:list-item>
          <text:p text:style-name="P13"><text:span text:style-name="Strong_20_Emphasis"><text:span text:style-name="T4">What is the purpose of the OWASP Top Ten?</text:span></text:span><text:span text:style-name="T4"> It serves as a widely recognized standard awareness document listing the most critical web application security risks. </text:span></text:p>
        </text:list-item>
        <text:list-item>
          <text:p text:style-name="P13"><text:soft-page-break/><text:span text:style-name="Strong_20_Emphasis"><text:span text:style-name="T4">What is the role of access control in cybersecurity?</text:span></text:span><text:span text:style-name="T4"> It ensures that only authorized users and systems can access specific resources based on defined permissions. </text:span></text:p>
        </text:list-item>
        <text:list-item>
          <text:p text:style-name="P13"><text:span text:style-name="Strong_20_Emphasis"><text:span text:style-name="T4">How does multi-factor authentication enhance security?</text:span></text:span><text:span text:style-name="T4"> It requires multiple forms of verification, significantly reducing the risk of unauthorized access even if one credential is compromised. </text:span></text:p>
        </text:list-item>
        <text:list-item>
          <text:p text:style-name="P14"><text:span text:style-name="Strong_20_Emphasis"><text:span text:style-name="T4">What are the common methods for securing a network?</text:span></text:span><text:span text:style-name="T4"> Key methods include firewalls, intrusion detection/prevention systems, network segmentation, and regular patching. </text:span></text:p>
        </text:list-item>
      </text:list>
      <text:p text:style-name="P15"/>
      <text:h text:style-name="P16" text:outline-level="1">Linux, Shell, basics</text:h>
      <text:p text:style-name="P17"><text:span text:style-name="Strong_20_Emphasis"><text:span text:style-name="T4">General</text:span></text:span></text:p>
      <text:list text:style-name="L11">
        <text:list-item>
          <text:p text:style-name="P18"><text:span text:style-name="Strong_20_Emphasis"><text:span text:style-name="T4">RTFM</text:span></text:span><text:span text:style-name="T4">: "Read The F***ing Manual" — a blunt reminder to check documentation before asking questions. </text:span></text:p>
        </text:list-item>
        <text:list-item>
          <text:p text:style-name="P19"><text:span text:style-name="Strong_20_Emphasis"><text:span text:style-name="T4">Shebang</text:span></text:span><text:span text:style-name="T4">: The </text:span><text:span text:style-name="Source_20_Text"><text:span text:style-name="T4">#!</text:span></text:span><text:span text:style-name="T4"> at the start of a script that tells the OS which interpreter to use (e.g., </text:span><text:span text:style-name="Source_20_Text"><text:span text:style-name="T4">#!/bin/bash</text:span></text:span><text:span text:style-name="T4">). </text:span></text:p>
        </text:list-item>
      </text:list>
      <text:p text:style-name="P17"><text:span text:style-name="Strong_20_Emphasis"><text:span text:style-name="T4">What is the Shell</text:span></text:span></text:p>
      <text:list text:style-name="L12">
        <text:list-item>
          <text:p text:style-name="P20"><text:span text:style-name="Strong_20_Emphasis"><text:span text:style-name="T4">Shell</text:span></text:span><text:span text:style-name="T4">: A program that provides a command-line interface to interact with the OS by reading and executing commands. </text:span></text:p>
        </text:list-item>
        <text:list-item>
          <text:p text:style-name="P20"><text:span text:style-name="Strong_20_Emphasis"><text:span text:style-name="T4">Terminal vs. Shell</text:span></text:span><text:span text:style-name="T4">: The terminal is the window/application that displays input/output; the shell is the program running inside it that interprets commands. </text:span></text:p>
        </text:list-item>
        <text:list-item>
          <text:p text:style-name="P20"><text:span text:style-name="Strong_20_Emphasis"><text:span text:style-name="T4">Shell prompt</text:span></text:span><text:span text:style-name="T4">: The text displayed before your cursor (e.g., </text:span><text:span text:style-name="Source_20_Text"><text:span text:style-name="T4">user@host:~$</text:span></text:span><text:span text:style-name="T4">) indicating the shell is ready for input. </text:span></text:p>
        </text:list-item>
        <text:list-item>
          <text:p text:style-name="P21"><text:span text:style-name="Strong_20_Emphasis"><text:span text:style-name="T4">History basics</text:span></text:span><text:span text:style-name="T4">: Use </text:span><text:span text:style-name="Source_20_Text"><text:span text:style-name="T4">history</text:span></text:span><text:span text:style-name="T4"> to view past commands, </text:span><text:span text:style-name="Source_20_Text"><text:span text:style-name="T4">↑/↓</text:span></text:span><text:span text:style-name="T4"> arrows to navigate them, and </text:span><text:span text:style-name="Source_20_Text"><text:span text:style-name="T4">!n</text:span></text:span><text:span text:style-name="T4"> to re-run command number </text:span><text:span text:style-name="Source_20_Text"><text:span text:style-name="T4">n</text:span></text:span><text:span text:style-name="T4">. </text:span></text:p>
        </text:list-item>
      </text:list>
      <text:p text:style-name="P17"><text:span text:style-name="Strong_20_Emphasis"><text:span text:style-name="T4">Navigation</text:span></text:span></text:p>
      <text:list text:style-name="L13">
        <text:list-item>
          <text:p text:style-name="P22"><text:span text:style-name="Strong_20_Emphasis"><text:span text:style-name="T4">cd</text:span></text:span><text:span text:style-name="T4">: Changes the current directory; </text:span><text:span text:style-name="Strong_20_Emphasis"><text:span text:style-name="T4">pwd</text:span></text:span><text:span text:style-name="T4">: Prints the working directory; </text:span><text:span text:style-name="Strong_20_Emphasis"><text:span text:style-name="T4">ls</text:span></text:span><text:span text:style-name="T4">: Lists directory contents. </text:span></text:p>
        </text:list-item>
        <text:list-item>
          <text:p text:style-name="P22"><text:span text:style-name="Strong_20_Emphasis"><text:span text:style-name="T4">Navigating the filesystem</text:span></text:span><text:span text:style-name="T4">: Move around using </text:span><text:span text:style-name="Source_20_Text"><text:span text:style-name="T4">cd</text:span></text:span><text:span text:style-name="T4"> with absolute paths (</text:span><text:span text:style-name="Source_20_Text"><text:span text:style-name="T4">/home/user</text:span></text:span><text:span text:style-name="T4">) or relative paths (</text:span><text:span text:style-name="Source_20_Text"><text:span text:style-name="T4">../dir</text:span></text:span><text:span text:style-name="T4">). </text:span></text:p>
        </text:list-item>
        <text:list-item>
          <text:p text:style-name="P22"><text:span text:style-name="Strong_20_Emphasis"><text:span text:style-name="Source_20_Text"><text:span text:style-name="T4">.</text:span></text:span></text:span><text:span text:style-name="Strong_20_Emphasis"><text:span text:style-name="T4"> and </text:span></text:span><text:span text:style-name="Strong_20_Emphasis"><text:span text:style-name="Source_20_Text"><text:span text:style-name="T4">..</text:span></text:span></text:span><text:span text:style-name="T4">: </text:span><text:span text:style-name="Source_20_Text"><text:span text:style-name="T4">.</text:span></text:span><text:span text:style-name="T4"> is the current directory; </text:span><text:span text:style-name="Source_20_Text"><text:span text:style-name="T4">..</text:span></text:span><text:span text:style-name="T4"> is the parent directory. </text:span></text:p>
        </text:list-item>
        <text:list-item>
          <text:p text:style-name="P22"><text:span text:style-name="Strong_20_Emphasis"><text:span text:style-name="T4">Working directory</text:span></text:span><text:span text:style-name="T4">: The directory you're currently in — print it with </text:span><text:span text:style-name="Source_20_Text"><text:span text:style-name="T4">pwd</text:span></text:span><text:span text:style-name="T4">, change it with </text:span><text:span text:style-name="Source_20_Text"><text:span text:style-name="T4">cd</text:span></text:span><text:span text:style-name="T4">. </text:span></text:p>
        </text:list-item>
        <text:list-item>
          <text:p text:style-name="P22"><text:span text:style-name="Strong_20_Emphasis"><text:span text:style-name="T4">Root directory</text:span></text:span><text:span text:style-name="T4">: The top-level directory </text:span><text:span text:style-name="Source_20_Text"><text:span text:style-name="T4">/</text:span></text:span><text:span text:style-name="T4">, from which all other directories descend. </text:span></text:p>
        </text:list-item>
        <text:list-item>
          <text:p text:style-name="P22"><text:span text:style-name="Strong_20_Emphasis"><text:span text:style-name="T4">Home directory</text:span></text:span><text:span text:style-name="T4">: The user's personal directory (</text:span><text:span text:style-name="Source_20_Text"><text:span text:style-name="T4">~</text:span></text:span><text:span text:style-name="T4">), reached by typing </text:span><text:span text:style-name="Source_20_Text"><text:span text:style-name="T4">cd</text:span></text:span><text:span text:style-name="T4"> or </text:span><text:span text:style-name="Source_20_Text"><text:span text:style-name="T4">cd ~</text:span></text:span><text:span text:style-name="T4">. </text:span></text:p>
        </text:list-item>
        <text:list-item>
          <text:p text:style-name="P22"><text:span text:style-name="Strong_20_Emphasis"><text:span text:style-name="T4">Root directory vs. root's home</text:span></text:span><text:span text:style-name="T4">: The root directory </text:span><text:span text:style-name="Source_20_Text"><text:span text:style-name="T4">/</text:span></text:span><text:span text:style-name="T4"> is the filesystem top; root's home directory is </text:span><text:span text:style-name="Source_20_Text"><text:span text:style-name="T4">/root</text:span></text:span><text:span text:style-name="T4">, the admin user's personal folder. </text:span></text:p>
        </text:list-item>
        <text:list-item>
          <text:p text:style-name="P22"><text:span text:style-name="Strong_20_Emphasis"><text:span text:style-name="T4">Hidden files</text:span></text:span><text:span text:style-name="T4">: Files starting with a dot (</text:span><text:span text:style-name="Source_20_Text"><text:span text:style-name="T4">.</text:span></text:span><text:span text:style-name="T4">); list them with </text:span><text:span text:style-name="Source_20_Text"><text:span text:style-name="T4">ls -a</text:span></text:span><text:span text:style-name="T4">. </text:span></text:p>
        </text:list-item>
        <text:list-item>
          <text:p text:style-name="P23"><text:span text:style-name="Strong_20_Emphasis"><text:span text:style-name="T4">cd -</text:span></text:span><text:span text:style-name="T4">: Switches you back to the previous working directory. </text:span></text:p>
        </text:list-item>
      </text:list>
      <text:p text:style-name="P17"><text:span text:style-name="Strong_20_Emphasis"><text:span text:style-name="T4">Looking Around</text:span></text:span></text:p>
      <text:list text:style-name="L14">
        <text:list-item>
          <text:p text:style-name="P24"><text:span text:style-name="Strong_20_Emphasis"><text:span text:style-name="T4">ls</text:span></text:span><text:span text:style-name="T4">: Lists files; </text:span><text:span text:style-name="Strong_20_Emphasis"><text:span text:style-name="T4">less</text:span></text:span><text:span text:style-name="T4">: Views file contents one page at a time; </text:span><text:span text:style-name="Strong_20_Emphasis"><text:span text:style-name="T4">file</text:span></text:span><text:span text:style-name="T4">: Identifies a file's type. </text:span></text:p>
        </text:list-item>
        <text:list-item>
          <text:p text:style-name="P24"><text:span text:style-name="Strong_20_Emphasis"><text:span text:style-name="T4">Options and arguments</text:span></text:span><text:span text:style-name="T4">: Options modify behavior (e.g., </text:span><text:span text:style-name="Source_20_Text"><text:span text:style-name="T4">-l</text:span></text:span><text:span text:style-name="T4">), arguments specify targets (e.g., filename) — e.g., </text:span><text:span text:style-name="Source_20_Text"><text:span text:style-name="T4">ls -l /home</text:span></text:span><text:span text:style-name="T4">. </text:span></text:p>
        </text:list-item>
        <text:list-item>
          <text:p text:style-name="P24"><text:soft-page-break/><text:span text:style-name="Strong_20_Emphasis"><text:span text:style-name="T4">ls long format</text:span></text:span><text:span text:style-name="T4">: Use </text:span><text:span text:style-name="Source_20_Text"><text:span text:style-name="T4">ls -l</text:span></text:span><text:span text:style-name="T4">; shows permissions, owner, size, modification date, and filename. </text:span></text:p>
        </text:list-item>
        <text:list-item>
          <text:p text:style-name="P24"><text:span text:style-name="Strong_20_Emphasis"><text:span text:style-name="T4">A Guided Tour</text:span></text:span><text:span text:style-name="T4">: Exploring key system directories to learn the Linux filesystem layout. </text:span></text:p>
        </text:list-item>
        <text:list-item>
          <text:p text:style-name="P24"><text:span text:style-name="Strong_20_Emphasis"><text:span text:style-name="T4">ln</text:span></text:span><text:span text:style-name="T4">: Creates links between files — symbolic (</text:span><text:span text:style-name="Source_20_Text"><text:span text:style-name="T4">ln -s</text:span></text:span><text:span text:style-name="T4">) or hard (default). </text:span></text:p>
        </text:list-item>
        <text:list-item>
          <text:p text:style-name="P24"><text:span text:style-name="Strong_20_Emphasis"><text:span text:style-name="T4">Common/important directories</text:span></text:span><text:span text:style-name="T4">: </text:span><text:span text:style-name="Source_20_Text"><text:span text:style-name="T4">/etc</text:span></text:span><text:span text:style-name="T4"> (configs), </text:span><text:span text:style-name="Source_20_Text"><text:span text:style-name="T4">/var</text:span></text:span><text:span text:style-name="T4"> (variable data), </text:span><text:span text:style-name="Source_20_Text"><text:span text:style-name="T4">/home</text:span></text:span><text:span text:style-name="T4"> (users), </text:span><text:span text:style-name="Source_20_Text"><text:span text:style-name="T4">/bin</text:span></text:span><text:span text:style-name="T4"> (binaries), </text:span><text:span text:style-name="Source_20_Text"><text:span text:style-name="T4">/tmp</text:span></text:span><text:span text:style-name="T4"> (temporary), </text:span><text:span text:style-name="Source_20_Text"><text:span text:style-name="T4">/usr</text:span></text:span><text:span text:style-name="T4"> (user programs). </text:span></text:p>
        </text:list-item>
        <text:list-item>
          <text:p text:style-name="P24"><text:span text:style-name="Strong_20_Emphasis"><text:span text:style-name="T4">Symbolic link</text:span></text:span><text:span text:style-name="T4">: A pointer to another file by path; breaks if the target is deleted. </text:span></text:p>
        </text:list-item>
        <text:list-item>
          <text:p text:style-name="P24"><text:span text:style-name="Strong_20_Emphasis"><text:span text:style-name="T4">Hard link</text:span></text:span><text:span text:style-name="T4">: An additional name pointing to the same inode/data; persists if the original is deleted. </text:span></text:p>
        </text:list-item>
        <text:list-item>
          <text:p text:style-name="P25"><text:span text:style-name="Strong_20_Emphasis"><text:span text:style-name="T4">Hard vs. symbolic</text:span></text:span><text:span text:style-name="T4">: Hard links share the same inode and can't cross filesystems; symlinks are path-based references that can. </text:span></text:p>
        </text:list-item>
      </text:list>
      <text:p text:style-name="P17"><text:span text:style-name="Strong_20_Emphasis"><text:span text:style-name="T4">Manipulating Files</text:span></text:span></text:p>
      <text:list text:style-name="L15">
        <text:list-item>
          <text:p text:style-name="P26"><text:span text:style-name="Strong_20_Emphasis"><text:span text:style-name="T4">cp, mv, rm, mkdir</text:span></text:span><text:span text:style-name="T4">: Copy files, move/rename files, remove files, create directories. </text:span></text:p>
        </text:list-item>
        <text:list-item>
          <text:p text:style-name="P26"><text:span text:style-name="Strong_20_Emphasis"><text:span text:style-name="T4">Wildcards</text:span></text:span><text:span text:style-name="T4">: Special characters (</text:span><text:span text:style-name="Source_20_Text"><text:span text:style-name="T4">*</text:span></text:span><text:span text:style-name="T4">, </text:span><text:span text:style-name="Source_20_Text"><text:span text:style-name="T4">?</text:span></text:span><text:span text:style-name="T4">, </text:span><text:span text:style-name="Source_20_Text"><text:span text:style-name="T4">[]</text:span></text:span><text:span text:style-name="T4">) that match patterns of filenames. </text:span></text:p>
        </text:list-item>
        <text:list-item>
          <text:p text:style-name="P27"><text:span text:style-name="Strong_20_Emphasis"><text:span text:style-name="T4">Using wildcards</text:span></text:span><text:span text:style-name="T4">: E.g., </text:span><text:span text:style-name="Source_20_Text"><text:span text:style-name="T4">*.txt</text:span></text:span><text:span text:style-name="T4"> matches all </text:span><text:span text:style-name="Source_20_Text"><text:span text:style-name="T4">.txt</text:span></text:span><text:span text:style-name="T4"> files; </text:span><text:span text:style-name="Source_20_Text"><text:span text:style-name="T4">file?.log</text:span></text:span><text:span text:style-name="T4"> matches </text:span><text:span text:style-name="Source_20_Text"><text:span text:style-name="T4">file1.log</text:span></text:span><text:span text:style-name="T4">, </text:span><text:span text:style-name="Source_20_Text"><text:span text:style-name="T4">file2.log</text:span></text:span><text:span text:style-name="T4">, etc. </text:span></text:p>
        </text:list-item>
      </text:list>
      <text:p text:style-name="P17"><text:span text:style-name="Strong_20_Emphasis"><text:span text:style-name="T4">Working with Commands</text:span></text:span></text:p>
      <text:list text:style-name="L16">
        <text:list-item>
          <text:p text:style-name="P28"><text:span text:style-name="Strong_20_Emphasis"><text:span text:style-name="T4">type, which, help, man</text:span></text:span><text:span text:style-name="T4">: </text:span><text:span text:style-name="Source_20_Text"><text:span text:style-name="T4">type</text:span></text:span><text:span text:style-name="T4"> shows what a command is; </text:span><text:span text:style-name="Source_20_Text"><text:span text:style-name="T4">which</text:span></text:span><text:span text:style-name="T4"> locates its binary; </text:span><text:span text:style-name="Source_20_Text"><text:span text:style-name="T4">help</text:span></text:span><text:span text:style-name="T4"> gives shell builtin help; </text:span><text:span text:style-name="Source_20_Text"><text:span text:style-name="T4">man</text:span></text:span><text:span text:style-name="T4"> shows the manual page. </text:span></text:p>
        </text:list-item>
        <text:list-item>
          <text:p text:style-name="P28"><text:span text:style-name="Strong_20_Emphasis"><text:span text:style-name="T4">Kinds of commands</text:span></text:span><text:span text:style-name="T4">: Executables (programs), shell builtins, aliases, and shell functions. </text:span></text:p>
        </text:list-item>
        <text:list-item>
          <text:p text:style-name="P28"><text:span text:style-name="Strong_20_Emphasis"><text:span text:style-name="T4">Alias</text:span></text:span><text:span text:style-name="T4">: A custom shortcut for a command (e.g., </text:span><text:span text:style-name="Source_20_Text"><text:span text:style-name="T4">alias ll='ls -la'</text:span></text:span><text:span text:style-name="T4">). </text:span></text:p>
        </text:list-item>
        <text:list-item>
          <text:p text:style-name="P29"><text:span text:style-name="Strong_20_Emphasis"><text:span text:style-name="T4">help vs. man</text:span></text:span><text:span text:style-name="T4">: Use </text:span><text:span text:style-name="Source_20_Text"><text:span text:style-name="T4">help</text:span></text:span><text:span text:style-name="T4"> for shell builtins (like </text:span><text:span text:style-name="Source_20_Text"><text:span text:style-name="T4">cd</text:span></text:span><text:span text:style-name="T4">); use </text:span><text:span text:style-name="Source_20_Text"><text:span text:style-name="T4">man</text:span></text:span><text:span text:style-name="T4"> for external programs. </text:span></text:p>
        </text:list-item>
      </text:list>
      <text:p text:style-name="P17"><text:span text:style-name="Strong_20_Emphasis"><text:span text:style-name="T4">Reading Man Pages</text:span></text:span></text:p>
      <text:list text:style-name="L17">
        <text:list-item>
          <text:p text:style-name="P30"><text:span text:style-name="Strong_20_Emphasis"><text:span text:style-name="T4">How to read a man page</text:span></text:span><text:span text:style-name="T4">: Run </text:span><text:span text:style-name="Source_20_Text"><text:span text:style-name="T4">man &lt;command&gt;</text:span></text:span><text:span text:style-name="T4"> and navigate with arrow keys, space/PageDown to scroll, </text:span><text:span text:style-name="Source_20_Text"><text:span text:style-name="T4">q</text:span></text:span><text:span text:style-name="T4"> to quit. </text:span></text:p>
        </text:list-item>
        <text:list-item>
          <text:p text:style-name="P30"><text:span text:style-name="Strong_20_Emphasis"><text:span text:style-name="T4">Man page sections</text:span></text:span><text:span text:style-name="T4">: Numbered categories organizing manual entries by topic (1–9). </text:span></text:p>
        </text:list-item>
        <text:list-item>
          <text:p text:style-name="P31"><text:span text:style-name="Strong_20_Emphasis"><text:span text:style-name="T4">Section numbers</text:span></text:span><text:span text:style-name="T4">: 1 = User commands, 2 = System calls, 3 = Library functions. </text:span></text:p>
        </text:list-item>
      </text:list>
      <text:p text:style-name="P17"><text:span text:style-name="Strong_20_Emphasis"><text:span text:style-name="T4">Keyboard Shortcuts for Bash</text:span></text:span></text:p>
      <text:list text:style-name="L18">
        <text:list-item>
          <text:p text:style-name="P32"><text:span text:style-name="Strong_20_Emphasis"><text:span text:style-name="T4">Common shortcuts</text:span></text:span><text:span text:style-name="T4">: </text:span><text:span text:style-name="Source_20_Text"><text:span text:style-name="T4">Ctrl+C</text:span></text:span><text:span text:style-name="T4"> (cancel), </text:span><text:span text:style-name="Source_20_Text"><text:span text:style-name="T4">Ctrl+Z</text:span></text:span><text:span text:style-name="T4"> (suspend), </text:span><text:span text:style-name="Source_20_Text"><text:span text:style-name="T4">Ctrl+D</text:span></text:span><text:span text:style-name="T4"> (exit/logout), </text:span><text:span text:style-name="Source_20_Text"><text:span text:style-name="T4">Ctrl+L</text:span></text:span><text:span text:style-name="T4"> (clear screen), </text:span><text:span text:style-name="Source_20_Text"><text:span text:style-name="T4">Ctrl+A</text:span></text:span><text:span text:style-name="T4"> (start of line), </text:span><text:span text:style-name="Source_20_Text"><text:span text:style-name="T4">Ctrl+E</text:span></text:span><text:span text:style-name="T4"> (end of line), </text:span><text:span text:style-name="Source_20_Text"><text:span text:style-name="T4">Ctrl+R</text:span></text:span><text:span text:style-name="T4"> (reverse search), </text:span><text:span text:style-name="Source_20_Text"><text:span text:style-name="T4">Tab</text:span></text:span><text:span text:style-name="T4"> (autocomplete). </text:span></text:p>
        </text:list-item>
      </text:list>
      <text:p text:style-name="P17"><text:span text:style-name="Strong_20_Emphasis"><text:span text:style-name="T4">LTS</text:span></text:span></text:p>
      <text:list text:style-name="L19">
        <text:list-item>
          <text:p text:style-name="P33"><text:span text:style-name="Strong_20_Emphasis"><text:span text:style-name="T4">LTS</text:span></text:span><text:span text:style-name="T4">: Long Term Support — a software release (commonly Ubuntu) guaranteed to receive updates/security patches for an extended period (typically 5 years). </text:span></text:p>
        </text:list-item>
      </text:list>
      <text:h text:style-name="P34" text:outline-level="1">Linux shell, processes and signals</text:h>
      <text:p text:style-name="P35">• <text:span text:style-name="Strong_20_Emphasis">PID (Process Identifier)</text:span>: A unique number assigned by the OS to identify each running process.</text:p>
      <text:p text:style-name="P36">• <text:span text:style-name="Strong_20_Emphasis">Process</text:span>: An instance of a computer program that is being executed.</text:p>
      <text:p text:style-name="P36">• <text:span text:style-name="Strong_20_Emphasis">Finding a Process' PID</text:span>: Use commands like <text:span text:style-name="Source_20_Text">ps aux</text:span>, <text:span text:style-name="Source_20_Text">top</text:span>, or <text:span text:style-name="Source_20_Text">pgrep</text:span>.</text:p>
      <text:p text:style-name="P36"><text:soft-page-break/>• <text:span text:style-name="Strong_20_Emphasis">Killing a Process</text:span>: Use the <text:span text:style-name="Source_20_Text">kill</text:span> command followed by the PID (e.g., <text:span text:style-name="Source_20_Text">kill 1234</text:span>).</text:p>
      <text:p text:style-name="P36">• <text:span text:style-name="Strong_20_Emphasis">Signal</text:span>: A software interrupt sent to a process to notify it of an event or request action.</text:p>
      <text:p text:style-name="P36">• <text:span text:style-name="Strong_20_Emphasis">Non-Ignorable Signals</text:span>: SIGKILL (9) and SIGSTOP (19).</text:p>
      <text:p text:style-name="P35"/>
      <text:h text:style-name="P37" text:outline-level="1"><text:span text:style-name="T5">Linux Security Basics</text:span></text:h>
      <text:list text:style-name="L20">
        <text:list-item>
          <text:p text:style-name="P38"><text:span text:style-name="Strong_20_Emphasis">What is Linux: </text:span><text:span text:style-name="Strong_20_Emphasis"><text:span text:style-name="T6">Linux is a free, open-source operating system kernel that serves as the foundation for various Unix-like OS distributions.</text:span></text:span></text:p>
        </text:list-item>
        <text:list-item>
          <text:p text:style-name="P39"><text:span text:style-name="Strong_20_Emphasis">What is a Linux Command</text:span>: A Linux command is a specific instruction typed into the terminal to execute programs, manage files, or configure system settings. </text:p>
        </text:list-item>
      </text:list>
      <text:list text:style-name="L21">
        <text:list-item>
          <text:p text:style-name="P40"><text:span text:style-name="Strong_20_Emphasis">What is the structure of the Linux operating system</text:span>: The Linux structure consists of four main layers: the hardware, the kernel (core), the shell (interface), and the user applications. </text:p>
        </text:list-item>
      </text:list>
      <text:list text:style-name="L22">
        <text:list-item>
          <text:p text:style-name="P41"><text:span text:style-name="Strong_20_Emphasis">What is the purpose of the FHS and what are the benefits of using it</text:span>: The Filesystem Hierarchy Standard defines directory structure to ensure consistency across distributions, simplifying software compatibility and administration. </text:p>
        </text:list-item>
      </text:list>
      <text:list text:style-name="L23">
        <text:list-item>
          <text:p text:style-name="P42"><text:span text:style-name="Strong_20_Emphasis">What are the different directories in the Linux file system, and what are their purposes</text:span>: Key directories include <text:span text:style-name="Source_20_Text">/bin</text:span> (user binaries), <text:span text:style-name="Source_20_Text">/etc</text:span> (configuration files), <text:span text:style-name="Source_20_Text">/var</text:span> (variable data like logs), <text:span text:style-name="Source_20_Text">/home</text:span> (user data), and <text:span text:style-name="Source_20_Text">/tmp</text:span> (temporary files). </text:p>
        </text:list-item>
      </text:list>
      <text:list text:style-name="L24">
        <text:list-item>
          <text:p text:style-name="P43"><text:span text:style-name="Strong_20_Emphasis">How to protect files and directories</text:span>: Protect files by setting appropriate permissions with <text:span text:style-name="Source_20_Text">chmod</text:span>, managing ownership with <text:span text:style-name="Source_20_Text">chown</text:span>, and optionally applying encryption or mandatory access controls like SELinux/AppArmor. </text:p>
        </text:list-item>
      </text:list>
      <text:list text:style-name="L25">
        <text:list-item>
          <text:p text:style-name="P44"><text:span text:style-name="Strong_20_Emphasis">How to monitor and investigate system activity</text:span>: Monitor activity using tools like <text:span text:style-name="Source_20_Text">top</text:span>, <text:span text:style-name="Source_20_Text">htop</text:span>, <text:span text:style-name="Source_20_Text">journalctl</text:span> for logs, and auditd to track system calls and policy violations. </text:p>
        </text:list-item>
      </text:list>
      <text:list text:style-name="L26">
        <text:list-item>
          <text:p text:style-name="P45"><text:span text:style-name="Strong_20_Emphasis">How to securely transfer files and data</text:span>: Securely transfer data using encrypted protocols such as SFTP (SSH File Transfer Protocol) or SCP over SSH to ensure confidentiality and integrity. </text:p>
        </text:list-item>
      </text:list>
      <text:list text:style-name="L27">
        <text:list-item>
          <text:p text:style-name="P46"><text:span text:style-name="Strong_20_Emphasis">How to configure and manage a firewall</text:span>: Configure and manage firewalls using utilities like <text:span text:style-name="Source_20_Text">ufw</text:span> (Uncomplicated Firewall) or editing rules directly with <text:span text:style-name="Source_20_Text">iptables</text:span> or <text:span text:style-name="Source_20_Text">nftables</text:span>. </text:p>
        </text:list-item>
      </text:list>
      <text:list text:style-name="L28">
        <text:list-item>
          <text:p text:style-name="P47"><text:span text:style-name="Strong_20_Emphasis">How to identify and terminate malicious processes</text:span>: Identify malicious processes using <text:span text:style-name="Source_20_Text">ps</text:span>, <text:span text:style-name="Source_20_Text">top</text:span>, or <text:span text:style-name="Source_20_Text">netstat</text:span> to spot anomalies, then terminate them safely using the <text:span text:style-name="Source_20_Text">kill</text:span> command with the specific PID. </text:p>
        </text:list-item>
      </text:list>
      <text:list text:style-name="L29">
        <text:list-item>
          <text:p text:style-name="P48"><text:span text:style-name="Strong_20_Emphasis">How to use the ps and kill commands to identify and terminate malicious processes</text:span>: Use <text:span text:style-name="Source_20_Text">ps aux | grep [process]</text:span> to find the Process ID (PID) and then run <text:span text:style-name="Source_20_Text">kill -9 [PID]</text:span> to force-terminate the malicious process. </text:p>
        </text:list-item>
      </text:list>
      <text:list text:style-name="L30">
        <text:list-item>
          <text:p text:style-name="P49"><text:span text:style-name="Strong_20_Emphasis">How to use the netstat and ss commands to monitor network traffic for suspicious activity</text:span>: Use <text:span text:style-name="Source_20_Text">netstat -tulpn</text:span> or <text:span text:style-name="Source_20_Text">ss -tulpn</text:span> to list active connections and listening ports, helping you spot unauthorized outbound connections or open services. </text:p>
        </text:list-item>
      </text:list>
      <text:list text:style-name="L31">
        <text:list-item>
          <text:p text:style-name="P50"><text:span text:style-name="Strong_20_Emphasis">How to use the nmap, lynis and tcpdump commands to analyze network traffic for suspicious behavior</text:span>: Use <text:span text:style-name="Source_20_Text">nmap</text:span> to scan network topology, <text:span text:style-name="Source_20_Text">tcpdump</text:span> to capture packet-level traffic, and <text:span text:style-name="Source_20_Text">lynis</text:span> to audit system security and detect misconfigurations. </text:p>
        </text:list-item>
      </text:list>
      <text:list text:style-name="L32">
        <text:list-item>
          <text:p text:style-name="P51"><text:soft-page-break/><text:span text:style-name="Strong_20_Emphasis">How to use iptables and ufw to manage the firewall rules on Linux systems</text:span>: Use <text:span text:style-name="Source_20_Text">ufw allow/deny [port]</text:span> for simplified management or write specific <text:span text:style-name="Source_20_Text">iptables -A [chain] -j [action]</text:span> rules to control packet filtering at a granular level.</text:p>
        </text:list-item>
      </text:list>
      <text:p text:style-name="P52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1T20:50:21.586952914</meta:creation-date>
    <dc:date>2026-06-21T21:18:35.104250793</dc:date>
    <meta:editing-duration>PT4M57S</meta:editing-duration>
    <meta:editing-cycles>1</meta:editing-cycles>
    <meta:document-statistic meta:table-count="0" meta:image-count="0" meta:object-count="0" meta:page-count="5" meta:paragraph-count="93" meta:word-count="1637" meta:character-count="10418" meta:non-whitespace-character-count="8875"/>
    <meta:generator>LibreOffice/26.2.4.2$Linux_X86_64 LibreOffice_project/f4d82cf4d44730936b3f1a72d05a6253f577d3e9</meta:generator>
  </office:meta>
</office:document-meta>
</file>