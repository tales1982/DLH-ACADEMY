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c7622"/>
    </style:style>
    <style:style style:name="P2" style:family="paragraph" style:parent-style-name="Text_20_body">
      <style:text-properties officeooo:paragraph-rsid="000326fd"/>
    </style:style>
    <style:style style:name="P3" style:family="paragraph" style:parent-style-name="Text_20_body">
      <style:text-properties officeooo:paragraph-rsid="0003f5a4"/>
    </style:style>
    <style:style style:name="P4" style:family="paragraph" style:parent-style-name="Text_20_body">
      <style:text-properties officeooo:paragraph-rsid="000566f9"/>
    </style:style>
    <style:style style:name="P5" style:family="paragraph" style:parent-style-name="Text_20_body">
      <style:text-properties officeooo:paragraph-rsid="000686f0"/>
    </style:style>
    <style:style style:name="P6" style:family="paragraph" style:parent-style-name="Text_20_body">
      <style:text-properties officeooo:paragraph-rsid="0007bcc7"/>
    </style:style>
    <style:style style:name="P7" style:family="paragraph" style:parent-style-name="Text_20_body">
      <style:text-properties officeooo:paragraph-rsid="0009522d"/>
    </style:style>
    <style:style style:name="P8" style:family="paragraph" style:parent-style-name="Text_20_body">
      <style:text-properties officeooo:paragraph-rsid="000a0ab2"/>
    </style:style>
    <style:style style:name="P9" style:family="paragraph" style:parent-style-name="Text_20_body">
      <style:text-properties officeooo:paragraph-rsid="000a343a"/>
    </style:style>
    <style:style style:name="P10" style:family="paragraph" style:parent-style-name="Text_20_body">
      <style:text-properties officeooo:paragraph-rsid="000c2c97"/>
    </style:style>
    <style:style style:name="P11" style:family="paragraph" style:parent-style-name="Text_20_body">
      <style:text-properties officeooo:paragraph-rsid="000db09a"/>
    </style:style>
    <style:style style:name="P12" style:family="paragraph" style:parent-style-name="Text_20_body">
      <style:text-properties officeooo:paragraph-rsid="000e9938"/>
    </style:style>
    <style:style style:name="P13" style:family="paragraph" style:parent-style-name="Text_20_body">
      <style:text-properties officeooo:paragraph-rsid="000f875c"/>
    </style:style>
    <style:style style:name="P14" style:family="paragraph" style:parent-style-name="Text_20_body">
      <style:text-properties officeooo:paragraph-rsid="000fc283"/>
    </style:style>
    <style:style style:name="P15" style:family="paragraph" style:parent-style-name="Text_20_body">
      <style:text-properties officeooo:paragraph-rsid="0010c374"/>
    </style:style>
    <style:style style:name="P16" style:family="paragraph" style:parent-style-name="Text_20_body">
      <style:text-properties officeooo:paragraph-rsid="00123f61"/>
    </style:style>
    <style:style style:name="P17" style:family="paragraph" style:parent-style-name="Text_20_body">
      <style:text-properties officeooo:paragraph-rsid="0013e4b0"/>
    </style:style>
    <style:style style:name="P18" style:family="paragraph" style:parent-style-name="Text_20_body">
      <style:text-properties officeooo:paragraph-rsid="001444b6"/>
    </style:style>
    <style:style style:name="P19" style:family="paragraph" style:parent-style-name="Text_20_body">
      <style:text-properties officeooo:paragraph-rsid="0015ea33"/>
    </style:style>
    <style:style style:name="P20" style:family="paragraph" style:parent-style-name="Text_20_body">
      <style:text-properties officeooo:paragraph-rsid="0017e3f4"/>
    </style:style>
    <style:style style:name="P21" style:family="paragraph" style:parent-style-name="Text_20_body">
      <style:text-properties officeooo:paragraph-rsid="0019413a"/>
    </style:style>
    <style:style style:name="P22" style:family="paragraph" style:parent-style-name="Text_20_body">
      <style:text-properties officeooo:paragraph-rsid="0019675d"/>
    </style:style>
    <style:style style:name="P23" style:family="paragraph" style:parent-style-name="Text_20_body">
      <style:text-properties officeooo:paragraph-rsid="001b7a23"/>
    </style:style>
    <style:style style:name="P24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fo:font-size="12pt" style:font-size-asian="10.5pt" style:font-size-complex="12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d6cc6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1d6cc6" style:font-weight-asian="bold" style:font-weight-complex="bold"/>
    </style:style>
    <style:style style:name="P27" style:family="paragraph" style:parent-style-name="Text_20_body">
      <style:text-properties officeooo:paragraph-rsid="001f251e"/>
    </style:style>
    <style:style style:name="P28" style:family="paragraph" style:parent-style-name="Text_20_body">
      <style:text-properties officeooo:paragraph-rsid="00213abf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2pt" style:font-size-asian="10.5pt" style:font-size-complex="12pt"/>
    </style:style>
    <style:style style:name="P30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fo:font-size="18pt" style:font-size-asian="18pt" style:font-size-complex="18pt"/>
    </style:style>
    <style:style style:name="P31" style:family="paragraph" style:parent-style-name="Text_20_body">
      <style:text-properties officeooo:paragraph-rsid="001c7622"/>
    </style:style>
    <style:style style:name="P32" style:family="paragraph" style:parent-style-name="Text_20_body">
      <style:text-properties fo:font-weight="normal" officeooo:paragraph-rsid="001c7622" style:font-weight-asian="normal" style:font-weight-complex="normal"/>
    </style:style>
    <style:style style:name="P33" style:family="paragraph" style:parent-style-name="Text_20_body">
      <style:text-properties officeooo:paragraph-rsid="001c9676"/>
    </style:style>
    <style:style style:name="P34" style:family="paragraph" style:parent-style-name="Text_20_body">
      <style:text-properties fo:font-weight="normal" officeooo:paragraph-rsid="001c9676" style:font-weight-asian="normal" style:font-weight-complex="normal"/>
    </style:style>
    <style:style style:name="P35" style:family="paragraph" style:parent-style-name="Standard">
      <style:text-properties fo:font-weight="normal" style:font-weight-asian="normal" style:font-weight-complex="normal"/>
    </style:style>
    <style:style style:name="P36" style:family="paragraph" style:parent-style-name="Heading_20_1">
      <style:text-properties fo:font-size="18pt" fo:font-weight="bold" officeooo:paragraph-rsid="00234a73" style:font-size-asian="15.75pt" style:font-weight-asian="bold" style:font-size-complex="18pt" style:font-weight-complex="bold"/>
    </style:style>
    <style:style style:name="P37" style:family="paragraph" style:parent-style-name="Heading_20_1">
      <style:text-properties officeooo:paragraph-rsid="00234a73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fo:font-weight="bold" officeooo:rsid="001d6cc6" style:font-size-asian="10.5pt" style:font-weight-asian="bold" style:font-size-complex="12pt" style:font-weight-complex="bold"/>
    </style:style>
    <style:style style:name="T6" style:family="text">
      <style:text-properties fo:font-weight="bold" officeooo:rsid="001d6cc6" style:font-weight-asian="bold" style:font-weight-complex="bold"/>
    </style:style>
    <style:style style:name="T7" style:family="text">
      <style:text-properties fo:font-weight="bold" officeooo:rsid="001f251e" style:font-weight-asian="bold" style:font-weight-complex="bold"/>
    </style:style>
    <style:style style:name="T8" style:family="text">
      <style:text-properties fo:font-weight="bold" officeooo:rsid="00213abf" style:font-weight-asian="bold" style:font-weight-complex="bold"/>
    </style:style>
    <style:style style:name="T9" style:family="text">
      <style:text-properties officeooo:rsid="00213abf"/>
    </style:style>
    <style:style style:name="T10" style:family="text">
      <style:text-properties fo:font-weight="bold" officeooo:rsid="001c7622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officeooo:rsid="001c9676" style:font-weight-asian="bold" style:font-weight-complex="bold"/>
    </style:style>
    <style:style style:name="T13" style:family="text">
      <style:text-properties fo:font-size="12pt" fo:font-weight="bold" officeooo:rsid="00234a73" style:font-size-asian="10.5pt" style:font-weight-asian="bold" style:font-size-complex="12pt" style:font-weight-complex="bold"/>
    </style:style>
    <style:style style:name="T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fo:font-weight="bold" officeooo:rsid="00234a73" style:font-size-asian="12pt" style:font-weight-asian="bold" style:font-size-complex="12pt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learningobjectives"/><text:span text:style-name="Strong_20_Emphasis"><text:span text:style-name="T1">Learning Objectives</text:span></text:span></text:h>
      <text:h text:style-name="P1" text:outline-level="2"><text:span text:style-name="Strong_20_Emphasis"><text:span text:style-name="T2">Email Security Protocols</text:span></text:span></text:h>
      <text:p text:style-name="Text_20_body"><text:span text:style-name="Strong_20_Emphasis">Email Security Fundamentals</text:span></text:p>
      <text:p text:style-name="P2"><text:span text:style-name="Strong_20_Emphasis">Q:</text:span> What is email authentication and why is it important?</text:p>
      <text:p text:style-name="P2"><text:span text:style-name="Strong_20_Emphasis">A:</text:span> Email authentication verifies that a message comes from who it claims to be from, preventing spoofing and phishing attacks.</text:p>
      <text:p text:style-name="P2"><text:span text:style-name="Strong_20_Emphasis">Q:</text:span> What are the main threats that email authentication protocols protect against?</text:p>
      <text:p text:style-name="P2"><text:span text:style-name="Strong_20_Emphasis">A:</text:span> Email spoofing, phishing, domain impersonation, BEC (Business Email Compromise), and unauthorized sending on behalf of a domain.</text:p>
      <text:p text:style-name="P2"><text:span text:style-name="Strong_20_Emphasis">Q:</text:span> How do SPF, DKIM, and DMARC work together to provide comprehensive email security?</text:p>
      <text:p text:style-name="P2"><text:span text:style-name="Strong_20_Emphasis">A:</text:span> SPF authorizes sending servers, DKIM verifies message integrity via cryptographic signatures, and DMARC ties both together with alignment checks and enforcement policies.</text:p>
      <text:p text:style-name="P2"><text:span text:style-name="Strong_20_Emphasis">Q:</text:span> What is the difference between email spoofing and domain impersonation?</text:p>
      <text:p text:style-name="P2"><text:span text:style-name="Strong_20_Emphasis">A:</text:span> Spoofing forges the sender address directly, while domain impersonation uses a lookalike domain (e.g., paypa1.com instead of paypal.com).</text:p>
      <text:p text:style-name="Horizontal_20_Line"/>
      <text:p text:style-name="Text_20_body"><text:span text:style-name="Strong_20_Emphasis">Sender Policy Framework (SPF)</text:span></text:p>
      <text:p text:style-name="P3"><text:span text:style-name="Strong_20_Emphasis">Q:</text:span> What is SPF and what problem does it solve?</text:p>
      <text:p text:style-name="P3"><text:span text:style-name="Strong_20_Emphasis">A:</text:span> SPF is a DNS-based protocol that specifies which mail servers are authorized to send email on behalf of a domain, preventing unauthorized senders from spoofing that domain.</text:p>
      <text:p text:style-name="P3"><text:span text:style-name="Strong_20_Emphasis">Q:</text:span> How does SPF authorize sending mail servers?</text:p>
      <text:p text:style-name="P3"><text:span text:style-name="Strong_20_Emphasis">A:</text:span> By publishing a DNS TXT record listing permitted IP addresses, ranges, and included domains that receivers check against the connecting server's IP.</text:p>
      <text:p text:style-name="P3"><text:span text:style-name="Strong_20_Emphasis">Q:</text:span> What is the correct syntax for an SPF record?</text:p>
      <text:p text:style-name="P3"><text:span text:style-name="Strong_20_Emphasis">A:</text:span> <text:span text:style-name="Source_20_Text">v=spf1 [mechanisms] [qualifier]all</text:span> — e.g., <text:span text:style-name="Source_20_Text">v=spf1 ip4:192.0.2.0/24 include:_spf.google.com -all</text:span>.</text:p>
      <text:p text:style-name="P3"><text:span text:style-name="Strong_20_Emphasis">Q:</text:span> What are the different SPF mechanisms (ip4, include, mx, a, all) and when do you use each?</text:p>
      <text:p text:style-name="P3"><text:span text:style-name="Strong_20_Emphasis">A:</text:span> <text:span text:style-name="Source_20_Text">ip4/ip6</text:span> for specific IP ranges, <text:span text:style-name="Source_20_Text">include</text:span> to incorporate another domain's SPF, <text:span text:style-name="Source_20_Text">mx</text:span> to authorize your MX servers, <text:span text:style-name="Source_20_Text">a</text:span> to authorize IPs from your domain's A record, and <text:span text:style-name="Source_20_Text">all</text:span> as the catch-all default.</text:p>
      <text:p text:style-name="P3"><text:span text:style-name="Strong_20_Emphasis">Q:</text:span> What are the SPF qualifiers (+pass, -fail, ~softfail, ?neutral) and what do they mean?</text:p>
      <text:p text:style-name="P3"><text:span text:style-name="Strong_20_Emphasis">A:</text:span> <text:span text:style-name="Source_20_Text">+</text:span> = pass (default), <text:span text:style-name="Source_20_Text">-</text:span> = fail (reject), <text:span text:style-name="Source_20_Text">~</text:span> = softfail (mark suspicious but accept), <text:span text:style-name="Source_20_Text">?</text:span> = neutral (no policy assertion).</text:p>
      <text:p text:style-name="P3"><text:soft-page-break/><text:span text:style-name="Strong_20_Emphasis">Q:</text:span> What is the SPF evaluation order and why does it matter?</text:p>
      <text:p text:style-name="P3"><text:span text:style-name="Strong_20_Emphasis">A:</text:span> Mechanisms are evaluated left to right; the first matching mechanism determines the result, so order affects which rules take priority.</text:p>
      <text:p text:style-name="P3"><text:span text:style-name="Strong_20_Emphasis">Q:</text:span> What are the different SPF results (pass, fail, softfail, neutral, temperror, permerror)?</text:p>
      <text:p text:style-name="P3"><text:span text:style-name="Strong_20_Emphasis">A:</text:span> Pass = authorized, fail = unauthorized, softfail = probably unauthorized, neutral = no assertion, temperror = transient DNS error, permerror = permanent record error (e.g., syntax invalid).</text:p>
      <text:p text:style-name="P3"><text:span text:style-name="Strong_20_Emphasis">Q:</text:span> What is the 10 DNS lookup limit in SPF and why does it exist?</text:p>
      <text:p text:style-name="P3"><text:span text:style-name="Strong_20_Emphasis">A:</text:span> RFC 7208 limits resolving <text:span text:style-name="Source_20_Text">include</text:span>, <text:span text:style-name="Source_20_Text">a</text:span>, <text:span text:style-name="Source_20_Text">mx</text:span>, and <text:span text:style-name="Source_20_Text">redirect</text:span> mechanisms to 10 total lookups to prevent DNS amplification attacks and excessive load on receiving servers.</text:p>
      <text:p text:style-name="P3"><text:span text:style-name="Strong_20_Emphasis">Q:</text:span> Why does email forwarding break SPF and how can you mitigate this?</text:p>
      <text:p text:style-name="P3"><text:span text:style-name="Strong_20_Emphasis">A:</text:span> Forwarding changes the originating IP, failing the receiver's SPF check; mitigation includes ARC (Authenticated Received Chain), SRS (Sender Rewriting Scheme), or relying on DKIM which survives forwarding.</text:p>
      <text:p text:style-name="P3"><text:span text:style-name="Strong_20_Emphasis">Q:</text:span> What does -all mean in an SPF record and why is it important?</text:p>
      <text:p text:style-name="P3"><text:span text:style-name="Strong_20_Emphasis">A:</text:span> It means "fail all servers not explicitly authorized," ensuring that any sender not listed is marked as unauthorized — the strongest enforcement stance.</text:p>
      <text:p text:style-name="P3"><text:span text:style-name="Strong_20_Emphasis">Q:</text:span> How do you test and validate an SPF record?</text:p>
      <text:p text:style-name="P3"><text:span text:style-name="Strong_20_Emphasis">A:</text:span> Use <text:span text:style-name="Source_20_Text">dig TXT domain.com</text:span>, online tools like MXToolbox or dmarcian, or send test emails and inspect the <text:span text:style-name="Source_20_Text">Received-SPF</text:span> header.</text:p>
      <text:p text:style-name="Horizontal_20_Line"/>
      <text:p text:style-name="Text_20_body"><text:span text:style-name="Strong_20_Emphasis">DomainKeys Identified Mail (DKIM)</text:span></text:p>
      <text:p text:style-name="P3"><text:span text:style-name="Strong_20_Emphasis">Q:</text:span> What is DKIM and how does it differ from SPF?</text:p>
      <text:p text:style-name="P3"><text:span text:style-name="Strong_20_Emphasis">A:</text:span> DKIM attaches a cryptographic signature to messages verified via a public key in DNS, proving content integrity and sender authorization — unlike SPF which only validates the sending server's IP.</text:p>
      <text:p text:style-name="P4"><text:span text:style-name="Strong_20_Emphasis">Q:</text:span> How does DKIM use cryptographic signatures to verify email authenticity?</text:p>
      <text:p text:style-name="P4"><text:span text:style-name="Strong_20_Emphasis">A:</text:span> The sending server signs selected headers and body with a private key; the receiver retrieves the public key from DNS and verifies the signature.</text:p>
      <text:p text:style-name="P4"><text:span text:style-name="Strong_20_Emphasis">Q:</text:span> What is a DKIM selector and why are selectors used?</text:p>
      <text:p text:style-name="P4"><text:span text:style-name="Strong_20_Emphasis">A:</text:span> A selector is a string in the DKIM header that identifies which specific key to look up in DNS, enabling multiple concurrent keys and key rotation.</text:p>
      <text:p text:style-name="P4"><text:span text:style-name="Strong_20_Emphasis">Q:</text:span> What are the components of a DKIM signature header?</text:p>
      <text:p text:style-name="P4"><text:span text:style-name="Strong_20_Emphasis">A:</text:span> Key fields include <text:span text:style-name="Source_20_Text">v</text:span> (version), <text:span text:style-name="Source_20_Text">a</text:span> (algorithm), <text:span text:style-name="Source_20_Text">b</text:span> (signature value), <text:span text:style-name="Source_20_Text">bh</text:span> (body hash), <text:span text:style-name="Source_20_Text">d</text:span> (domain), <text:span text:style-name="Source_20_Text">h</text:span> (signed headers), <text:span text:style-name="Source_20_Text">s</text:span> (selector), and <text:span text:style-name="Source_20_Text">c</text:span> (canonicalization).</text:p>
      <text:p text:style-name="P4"><text:span text:style-name="Strong_20_Emphasis">Q:</text:span> How does the DKIM signing process work step-by-step?</text:p>
      <text:p text:style-name="P4"><text:soft-page-break/><text:span text:style-name="Strong_20_Emphasis">A:</text:span> 1) Canonicalize headers/body → 2) Hash the body → 3) Sign selected headers and body hash with the private key → 4) Attach the DKIM-Signature header → 5) Send.</text:p>
      <text:p text:style-name="P4"><text:span text:style-name="Strong_20_Emphasis">Q:</text:span> How does the DKIM verification process work step-by-step?</text:p>
      <text:p text:style-name="P4"><text:span text:style-name="Strong_20_Emphasis">A:</text:span> 1) Extract selector and domain from DKIM-Signature → 2) Query <text:span text:style-name="Source_20_Text">[selector]._domainkey.[domain]</text:span> in DNS for the public key → 3) Canonicalize → 4) Verify signature with the public key → 5) Compare body hash.</text:p>
      <text:p text:style-name="P4"><text:span text:style-name="Strong_20_Emphasis">Q:</text:span> What are canonicalization methods (simple/simple, relaxed/relaxed) and when do you use each?</text:p>
      <text:p text:style-name="P4"><text:span text:style-name="Strong_20_Emphasis">A:</text:span> Simple preserves headers/body exactly; relaxed tolerates whitespace/case changes — relaxed is preferred for headers and body since mail servers often modify content in transit.</text:p>
      <text:p text:style-name="P4"><text:span text:style-name="Strong_20_Emphasis">Q:</text:span> What is the format of a DKIM DNS record?</text:p>
      <text:p text:style-name="P4"><text:span text:style-name="Strong_20_Emphasis">A:</text:span> A TXT record at <text:span text:style-name="Source_20_Text">[selector]._domainkey.[domain]</text:span> containing <text:span text:style-name="Source_20_Text">v=DKIM1; k=rsa; p=[base64-encoded-public-key]</text:span>.</text:p>
      <text:p text:style-name="P5"><text:span text:style-name="Strong_20_Emphasis">Q:</text:span> How do you generate DKIM keys and what key size should you use?</text:p>
      <text:p text:style-name="P5"><text:span text:style-name="Strong_20_Emphasis">A:</text:span> Use OpenSSL (<text:span text:style-name="Source_20_Text">openssl genrsa -out private.pem 2048</text:span>) — RSA 2048-bit minimum; 4096-bit recommended for longer-term use; Ed25519 is also now supported.</text:p>
      <text:p text:style-name="P5"><text:span text:style-name="Strong_20_Emphasis">Q:</text:span> Why is DKIM forwarding-friendly while SPF is not?</text:p>
      <text:p text:style-name="P5"><text:span text:style-name="Strong_20_Emphasis">A:</text:span> Because the DKIM signature travels with the message and verifies against DNS (independent of the sending IP), while SPF breaks when the connecting IP changes during forwarding.</text:p>
      <text:p text:style-name="P5"><text:span text:style-name="Strong_20_Emphasis">Q:</text:span> What is DKIM key rotation and how do you perform it?</text:p>
      <text:p text:style-name="P5"><text:span text:style-name="Strong_20_Emphasis">A:</text:span> Publishing a new selector/key pair alongside the old one, allowing signed messages already in transit to still verify under the old key before removing it — typically done every 6–12 months.</text:p>
      <text:p text:style-name="P5"><text:span text:style-name="Strong_20_Emphasis">Q:</text:span> How do you test and validate DKIM signatures?</text:p>
      <text:p text:style-name="P5"><text:span text:style-name="Strong_20_Emphasis">A:</text:span> Send a test email and inspect the <text:span text:style-name="Source_20_Text">Authentication-Results</text:span> header, use tools like DKIM Validator, or verify manually with <text:span text:style-name="Source_20_Text">dig TXT selector._domainkey.domain.com</text:span>.</text:p>
      <text:p text:style-name="Horizontal_20_Line"/>
      <text:p text:style-name="Text_20_body"><text:span text:style-name="Strong_20_Emphasis">Domain-based Message Authentication, Reporting &amp; Conformance (DMARC)</text:span></text:p>
      <text:p text:style-name="P5"><text:span text:style-name="Strong_20_Emphasis">Q:</text:span> What is DMARC and how does it build on SPF and DKIM?</text:p>
      <text:p text:style-name="P5"><text:span text:style-name="Strong_20_Emphasis">A:</text:span> DMARC uses SPF and DKIM results plus alignment checks between the envelope/domain/from addresses to determine a policy action (none/quarantine/reject) and provides reporting.</text:p>
      <text:p text:style-name="P6"><text:span text:style-name="Strong_20_Emphasis">Q:</text:span> What are the required and optional DMARC tags?</text:p>
      <text:p text:style-name="P6"><text:span text:style-name="Strong_20_Emphasis">A:</text:span> Required: <text:span text:style-name="Source_20_Text">v</text:span> (version) and <text:span text:style-name="Source_20_Text">p</text:span> (policy); Optional: <text:span text:style-name="Source_20_Text">rua</text:span> (aggregate reports), <text:span text:style-name="Source_20_Text">ruf</text:span> (forensic reports), <text:span text:style-name="Source_20_Text">sp</text:span> (subdomain policy), <text:span text:style-name="Source_20_Text">pct</text:span> (percentage), <text:span text:style-name="Source_20_Text">ri</text:span> (report interval), <text:span text:style-name="Source_20_Text">adkim</text:span>/<text:span text:style-name="Source_20_Text">aspf</text:span> (alignment mode).</text:p>
      <text:p text:style-name="P6"><text:span text:style-name="Strong_20_Emphasis">Q:</text:span> What are the three DMARC policy levels (none, quarantine, reject) and what does each do?</text:p>
      <text:p text:style-name="P6"><text:span text:style-name="Strong_20_Emphasis">A:</text:span> <text:span text:style-name="Source_20_Text">none</text:span> = monitor only, no enforcement; <text:span text:style-name="Source_20_Text">quarantine</text:span> = send failing messages to spam; <text:span text:style-name="Source_20_Text">reject</text:span> = drop failing messages entirely.</text:p>
      <text:p text:style-name="P6"><text:soft-page-break/><text:span text:style-name="Strong_20_Emphasis">Q:</text:span> What is DMARC alignment and why is it important?</text:p>
      <text:p text:style-name="P6"><text:span text:style-name="Strong_20_Emphasis">A:</text:span> Alignment ensures the domain in the From header matches the domain validated by SPF (envelope sender) or DKIM (d= tag), closing loopholes where a passing SPF/DKIM could belong to a different domain.</text:p>
      <text:p text:style-name="P7"><text:span text:style-name="Strong_20_Emphasis">Q:</text:span> What is the difference between strict and relaxed alignment modes?</text:p>
      <text:p text:style-name="P7"><text:span text:style-name="Strong_20_Emphasis">A:</text:span> Strict requires exact domain match; relaxed allows organizational domain match (e.g., mail.example.com aligns with example.com).</text:p>
      <text:p text:style-name="P7"><text:span text:style-name="Strong_20_Emphasis">Q:</text:span> How does DMARC evaluate email authentication (SPF and DKIM checks)?</text:p>
      <text:p text:style-name="P7"><text:span text:style-name="Strong_20_Emphasis">A:</text:span> It checks if SPF passes <text:span text:style-name="Emphasis">and</text:span> the envelope domain aligns with the From header, OR if DKIM passes <text:span text:style-name="Emphasis">and</text:span> the DKIM domain aligns with the From header — either suffices.</text:p>
      <text:p text:style-name="P8"><text:span text:style-name="Strong_20_Emphasis">Q:</text:span> What are the conditions for a DMARC pass result?</text:p>
      <text:p text:style-name="P8"><text:span text:style-name="Strong_20_Emphasis">A:</text:span> At least one of SPF + alignment or DKIM + alignment must pass — that is, authenticated <text:span text:style-name="Emphasis">and</text:span> aligned with the From domain.</text:p>
      <text:p text:style-name="P8"><text:span text:style-name="Strong_20_Emphasis">Q:</text:span> What is the pct tag and how is it used for gradual policy enforcement?</text:p>
      <text:p text:style-name="P8"><text:span text:style-name="Strong_20_Emphasis">A:</text:span> <text:span text:style-name="Source_20_Text">pct=X</text:span> applies the DMARC policy to X% of failing messages, allowing incremental rollout (e.g., <text:span text:style-name="Source_20_Text">pct=10</text:span> quarantines only 10% of failures).</text:p>
      <text:p text:style-name="P9"><text:span text:style-name="Strong_20_Emphasis">Q:</text:span> What is the sp tag and how does it affect subdomain policies?</text:p>
      <text:p text:style-name="P9"><text:span text:style-name="Strong_20_Emphasis">A:</text:span> <text:span text:style-name="Source_20_Text">sp</text:span> sets a separate DMARC policy for subdomains; if omitted, subdomains inherit the <text:span text:style-name="Source_20_Text">p</text:span> policy — useful for rejecting subdomain spoofing while monitoring the apex domain.</text:p>
      <text:p text:style-name="P9"><text:span text:style-name="Strong_20_Emphasis">Q:</text:span> What are DMARC aggregate reports (RUA) and what information do they contain?</text:p>
      <text:p text:style-name="P9"><text:span text:style-name="Strong_20_Emphasis">A:</text:span> XML reports sent periodically to the RUA address containing sending IP, SPF/DKIM/DMARC results, counts, and policy outcomes — used for monitoring authentication across all senders.</text:p>
      <text:p text:style-name="P10"><text:span text:style-name="Strong_20_Emphasis">Q:</text:span> What are DMARC forensic reports (RUF) and when are they sent?</text:p>
      <text:p text:style-name="P10"><text:span text:style-name="Strong_20_Emphasis">A:</text:span> Individual failure reports sent per-message when DMARC fails, containing the original message headers and sometimes the body — useful for forensics but raises privacy concerns.</text:p>
      <text:p text:style-name="P10"><text:span text:style-name="Strong_20_Emphasis">Q:</text:span> How do you parse and analyze DMARC reports?</text:p>
      <text:p text:style-name="P10"><text:span text:style-name="Strong_20_Emphasis">A:</text:span> Use tools like dmarcian, Postmark's DMARC tool, parsedmarc (Python), or commercial platforms that ingest XML/RUA reports and present dashboards.</text:p>
      <text:p text:style-name="P11"><text:span text:style-name="Strong_20_Emphasis">Q:</text:span> What is the recommended DMARC deployment strategy?</text:p>
      <text:p text:style-name="P11"><text:span text:style-name="Strong_20_Emphasis">A:</text:span> Start with <text:span text:style-name="Source_20_Text">p=none</text:span> with <text:span text:style-name="Source_20_Text">rua</text:span> monitoring → analyze reports → move to <text:span text:style-name="Source_20_Text">p=quarantine</text:span> with low <text:span text:style-name="Source_20_Text">pct</text:span> → gradually increase → switch to <text:span text:style-name="Source_20_Text">p=reject</text:span>.</text:p>
      <text:p text:style-name="Horizontal_20_Line"/>
      <text:p text:style-name="Text_20_body"><text:span text:style-name="Strong_20_Emphasis">Protocol Integration</text:span></text:p>
      <text:p text:style-name="P12"><text:span text:style-name="Strong_20_Emphasis">Q:</text:span> How do SPF, DKIM, and DMARC work together in the email authentication flow?</text:p>
      <text:p text:style-name="P12"><text:soft-page-break/><text:span text:style-name="Strong_20_Emphasis">A:</text:span> Receiver checks SPF (IP authorized?), DKIM (signature valid?), then DMARC (do either align with From header?) → apply DMARC policy accordingly.</text:p>
      <text:p text:style-name="P13"><text:span text:style-name="Strong_20_Emphasis">Q:</text:span> What happens when SPF passes but DKIM fails (and vice versa)?</text:p>
      <text:p text:style-name="P13"><text:span text:style-name="Strong_20_Emphasis">A:</text:span> DMARC still passes if the one that passed aligns with the From header — only one aligned pass is needed.</text:p>
      <text:p text:style-name="P14"><text:span text:style-name="Strong_20_Emphasis">Q:</text:span> What happens when both SPF and DKIM fail?</text:p>
      <text:p text:style-name="P14"><text:span text:style-name="Strong_20_Emphasis">A:</text:span> DMARC fails, and the receiver applies the domain's DMARC policy (none/quarantine/reject).</text:p>
      <text:p text:style-name="P14"><text:span text:style-name="Strong_20_Emphasis">Q:</text:span> How does DMARC use SPF and DKIM results to make policy decisions?</text:p>
      <text:p text:style-name="P14"><text:span text:style-name="Strong_20_Emphasis">A:</text:span> DMARC combines the pass/fail results of each with alignment checks; if neither aligns and passes, it enforces the published policy.</text:p>
      <text:p text:style-name="P14"><text:span text:style-name="Strong_20_Emphasis">Q:</text:span> What threats does each protocol protect against?</text:p>
      <text:p text:style-name="P14"><text:span text:style-name="Strong_20_Emphasis">A:</text:span> SPF prevents unauthorized IP spoofing, DKIM prevents content tampering and verifies sender identity, DMARC prevents domain spoofing and provides enforcement + visibility.</text:p>
      <text:p text:style-name="P14"><text:span text:style-name="Strong_20_Emphasis">Q:</text:span> What are the limitations of each protocol?</text:p>
      <text:p text:style-name="P14"><text:span text:style-name="Strong_20_Emphasis">A:</text:span> SPF breaks on forwarding and has a 10-lookup limit; DKIM can break if intermediaries modify content; DMARC only protects the From header domain and requires at least one aligned pass.</text:p>
      <text:p text:style-name="Horizontal_20_Line"/>
      <text:p text:style-name="Text_20_body"><text:span text:style-name="Strong_20_Emphasis">Implementation and Configuration</text:span></text:p>
      <text:p text:style-name="P15"><text:span text:style-name="Strong_20_Emphasis">Q:</text:span> How do you implement SPF for a domain?</text:p>
      <text:p text:style-name="P15"><text:span text:style-name="Strong_20_Emphasis">A:</text:span> Publish a TXT record at the domain root: <text:span text:style-name="Source_20_Text">v=spf1 [authorized-sources] -all</text:span>.</text:p>
      <text:p text:style-name="P15"><text:span text:style-name="Strong_20_Emphasis">Q:</text:span> How do you implement DKIM for a domain?</text:p>
      <text:p text:style-name="P15"><text:span text:style-name="Strong_20_Emphasis">A:</text:span> Generate a key pair, configure your mail server to sign outgoing messages, and publish the public key at <text:span text:style-name="Source_20_Text">[selector]._domainkey.[domain]</text:span> as a TXT record.</text:p>
      <text:p text:style-name="P15"><text:span text:style-name="Strong_20_Emphasis">Q:</text:span> How do you implement DMARC for a domain?</text:p>
      <text:p text:style-name="P15"><text:span text:style-name="Strong_20_Emphasis">A:</text:span> Publish a TXT record at <text:span text:style-name="Source_20_Text">_dmarc.[domain]</text:span>: <text:span text:style-name="Source_20_Text">v=DMARC1; p=none; rua=mailto:dmarc@domain.com</text:span>.</text:p>
      <text:p text:style-name="P15"><text:span text:style-name="Strong_20_Emphasis">Q:</text:span> What is the correct order for implementing email authentication protocols?</text:p>
      <text:p text:style-name="P15"><text:span text:style-name="Strong_20_Emphasis">A:</text:span> SPF first → DKIM second → DMARC last (starting at <text:span text:style-name="Source_20_Text">p=none</text:span> with reporting).</text:p>
      <text:p text:style-name="P15"><text:span text:style-name="Strong_20_Emphasis">Q:</text:span> How do you configure subdomain policies?</text:p>
      <text:p text:style-name="P15"><text:span text:style-name="Strong_20_Emphasis">A:</text:span> Use the <text:span text:style-name="Source_20_Text">sp</text:span> tag in the DMARC record, or publish a separate DMARC record at <text:span text:style-name="Source_20_Text">_dmarc.subdomain.domain.com</text:span>.</text:p>
      <text:p text:style-name="P15"><text:span text:style-name="Strong_20_Emphasis">Q:</text:span> How do you handle third-party email services in SPF records?</text:p>
      <text:p text:style-name="P15"><text:span text:style-name="Strong_20_Emphasis">A:</text:span> Use <text:span text:style-name="Source_20_Text">include:</text:span> directives pointing to the provider's SPF record (e.g., <text:span text:style-name="Source_20_Text">include:_spf.google.com</text:span>), being mindful of the 10-lookup limit.</text:p>
      <text:p text:style-name="P15"><text:soft-page-break/><text:span text:style-name="Strong_20_Emphasis">Q:</text:span> How do you troubleshoot authentication failures?</text:p>
      <text:p text:style-name="P15"><text:span text:style-name="Strong_20_Emphasis">A:</text:span> Inspect <text:span text:style-name="Source_20_Text">Authentication-Results</text:span> and <text:span text:style-name="Source_20_Text">Received-SPF</text:span> headers, validate DNS records with dig/online tools, check alignment, and analyze DMARC reports.</text:p>
      <text:p text:style-name="Horizontal_20_Line"/>
      <text:p text:style-name="Text_20_body"><text:span text:style-name="Strong_20_Emphasis">DNS and Technical Details</text:span></text:p>
      <text:p text:style-name="P16"><text:span text:style-name="Strong_20_Emphasis">Q:</text:span> Where are SPF, DKIM, and DMARC records published in DNS?</text:p>
      <text:p text:style-name="P16"><text:span text:style-name="Strong_20_Emphasis">A:</text:span> SPF at the domain root, DKIM at <text:span text:style-name="Source_20_Text">[selector]._domainkey.[domain]</text:span>, DMARC at <text:span text:style-name="Source_20_Text">_dmarc.[domain]</text:span>.</text:p>
      <text:p text:style-name="P16"><text:span text:style-name="Strong_20_Emphasis">Q:</text:span> What DNS record type is used for email authentication records?</text:p>
      <text:p text:style-name="P16"><text:span text:style-name="Strong_20_Emphasis">A:</text:span> TXT records for all three (SPF, DKIM, and DMARC).</text:p>
      <text:p text:style-name="P17"><text:span text:style-name="Strong_20_Emphasis">Q:</text:span> How do you query DNS records using dig, nslookup, or online tools?</text:p>
      <text:p text:style-name="P17"><text:span text:style-name="Strong_20_Emphasis">A:</text:span> <text:span text:style-name="Source_20_Text">dig TXT domain.com</text:span> (SPF), <text:span text:style-name="Source_20_Text">dig TXT selector._domainkey.domain.com</text:span> (DKIM), <text:span text:style-name="Source_20_Text">dig TXT _dmarc.domain.com</text:span> (DMARC); or use MXToolbox/dmarcian.</text:p>
      <text:p text:style-name="P17"><text:span text:style-name="Strong_20_Emphasis">Q:</text:span> What is the format of each DNS record type?</text:p>
      <text:p text:style-name="P17"><text:span text:style-name="Strong_20_Emphasis">A:</text:span> SPF: <text:span text:style-name="Source_20_Text">v=spf1 ... -all</text:span>; DKIM: <text:span text:style-name="Source_20_Text">v=DKIM1; k=rsa; p=[key]</text:span>; DMARC: <text:span text:style-name="Source_20_Text">v=DMARC1; p=none; rua=...</text:span>.</text:p>
      <text:p text:style-name="P17"><text:span text:style-name="Strong_20_Emphasis">Q:</text:span> How do DNS lookups work for SPF includes?</text:p>
      <text:p text:style-name="P17"><text:span text:style-name="Strong_20_Emphasis">A:</text:span> Each <text:span text:style-name="Source_20_Text">include:</text:span> triggers a recursive TXT lookup on the referenced domain, counting toward the 10-lookup limit.</text:p>
      <text:p text:style-name="P17"><text:span text:style-name="Strong_20_Emphasis">Q:</text:span> How do DNS lookups work for DKIM public keys?</text:p>
      <text:p text:style-name="P17"><text:span text:style-name="Strong_20_Emphasis">A:</text:span> The verifier constructs the query <text:span text:style-name="Source_20_Text">[selector]._domainkey.[d=domain]</text:span> and retrieves the TXT record containing the public key.</text:p>
      <text:p text:style-name="Horizontal_20_Line"/>
      <text:p text:style-name="Text_20_body"><text:span text:style-name="Strong_20_Emphasis">Best Practices and Common Mistakes</text:span></text:p>
      <text:p text:style-name="P18"><text:span text:style-name="Strong_20_Emphasis">Q:</text:span> What are the best practices for SPF record configuration?</text:p>
      <text:p text:style-name="P18"><text:span text:style-name="Strong_20_Emphasis">A:</text:span> Keep it under the 10-lookup limit, end with <text:span text:style-name="Source_20_Text">-all</text:span>, avoid <text:span text:style-name="Source_20_Text">+all</text:span>, use <text:span text:style-name="Source_20_Text">ip4/ip6</text:span> where possible, and use SPF flattening services if includes are too many.</text:p>
      <text:p text:style-name="P18"><text:span text:style-name="Strong_20_Emphasis">Q:</text:span> What are the best practices for DKIM key management?</text:p>
      <text:p text:style-name="P18"><text:span text:style-name="Strong_20_Emphasis">A:</text:span> Use RSA 2048+ or Ed25519, rotate keys every 6–12 months, use dual selectors during rotation, and store private keys securely.</text:p>
      <text:p text:style-name="P18"><text:span text:style-name="Strong_20_Emphasis">Q:</text:span> What are the best practices for DMARC policy deployment?</text:p>
      <text:p text:style-name="P18"><text:span text:style-name="Strong_20_Emphasis">A:</text:span> Start at <text:span text:style-name="Source_20_Text">p=none</text:span> with <text:span text:style-name="Source_20_Text">rua</text:span> reporting, analyze reports thoroughly, incrementally move to <text:span text:style-name="Source_20_Text">quarantine</text:span> then <text:span text:style-name="Source_20_Text">reject</text:span>, and set <text:span text:style-name="Source_20_Text">sp=reject</text:span> for subdomains early.</text:p>
      <text:p text:style-name="P19"><text:span text:style-name="Strong_20_Emphasis">Q:</text:span> What are common mistakes when implementing email authentication?</text:p>
      <text:p text:style-name="P19"><text:soft-page-break/><text:span text:style-name="Strong_20_Emphasis">A:</text:span> Using <text:span text:style-name="Source_20_Text">+all</text:span> or <text:span text:style-name="Source_20_Text">~all</text:span> in SPF, skipping DKIM, deploying DMARC at <text:span text:style-name="Source_20_Text">p=reject</text:span> immediately, exceeding the 10-lookup limit, and neglecting third-party senders.</text:p>
      <text:p text:style-name="P19"><text:span text:style-name="Strong_20_Emphasis">Q:</text:span> How do you avoid the SPF 10 DNS lookup limit?</text:p>
      <text:p text:style-name="P19"><text:span text:style-name="Strong_20_Emphasis">A:</text:span> Use IP addresses directly instead of <text:span text:style-name="Source_20_Text">include:</text:span>, consolidate includes with SPF flattening tools, or use a delegated SPF service.</text:p>
      <text:p text:style-name="P19"><text:span text:style-name="Strong_20_Emphasis">Q:</text:span> Why should you never use +all in an SPF record?</text:p>
      <text:p text:style-name="P19"><text:span text:style-name="Strong_20_Emphasis">A:</text:span> It explicitly authorizes <text:span text:style-name="Emphasis">every</text:span> IP on the internet to send email from your domain, completely defeating SPF's purpose.</text:p>
      <text:p text:style-name="P19"><text:span text:style-name="Strong_20_Emphasis">Q:</text:span> Why should you start with p=none in DMARC before enforcing policies?</text:p>
      <text:p text:style-name="P19"><text:span text:style-name="Strong_20_Emphasis">A:</text:span> To collect reports and identify all legitimate senders before enforcement, avoiding false positives that block valid mail.</text:p>
      <text:p text:style-name="P19"><text:span text:style-name="Strong_20_Emphasis">Q:</text:span> How often should you rotate DKIM keys?</text:p>
      <text:p text:style-name="P19"><text:span text:style-name="Strong_20_Emphasis">A:</text:span> Every 6–12 months is recommended, or immediately if a private key is compromised.</text:p>
      <text:p text:style-name="Horizontal_20_Line"/>
      <text:p text:style-name="Text_20_body"><text:span text:style-name="Strong_20_Emphasis">Troubleshooting</text:span></text:p>
      <text:p text:style-name="P20"><text:span text:style-name="Strong_20_Emphasis">Q:</text:span> How do you diagnose SPF authentication failures?</text:p>
      <text:p text:style-name="P20"><text:span text:style-name="Strong_20_Emphasis">A:</text:span> Check the <text:span text:style-name="Source_20_Text">Received-SPF</text:span> header, verify the sending IP against the SPF record, look for include chain issues, and confirm the record doesn't exceed 10 lookups.</text:p>
      <text:p text:style-name="P21"><text:span text:style-name="Strong_20_Emphasis">Q:</text:span> How do you diagnose DKIM signature failures?</text:p>
      <text:p text:style-name="P21"><text:span text:style-name="Strong_20_Emphasis">A:</text:span> Verify the public key is published correctly in DNS, check for body/header modifications in transit (canonicalization mismatch), confirm the selector exists, and ensure key length is supported.</text:p>
      <text:p text:style-name="P22"><text:span text:style-name="Strong_20_Emphasis">Q:</text:span> How do you diagnose DMARC policy issues?</text:p>
      <text:p text:style-name="P22"><text:span text:style-name="Strong_20_Emphasis">A:</text:span> Analyze DMARC aggregate reports, verify alignment between SPF/DKIM domains and the From header, and check that the DMARC record is published at <text:span text:style-name="Source_20_Text">_dmarc.[domain]</text:span>.</text:p>
      <text:p text:style-name="P22"><text:span text:style-name="Strong_20_Emphasis">Q:</text:span> What tools can you use to test email authentication?</text:p>
      <text:p text:style-name="P22"><text:span text:style-name="Strong_20_Emphasis">A:</text:span> MXToolbox, dmarcian, mail-tester.com, DKIM Validator, <text:span text:style-name="Source_20_Text">dig</text:span>/<text:span text:style-name="Source_20_Text">nslookup</text:span>, and Parsedmarc for report analysis.</text:p>
      <text:p text:style-name="P23"><text:span text:style-name="Strong_20_Emphasis">Q:</text:span> How do you read and interpret email headers?</text:p>
      <text:p text:style-name="P23"><text:span text:style-name="Strong_20_Emphasis">A:</text:span> View the full message source and trace from bottom (oldest) to top (newest), looking at <text:span text:style-name="Source_20_Text">Authentication-Results</text:span>, <text:span text:style-name="Source_20_Text">Received-SPF</text:span>, <text:span text:style-name="Source_20_Text">DKIM-Signature</text:span>, and <text:span text:style-name="Source_20_Text">Received</text:span> headers.</text:p>
      <text:p text:style-name="P23"><text:span text:style-name="Strong_20_Emphasis">Q:</text:span> How do you analyze DMARC aggregate reports?</text:p>
      <text:p text:style-name="P23"><text:span text:style-name="Strong_20_Emphasis">A:</text:span> Ingest XML reports via tools like parsedmarc or commercial dashboards, then review which IPs/senders pass or fail authentication and alignment.</text:p>
      <text:p text:style-name="P23"><text:span text:style-name="Strong_20_Emphasis">Q:</text:span> What are common causes of authentication failures?</text:p>
      <text:p text:style-name="P23"><text:soft-page-break/><text:span text:style-name="Strong_20_Emphasis">A:</text:span> Unlisted third-party senders in SPF, broken <text:span text:style-name="Source_20_Text">include</text:span> chains, modified message bodies breaking DKIM, misaligned domains, missing/expired DNS records, and forwarding scenarios.</text:p>
      <text:h text:style-name="P24" text:outline-level="1"><text:span text:style-name="Strong_20_Emphasis"><text:span text:style-name="T3">Network Protocols: Auditing and Securing</text:span></text:span></text:h>
      <text:p text:style-name="P25"><text:span text:style-name="Strong_20_Emphasis"><text:span text:style-name="T4"/></text:span></text:p>
      <text:p text:style-name="P25"><text:span text:style-name="Strong_20_Emphasis"><text:span text:style-name="T4">Core Security Principles &amp; Protocol Differentiation</text:span></text:span></text:p>
      <text:p text:style-name="P25"><text:span text:style-name="Strong_20_Emphasis"><text:span text:style-name="T5">Q: </text:span></text:span>What are the three core security goals that secure protocols aim to achieve</text:p>
      <text:p text:style-name="P25"><text:span text:style-name="T6">A:</text:span> Confidentiality, integrity, and availability (the CIA triad).</text:p>
      <text:p text:style-name="P26"/>
      <text:p text:style-name="P25"><text:span text:style-name="T6">Q: </text:span>What is the main difference between application-layer protocols and network-layer protocols?</text:p>
      <text:p text:style-name="P25"><text:span text:style-name="T6">A: </text:span>Application-layer operates at OSI layer 7 (user-facing services), while network-layer operates at layer 3 (routing and addressing).</text:p>
      <text:p text:style-name="P25"/>
      <text:p text:style-name="P25"><text:span text:style-name="T6">Q: </text:span>Explain the concept of port numbers and their significance in network communication.</text:p>
      <text:p text:style-name="P25"><text:span text:style-name="T6">A: </text:span>Port numbers identify specific applications or services running on a host, allowing multiplexing of communications.</text:p>
      <text:p text:style-name="Text_20_body"><text:span text:style-name="Strong_20_Emphasis"/></text:p>
      <text:p text:style-name="P27"><text:span text:style-name="Strong_20_Emphasis">Secure Web &amp; Remote Access Protocols</text:span></text:p>
      <text:p text:style-name="P27"><text:span text:style-name="Strong_20_Emphasis"><text:span text:style-name="T7">Q: </text:span></text:span>What is the difference between SSL and TLS, and which one is actually used today?</text:p>
      <text:p text:style-name="P27"><text:span text:style-name="T7">A: </text:span>TLS is the modern successor; SSL is deprecated and insecure.</text:p>
      <text:p text:style-name="P27"><text:span text:style-name="T7">Q: </text:span>How the TLS handshake works when visiting a secure website?</text:p>
      <text:p text:style-name="P27"><text:span text:style-name="T7">A:</text:span> Client and server negotiate encryption algorithms, authenticate via certificates, and establish session keys before data transfer.</text:p>
      <text:p text:style-name="P27"><text:span text:style-name="T7">Q: </text:span>What problem did SSH solve that older protocols like Telnet couldn't handle?</text:p>
      <text:p text:style-name="P27"><text:span text:style-name="T7">A:</text:span> SSH provides encrypted remote shell access, while Telnet transmits all data (including credentials) in plaintext.</text:p>
      <text:p text:style-name="P27"><text:span text:style-name="T7">Q: </text:span>How does SSH authentication with public keys work?</text:p>
      <text:p text:style-name="P27"><text:span text:style-name="T7">A:</text:span> The client proves identity using a private key without transmitting it, while the server verifies against a stored public key.</text:p>
      <text:p text:style-name="P27"><text:span text:style-name="T7">Q: </text:span>Differentiate between secure protocols like HTTPS, SFTP and their insecure counterparts HTTP, FTP.</text:p>
      <text:p text:style-name="P27"><text:span text:style-name="T7">A: </text:span>Secure versions encrypt data in transit; insecure versions transmit plaintext vulnerable to interception.</text:p>
      <text:p text:style-name="P27"><text:span text:style-name="T7">Q: </text:span>Explain why HTTPS is mandatory for user trust, data protection, and modern web features.</text:p>
      <text:p text:style-name="P27"><text:span text:style-name="T7">A:</text:span> It prevents man-in-the-middle attacks, protects sensitive data, and is required by browsers for mixed content handling.</text:p>
      <text:p text:style-name="P27"/>
      <text:p text:style-name="P27"><text:span text:style-name="Strong_20_Emphasis">Network Layer &amp; VPN Protocols</text:span></text:p>
      <text:p text:style-name="P27"><text:soft-page-break/><text:span text:style-name="Strong_20_Emphasis"><text:span text:style-name="T7">Q: </text:span></text:span>What is the difference between Transport Mode and Tunnel Mode in IPSec, and which is used for VPNs?</text:p>
      <text:p text:style-name="P27"><text:span text:style-name="T7">A: </text:span>Transport mode encrypts only payload; tunnel mode encrypts entire packet—tunnel mode is used for VPNs.</text:p>
      <text:p text:style-name="P27"><text:span text:style-name="T7">Q: </text:span>What is the difference between the AH (Authentication Header) and ESP (Encapsulating Security Payload) protocols in IPSec?</text:p>
      <text:p text:style-name="P27"><text:span text:style-name="T7">A:</text:span> AH provides authentication only; ESP provides both encryption and authentication.</text:p>
      <text:p text:style-name="P27"><text:span text:style-name="T7">Q: </text:span>Why should PPTP never be used for security-sensitive tasks.</text:p>
      <text:p text:style-name="P27"><text:span text:style-name="T7">A:</text:span> It has known cryptographic weaknesses and vulnerabilities including MSCHAPv2 cracking.</text:p>
      <text:p text:style-name="P27"><text:span text:style-name="T7">Q: </text:span>What makes the modern WireGuard protocol faster and more efficient than traditional VPN protocols like OpenVPN.</text:p>
      <text:p text:style-name="P27"><text:span text:style-name="T7">A:</text:span> Simpler codebase, modern cryptography (ChaCha20, Curve25519), and stateless design reduce overhead.</text:p>
      <text:p text:style-name="P27"/>
      <text:p text:style-name="P28"><text:span text:style-name="Strong_20_Emphasis">Common Protocol Auditing &amp; Risk Assessment</text:span></text:p>
      <text:p text:style-name="P28"><text:span text:style-name="Strong_20_Emphasis"><text:span text:style-name="T8">Q: </text:span></text:span>Explain the purpose of the Network File System (NFS) protocol and how misconfigurations can lead to exposed shares.</text:p>
      <text:p text:style-name="P28"><text:span text:style-name="T8">A:</text:span> NFS enables file sharing across networks; improper access controls expose sensitive directories to unauthorized users.</text:p>
      <text:p text:style-name="P28"><text:span text:style-name="T8">Q: </text:span>Describe how the SMTP commands VRFY and EXPN can be exploited for user enumeration on a mail server.</text:p>
      <text:p text:style-name="P28"><text:span text:style-name="T8">A:</text:span> These commands reveal valid email addresses/usernames, enabling targeted phishing attacks.</text:p>
      <text:p text:style-name="P28"><text:span text:style-name="T8">Q: </text:span>Explain the purpose of SNMP and the security risks associated with unencrypted data and default community strings.</text:p>
      <text:p text:style-name="P28"><text:span text:style-name="T8">A:</text:span> SNMP monitors devices but defaults allow attackers to read/write device configurations with minimal effort.</text:p>
      <text:p text:style-name="P28"/>
      <text:p text:style-name="P28"><text:span text:style-name="Strong_20_Emphasis">System Hardening &amp; Vulnerability Management</text:span></text:p>
      <text:p text:style-name="P28"><text:span text:style-name="Strong_20_Emphasis"><text:span text:style-name="T9">Q: </text:span></text:span>Explain the importance of keeping network protocols and server configurations up-to-date and patched.</text:p>
      <text:p text:style-name="P28"><text:span text:style-name="T8">A:</text:span> Unpatched systems contain known vulnerabilities exploitable by attackers with published exploits.</text:p>
      <text:p text:style-name="P28"><text:span text:style-name="T8">Q: </text:span>Explain the need for setting up basic firewall rules (like using iptables) to control network access.</text:p>
      <text:p text:style-name="P28"><text:span text:style-name="T8">A:</text:span> Firewalls filter unauthorized traffic and limit attack surface by blocking unnecessary ports.</text:p>
      <text:p text:style-name="P28"><text:soft-page-break/><text:span text:style-name="T8">Q: </text:span>Identify common SSH configuration weaknesses that require hardening (permitting root login, password authentication).</text:p>
      <text:p text:style-name="P28"><text:span text:style-name="T8">A:</text:span> Disabling root login, password authentication, and enforcing key-based auth reduces brute-force and privilege escalation risks. </text:p>
      <text:p text:style-name="P29"/>
      <text:h text:style-name="P30" text:outline-level="1">Passive Reconnaissance</text:h>
      <text:p text:style-name="P31"><text:span text:style-name="Strong_20_Emphasis"><text:span text:style-name="T10">Q: </text:span></text:span><text:span text:style-name="Strong_20_Emphasis"><text:span text:style-name="T11">What can we learn about a Server?</text:span></text:span></text:p>
      <text:p text:style-name="P32"><text:span text:style-name="T10">A: </text:span>We can discover its open ports, running services, OS fingerprint, and potential vulnerabilities.</text:p>
      <text:p text:style-name="P31"><text:span text:style-name="Strong_20_Emphasis"><text:span text:style-name="T10">Q: </text:span></text:span><text:span text:style-name="Strong_20_Emphasis"><text:span text:style-name="T11">What is a DNS server?</text:span></text:span></text:p>
      <text:p text:style-name="P32"><text:span text:style-name="T10">A: </text:span>It is a specialized server that translates human-readable domain names into machine-readable IP addresses.</text:p>
      <text:p text:style-name="P31"><text:span text:style-name="Strong_20_Emphasis"><text:span text:style-name="T10">Q: </text:span></text:span><text:span text:style-name="Strong_20_Emphasis"><text:span text:style-name="T11">What happens when we type </text:span></text:span><text:a xlink:type="simple" xlink:href="http://www.holbertonschool.com/" text:style-name="Internet_20_link" text:visited-style-name="Visited_20_Internet_20_Link"><text:span text:style-name="Strong_20_Emphasis"><text:span text:style-name="T11">www.holbertonschool.com</text:span></text:span></text:a><text:span text:style-name="Strong_20_Emphasis"><text:span text:style-name="T11"> and press ENTER?</text:span></text:span></text:p>
      <text:p text:style-name="P32"><text:span text:style-name="Strong_20_Emphasis"><text:span text:style-name="T10">A:</text:span></text:span> Your browser queries a DNS server to resolve the domain to an IP address, then establishes a TCP connection to retrieve and render the website.</text:p>
      <text:p text:style-name="P31"><text:span text:style-name="Strong_20_Emphasis"><text:span text:style-name="T10">Q: </text:span></text:span><text:span text:style-name="Strong_20_Emphasis"><text:span text:style-name="T11">How can we find the owner information for a domain name?</text:span></text:span></text:p>
      <text:p text:style-name="P31"><text:span text:style-name="Strong_20_Emphasis"><text:span text:style-name="T10">A:</text:span></text:span><text:span text:style-name="T11"> You can query public WHOIS databases or use tools like </text:span><text:span text:style-name="Source_20_Text"><text:span text:style-name="T11">whois</text:span></text:span><text:span text:style-name="T11"> to retrieve registration details.</text:span></text:p>
      <text:p text:style-name="P31"><text:span text:style-name="Strong_20_Emphasis"><text:span text:style-name="T10">Q: </text:span></text:span><text:span text:style-name="Strong_20_Emphasis"><text:span text:style-name="T11">What is dig?</text:span></text:span></text:p>
      <text:p text:style-name="P31"><text:span text:style-name="Strong_20_Emphasis"><text:span text:style-name="T10">A:</text:span></text:span><text:span text:style-name="T11"> </text:span><text:span text:style-name="Source_20_Text"><text:span text:style-name="T11">dig</text:span></text:span><text:span text:style-name="T11"> (Domain Information Groper) is a flexible command-line tool used for querying DNS servers and analyzing records.</text:span></text:p>
      <text:p text:style-name="P31"><text:span text:style-name="Strong_20_Emphasis"><text:span text:style-name="T10">Q: </text:span></text:span><text:span text:style-name="Strong_20_Emphasis"><text:span text:style-name="T11">What is nslookup?</text:span></text:span></text:p>
      <text:p text:style-name="P31"><text:span text:style-name="Strong_20_Emphasis"><text:span text:style-name="T10">A:</text:span></text:span><text:span text:style-name="T11"> </text:span><text:span text:style-name="Source_20_Text"><text:span text:style-name="T11">nslookup</text:span></text:span><text:span text:style-name="T11"> is a network administration command-line program used to query the Domain Name System (DNS) to obtain domain name or IP address mapping.</text:span></text:p>
      <text:p text:style-name="P31"><text:span text:style-name="Strong_20_Emphasis"><text:span text:style-name="T10">Q: </text:span></text:span><text:span text:style-name="Strong_20_Emphasis"><text:span text:style-name="T11">What are the different types of DNS RECORDS?</text:span></text:span></text:p>
      <text:p text:style-name="P32"><text:span text:style-name="Strong_20_Emphasis"><text:span text:style-name="T10">A:</text:span></text:span> Common types include A (IPv4), AAAA (IPv6), CNAME (alias), MX (mail exchange), TXT (text/verification), NS (nameserver), and SOA (start of authority).</text:p>
      <text:p text:style-name="P31"><text:span text:style-name="Strong_20_Emphasis"><text:span text:style-name="T10">Q: </text:span></text:span><text:span text:style-name="Strong_20_Emphasis"><text:span text:style-name="T11">What is DNS Dumpster?</text:span></text:span></text:p>
      <text:p text:style-name="P32"><text:span text:style-name="Strong_20_Emphasis"><text:span text:style-name="T10">A:</text:span></text:span> DNS Dumpster is a free online reconnaissance tool that allows users to scan a domain for DNS records and map its infrastructure.</text:p>
      <text:p text:style-name="P31"><text:span text:style-name="Strong_20_Emphasis"><text:span text:style-name="T10">Q: </text:span></text:span><text:span text:style-name="Strong_20_Emphasis"><text:span text:style-name="T11">What is Shodan.io?</text:span></text:span></text:p>
      <text:p text:style-name="P32"><text:span text:style-name="Strong_20_Emphasis"><text:span text:style-name="T10">A: </text:span></text:span>Shodan is a search engine that indexes Internet-connected devices, allowing users to find specific servers, IoT devices, and open ports by banner information.</text:p>
      <text:p text:style-name="P31"><text:span text:style-name="Strong_20_Emphasis"><text:span text:style-name="T10">Q: </text:span></text:span><text:span text:style-name="Strong_20_Emphasis"><text:span text:style-name="T11">How can we find subdomains?</text:span></text:span></text:p>
      <text:p text:style-name="P32"><text:span text:style-name="Strong_20_Emphasis"><text:span text:style-name="T10">A:</text:span></text:span> Methods include brute-forcing with wordlists, checking certificate transparency logs, scraping search engines, and using specialized enumeration tools.</text:p>
      <text:p text:style-name="P31"><text:span text:style-name="Strong_20_Emphasis"><text:span text:style-name="T10">Q: </text:span></text:span><text:span text:style-name="Strong_20_Emphasis"><text:span text:style-name="T11">What is subfinder?</text:span></text:span></text:p>
      <text:p text:style-name="P31"><text:soft-page-break/><text:span text:style-name="Strong_20_Emphasis"><text:span text:style-name="T10">A:</text:span></text:span><text:span text:style-name="T11"> </text:span><text:span text:style-name="Source_20_Text"><text:span text:style-name="T11">subfinder</text:span></text:span><text:span text:style-name="T11"> is a fast, passive subdomain discovery tool that gathers results from various online sources without directly interacting with the target.</text:span></text:p>
      <text:p text:style-name="P33"><text:span text:style-name="Strong_20_Emphasis"><text:span text:style-name="T12">Q: </text:span></text:span><text:span text:style-name="Strong_20_Emphasis"><text:span text:style-name="T11">What is the difference between Active reconnaissance and Passive reconnaissance?</text:span></text:span></text:p>
      <text:p text:style-name="P34"><text:span text:style-name="Strong_20_Emphasis"><text:span text:style-name="T12">A:</text:span></text:span> Active reconnaissance involves directly interacting with the target system to gather data, while passive reconnaissance collects information from publicly available sources without touching the target.</text:p>
      <text:p text:style-name="P35"/>
      <text:h text:style-name="P36" text:outline-level="1"><text:soft-page-break/>Active Reconnaissance</text:h>
      <text:h text:style-name="P36" text:outline-level="1"><text:span text:style-name="Strong_20_Emphasis"><text:span text:style-name="T13">Q: </text:span></text:span><text:span text:style-name="Strong_20_Emphasis"><text:span text:style-name="T14">What is active reconnaissance?</text:span></text:span></text:h>
      <text:h text:style-name="P37" text:outline-level="1"><text:span text:style-name="Strong_20_Emphasis"><text:span text:style-name="T13">A:</text:span></text:span><text:span text:style-name="T14"> Active reconnaissance is a cybersecurity phase involving direct interaction with a target system (like port scanning or sending requests) to gather detailed, real-time intelligence that often leaves detectable traces. </text:span></text:h>
      <text:h text:style-name="P37" text:outline-level="1"><text:span text:style-name="Strong_20_Emphasis"><text:span text:style-name="T15">Q: </text:span></text:span><text:span text:style-name="Strong_20_Emphasis"><text:span text:style-name="T16">Why is active reconnaissance important for cyber security?</text:span></text:span></text:h>
      <text:h text:style-name="P37" text:outline-level="1"><text:span text:style-name="Strong_20_Emphasis"><text:span text:style-name="T15">A:</text:span></text:span><text:span text:style-name="T16"> It provides precise, up-to-date data on open services and vulnerabilities, enabling both attackers to find entry points and defenders to validate their external attack surface and patch critical gaps. </text:span></text:h>
      <text:h text:style-name="P37" text:outline-level="1"><text:span text:style-name="Strong_20_Emphasis"><text:span text:style-name="T15">Q: </text:span></text:span><text:span text:style-name="Strong_20_Emphasis"><text:span text:style-name="T16">How can Wappalyzer be used for active reconnaissance?</text:span></text:span></text:h>
      <text:h text:style-name="P37" text:outline-level="1"><text:span text:style-name="Strong_20_Emphasis"><text:span text:style-name="T15">A:</text:span></text:span><text:span text:style-name="T16"> Wappalyzer performs active scanning by analyzing HTTP headers and HTML source code of web pages to fingerprint and identify the specific technology stack, CMS, and software versions in use. </text:span></text:h>
      <text:h text:style-name="P37" text:outline-level="1"><text:span text:style-name="Strong_20_Emphasis"><text:span text:style-name="T15">Q: </text:span></text:span><text:span text:style-name="Strong_20_Emphasis"><text:span text:style-name="T16">What is DNS enumeration?</text:span></text:span></text:h>
      <text:h text:style-name="P37" text:outline-level="1"><text:span text:style-name="Strong_20_Emphasis"><text:span text:style-name="T15">A:</text:span></text:span><text:span text:style-name="T16"> DNS enumeration is the process of querying Domain Name System records to map out network infrastructure, discover subdomains, and identify associated IP addresses and mail servers. </text:span></text:h>
      <text:h text:style-name="P37" text:outline-level="1"><text:span text:style-name="Strong_20_Emphasis"><text:span text:style-name="T15">Q: </text:span></text:span><text:span text:style-name="Strong_20_Emphasis"><text:span text:style-name="T16">How to enumerate SMTPs using command-line tools?</text:span></text:span></text:h>
      <text:h text:style-name="P37" text:outline-level="1"><text:span text:style-name="Strong_20_Emphasis"><text:span text:style-name="T15">A:</text:span></text:span><text:span text:style-name="T16"> You can enumerate SMTP users by running commands like </text:span><text:span text:style-name="Source_20_Text"><text:span text:style-name="T16">telnet [target] 25</text:span></text:span><text:span text:style-name="T16"> followed by </text:span><text:span text:style-name="Source_20_Text"><text:span text:style-name="T16">VRFY [username]</text:span></text:span><text:span text:style-name="T16"> or </text:span><text:span text:style-name="Source_20_Text"><text:span text:style-name="T16">EXPN [list]</text:span></text:span><text:span text:style-name="T16"> to verify if specific accounts exist on the mail server. </text:span></text:h>
      <text:h text:style-name="P37" text:outline-level="1"><text:span text:style-name="Strong_20_Emphasis"><text:span text:style-name="T15">Q: </text:span></text:span><text:span text:style-name="Strong_20_Emphasis"><text:span text:style-name="T16">How should we perform OS fingerprinting?</text:span></text:span></text:h>
      <text:h text:style-name="P37" text:outline-level="1"><text:span text:style-name="Strong_20_Emphasis"><text:span text:style-name="T15">A:</text:span></text:span><text:span text:style-name="T16"> OS fingerprinting is best performed using active tools like Nmap with flags such as </text:span><text:span text:style-name="Source_20_Text"><text:span text:style-name="T16">-O</text:span></text:span><text:span text:style-name="T16"> to analyze TCP/IP stack responses, or passive methods that inspect packet characteristics without direct probing. </text:span></text:h>
      <text:h text:style-name="P37" text:outline-level="1"><text:span text:style-name="Strong_20_Emphasis"><text:span text:style-name="T15">Q: </text:span></text:span><text:span text:style-name="Strong_20_Emphasis"><text:span text:style-name="T16">What is sqlmap? </text:span></text:span><text:span text:style-name="Strong_20_Emphasis"><text:span text:style-name="T16">How to use it?</text:span></text:span><text:span text:style-name="Strong_20_Emphasis"><text:span text:style-name="T16"> </text:span></text:span></text:h>
      <text:h text:style-name="P37" text:outline-level="1"><text:span text:style-name="Strong_20_Emphasis"><text:span text:style-name="T15">A:</text:span></text:span><text:span text:style-name="Strong_20_Emphasis"><text:span text:style-name="T16"> </text:span></text:span><text:span text:style-name="T16">SQLmap is an automated penetration testing tool for detecting and exploiting SQL injection flaws; you typically use it by running a command like </text:span><text:span text:style-name="Source_20_Text"><text:span text:style-name="T16">sqlmap -u "http://target.com/page?id=1"</text:span></text:span><text:span text:style-name="T16"> to test for vulnerabilities.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3T19:02:44.902990489</meta:creation-date>
    <dc:date>2026-06-23T21:57:41.458646889</dc:date>
    <meta:editing-duration>PT48M20S</meta:editing-duration>
    <meta:editing-cycles>31</meta:editing-cycles>
    <meta:generator>LibreOffice/26.2.4.2$Linux_X86_64 LibreOffice_project/f4d82cf4d44730936b3f1a72d05a6253f577d3e9</meta:generator>
    <meta:document-statistic meta:table-count="0" meta:image-count="0" meta:object-count="0" meta:page-count="12" meta:paragraph-count="243" meta:word-count="3618" meta:character-count="23346" meta:non-whitespace-character-count="19955"/>
  </office:meta>
</office:document-meta>
</file>