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ca8a"/>
    </style:style>
    <style:style style:name="P2" style:family="paragraph" style:parent-style-name="Heading_20_1">
      <style:text-properties fo:font-size="14pt" officeooo:paragraph-rsid="001cca8a" style:font-size-asian="14pt" style:font-size-complex="14pt"/>
    </style:style>
    <style:style style:name="P3" style:family="paragraph" style:parent-style-name="Text_20_body">
      <style:text-properties officeooo:paragraph-rsid="001cca8a"/>
    </style:style>
    <style:style style:name="P4" style:family="paragraph" style:parent-style-name="Text_20_body">
      <style:text-properties fo:font-weight="normal" officeooo:paragraph-rsid="001cca8a" style:font-weight-asian="normal" style:font-weight-complex="normal"/>
    </style:style>
    <style:style style:name="P5" style:family="paragraph" style:parent-style-name="Text_20_body">
      <style:text-properties officeooo:paragraph-rsid="00205810"/>
    </style:style>
    <style:style style:name="P6" style:family="paragraph" style:parent-style-name="Text_20_body">
      <style:text-properties fo:font-weight="normal" officeooo:paragraph-rsid="00205810" style:font-weight-asian="normal" style:font-weight-complex="normal"/>
    </style:style>
    <style:style style:name="P7" style:family="paragraph" style:parent-style-name="Text_20_body">
      <style:text-properties officeooo:paragraph-rsid="002175e0"/>
    </style:style>
    <style:style style:name="P8" style:family="paragraph" style:parent-style-name="Text_20_body">
      <style:text-properties fo:font-size="14pt" officeooo:paragraph-rsid="001cca8a" style:font-size-asian="12.25pt" style:font-size-complex="14pt"/>
    </style:style>
    <style:style style:name="P9" style:family="paragraph" style:parent-style-name="Heading_20_1">
      <style:text-properties fo:font-size="14pt" officeooo:paragraph-rsid="001cca8a" style:font-size-asian="12.25pt" style:font-size-complex="14pt"/>
    </style:style>
    <style:style style:name="P10" style:family="paragraph" style:parent-style-name="Text_20_body">
      <style:text-properties fo:font-size="14pt" officeooo:paragraph-rsid="0021e904" style:font-size-asian="12.25pt" style:font-size-complex="14pt"/>
    </style:style>
    <style:style style:name="P11" style:family="paragraph" style:parent-style-name="Text_20_body">
      <style:text-properties fo:font-size="14pt" officeooo:paragraph-rsid="00235860" style:font-size-asian="12.25pt" style:font-size-complex="14pt"/>
    </style:style>
    <style:style style:name="P12" style:family="paragraph" style:parent-style-name="Text_20_body">
      <style:text-properties fo:font-size="14pt" officeooo:paragraph-rsid="0023f109" style:font-size-asian="12.25pt" style:font-size-complex="14pt"/>
    </style:style>
    <style:style style:name="P13" style:family="paragraph" style:parent-style-name="Text_20_body">
      <style:text-properties fo:font-size="14pt" officeooo:paragraph-rsid="00248a50" style:font-size-asian="12.25pt" style:font-size-complex="14pt"/>
    </style:style>
    <style:style style:name="P14" style:family="paragraph" style:parent-style-name="Text_20_body">
      <style:text-properties fo:font-size="14pt" officeooo:paragraph-rsid="0026750e" style:font-size-asian="12.25pt" style:font-size-complex="14pt"/>
    </style:style>
    <style:style style:name="P15" style:family="paragraph" style:parent-style-name="Text_20_body">
      <style:text-properties fo:font-size="14pt" officeooo:paragraph-rsid="0026bc44" style:font-size-asian="12.25pt" style:font-size-complex="14pt"/>
    </style:style>
    <style:style style:name="P16" style:family="paragraph" style:parent-style-name="Text_20_body">
      <style:text-properties fo:font-size="14pt" officeooo:paragraph-rsid="002837df" style:font-size-asian="12.25pt" style:font-size-complex="14pt"/>
    </style:style>
    <style:style style:name="P17" style:family="paragraph" style:parent-style-name="Text_20_body">
      <style:text-properties fo:font-size="14pt" officeooo:paragraph-rsid="0028b115" style:font-size-asian="12.25pt" style:font-size-complex="14pt"/>
    </style:style>
    <style:style style:name="P18" style:family="paragraph" style:parent-style-name="Text_20_body">
      <style:text-properties fo:font-size="12pt" fo:font-weight="normal" officeooo:paragraph-rsid="0028b115" style:font-size-asian="12pt" style:font-weight-asian="normal" style:font-size-complex="12pt" style:font-weight-complex="normal"/>
    </style:style>
    <style:style style:name="P19" style:family="paragraph" style:parent-style-name="Heading_20_1">
      <style:text-properties fo:font-size="14pt" officeooo:paragraph-rsid="002b0b91" style:font-size-asian="12.25pt" style:font-size-complex="14pt"/>
    </style:style>
    <style:style style:name="P20" style:family="paragraph" style:parent-style-name="Text_20_body">
      <style:text-properties fo:font-size="14pt" officeooo:paragraph-rsid="002b0b91" style:font-size-asian="12.25pt" style:font-size-complex="14pt"/>
    </style:style>
    <style:style style:name="P21" style:family="paragraph" style:parent-style-name="Text_20_body">
      <style:text-properties officeooo:paragraph-rsid="002cd1e3"/>
    </style:style>
    <style:style style:name="P22" style:family="paragraph" style:parent-style-name="Text_20_body">
      <style:text-properties fo:font-weight="normal" officeooo:paragraph-rsid="002cd1e3" style:font-weight-asian="normal" style:font-weight-complex="normal"/>
    </style:style>
    <style:style style:name="P23" style:family="paragraph" style:parent-style-name="Text_20_body">
      <style:text-properties officeooo:paragraph-rsid="002dba7b"/>
    </style:style>
    <style:style style:name="P24" style:family="paragraph" style:parent-style-name="Text_20_body">
      <style:text-properties fo:font-weight="normal" officeooo:paragraph-rsid="002dba7b" style:font-weight-asian="normal" style:font-weight-complex="normal"/>
    </style:style>
    <style:style style:name="T1" style:family="text">
      <style:text-properties fo:font-weight="bold" officeooo:rsid="001cca8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205810" style:font-weight-asian="bold" style:font-weight-complex="bold"/>
    </style:style>
    <style:style style:name="T4" style:family="text">
      <style:text-properties fo:font-weight="bold" officeooo:rsid="002175e0" style:font-weight-asian="bold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officeooo:rsid="0021e90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3586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3f109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48a5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6750e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6bc44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837df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8b115" style:font-size-asian="12pt" style:font-weight-asian="bold" style:font-size-complex="12pt" style:font-weight-complex="bold"/>
    </style:style>
    <style:style style:name="T15" style:family="text">
      <style:text-properties fo:font-weight="bold" officeooo:rsid="0028b115" style:font-weight-asian="bold" style:font-weight-complex="bold"/>
    </style:style>
    <style:style style:name="T16" style:family="text">
      <style:text-properties fo:font-size="12pt" fo:font-weight="bold" officeooo:rsid="002b0b91" style:font-size-asian="10.5pt" style:font-weight-asian="bold" style:font-size-complex="12pt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weight="bold" officeooo:rsid="002b0b91" style:font-weight-asian="bold" style:font-weight-complex="bold"/>
    </style:style>
    <style:style style:name="T19" style:family="text">
      <style:text-properties fo:font-weight="bold" officeooo:rsid="002cd1e3" style:font-weight-asian="bold" style:font-weight-complex="bold"/>
    </style:style>
    <style:style style:name="T20" style:family="text">
      <style:text-properties fo:font-weight="normal" officeooo:rsid="002cd1e3" style:font-weight-asian="normal" style:font-weight-complex="normal"/>
    </style:style>
    <style:style style:name="T21" style:family="text">
      <style:text-properties fo:font-weight="bold" officeooo:rsid="002dba7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learningobjectives"/>Learning Objectives</text:h>
      <text:h text:style-name="P2" text:outline-level="1">Nmap Live Host Discovery</text:h>
      <text:p text:style-name="P3"><text:span text:style-name="Strong_20_Emphasis"><text:span text:style-name="T1">Q: </text:span></text:span><text:span text:style-name="Strong_20_Emphasis"><text:span text:style-name="T2">What is Nmap?</text:span></text:span></text:p>
      <text:p text:style-name="P4"><text:span text:style-name="T1">A:</text:span> Network Scanner used for discovery and security auditing of networks.</text:p>
      <text:p text:style-name="P3"><text:span text:style-name="Strong_20_Emphasis"><text:span text:style-name="T1">Q: </text:span></text:span><text:span text:style-name="Strong_20_Emphasis"><text:span text:style-name="T2">How to use Nmap?</text:span></text:span></text:p>
      <text:p text:style-name="P3"><text:span text:style-name="T1">A:</text:span><text:span text:style-name="T2"> Run </text:span><text:span text:style-name="Source_20_Text"><text:span text:style-name="T2">nmap [options] [target]</text:span></text:span><text:span text:style-name="T2"> in terminal/command line.</text:span></text:p>
      <text:p text:style-name="P3"><text:span text:style-name="Strong_20_Emphasis"><text:span text:style-name="T1">Q: </text:span></text:span><text:span text:style-name="Strong_20_Emphasis"><text:span text:style-name="T2">How does Nmap scan work?</text:span></text:span></text:p>
      <text:p text:style-name="P4"><text:span text:style-name="T1">A:</text:span> Sends packets to targets and analyzes responses to map network characteristics.</text:p>
      <text:p text:style-name="P5"><text:span text:style-name="Strong_20_Emphasis"><text:span text:style-name="T3">Q: </text:span></text:span><text:span text:style-name="Strong_20_Emphasis"><text:span text:style-name="T2">What is Subnetworks?</text:span></text:span></text:p>
      <text:p text:style-name="P6"><text:span text:style-name="T3">A:</text:span> Networks divided into smaller segments using subnet masks for better organization and security.</text:p>
      <text:p text:style-name="P5"><text:span text:style-name="Strong_20_Emphasis"><text:span text:style-name="T3">Q: </text:span></text:span><text:span text:style-name="Strong_20_Emphasis"><text:span text:style-name="T2">How to enumerate Targets?</text:span></text:span></text:p>
      <text:p text:style-name="P5"><text:span text:style-name="T3">A:</text:span><text:span text:style-name="T2"> Use ping scans (</text:span><text:span text:style-name="Source_20_Text"><text:span text:style-name="T2">-sn</text:span></text:span><text:span text:style-name="T2">), ARP scans, or port scans to discover live hosts.</text:span></text:p>
      <text:p text:style-name="P5"><text:span text:style-name="Strong_20_Emphasis"><text:span text:style-name="T3">Q: </text:span></text:span><text:span text:style-name="Strong_20_Emphasis"><text:span text:style-name="T2">What is ARP Scan?</text:span></text:span></text:p>
      <text:p text:style-name="P6"><text:span text:style-name="T3">A:</text:span> Sends ARP requests to local network devices to identify active IP-MAC mappings.</text:p>
      <text:p text:style-name="P5"><text:span text:style-name="Strong_20_Emphasis"><text:span text:style-name="T3">Q: </text:span></text:span><text:span text:style-name="Strong_20_Emphasis"><text:span text:style-name="T2">What is ICMP Echo Scan?</text:span></text:span></text:p>
      <text:p text:style-name="P6"><text:span text:style-name="T3">A:</text:span> Sends ICMP echo request (ping) packets to check if hosts respond.</text:p>
      <text:p text:style-name="P5"><text:span text:style-name="Strong_20_Emphasis"><text:span text:style-name="T3">Q: </text:span></text:span><text:span text:style-name="Strong_20_Emphasis"><text:span text:style-name="T2">What is ICMP Timestamp Scan?</text:span></text:span></text:p>
      <text:p text:style-name="P6"><text:span text:style-name="T3">A:</text:span> Sends ICMP timestamp requests to gather timing information from hosts.</text:p>
      <text:p text:style-name="P5"><text:span text:style-name="Strong_20_Emphasis"><text:span text:style-name="T3">Q: </text:span></text:span><text:span text:style-name="Strong_20_Emphasis"><text:span text:style-name="T2">What is ICMP Address Mask Scan?</text:span></text:span></text:p>
      <text:p text:style-name="P6"><text:span text:style-name="T3">A:</text:span> Queries hosts for their netmask/subnet configuration via ICMP.</text:p>
      <text:p text:style-name="P5"><text:span text:style-name="Strong_20_Emphasis"><text:span text:style-name="T3">Q: </text:span></text:span><text:span text:style-name="Strong_20_Emphasis"><text:span text:style-name="T2">What is TCP SYN Ping Scan?</text:span></text:span></text:p>
      <text:p text:style-name="P6"><text:span text:style-name="T3">A:</text:span> Sends SYN packets to ports; response indicates live hosts without completing handshakes.</text:p>
      <text:p text:style-name="P5"><text:span text:style-name="Strong_20_Emphasis"><text:span text:style-name="T3">Q: </text:span></text:span><text:span text:style-name="Strong_20_Emphasis"><text:span text:style-name="T2">What is TCP ACK Ping Scan?</text:span></text:span></text:p>
      <text:p text:style-name="P6"><text:span text:style-name="T3">A:</text:span> Uses ACK packets to probe firewall rules and determine host status.</text:p>
      <text:p text:style-name="P5"><text:span text:style-name="Strong_20_Emphasis"><text:span text:style-name="T3">Q: </text:span></text:span><text:span text:style-name="Strong_20_Emphasis"><text:span text:style-name="T2">What is UDP Ping Scan?</text:span></text:span></text:p>
      <text:p text:style-name="P6"><text:span text:style-name="T3">A:</text:span> Sends UDP packets to closed/filtered ports to detect live systems.</text:p>
      <text:p text:style-name="P5"><text:span text:style-name="Strong_20_Emphasis"><text:span text:style-name="T3">Q: </text:span></text:span><text:span text:style-name="Strong_20_Emphasis"><text:span text:style-name="T2">What can Nmap detect?</text:span></text:span></text:p>
      <text:p text:style-name="P6"><text:span text:style-name="T3">A:</text:span> Live hosts, open ports, running services, OS versions, vulnerabilities, and firewall configurations.</text:p>
      <text:p text:style-name="P5"><text:span text:style-name="Strong_20_Emphasis"><text:span text:style-name="T3">Q: </text:span></text:span><text:span text:style-name="Strong_20_Emphasis"><text:span text:style-name="T2">How to scan an IP address with Nmap?</text:span></text:span></text:p>
      <text:p text:style-name="P5"><text:span text:style-name="T3">A:</text:span><text:span text:style-name="T2"> Simply type </text:span><text:span text:style-name="Source_20_Text"><text:span text:style-name="T2">nmap 192.168.1.1</text:span></text:span><text:span text:style-name="T2"> replacing with target IP.</text:span></text:p>
      <text:p text:style-name="P7"><text:soft-page-break/><text:span text:style-name="Strong_20_Emphasis"><text:span text:style-name="T4">Q: </text:span></text:span><text:span text:style-name="Strong_20_Emphasis"><text:span text:style-name="T2">How to check ports with Nmap?</text:span></text:span></text:p>
      <text:p text:style-name="P7"><text:span text:style-name="T4">A:</text:span><text:span text:style-name="T2"> Use </text:span><text:span text:style-name="Source_20_Text"><text:span text:style-name="T2">-p [port]</text:span></text:span><text:span text:style-name="T2"> flag like </text:span><text:span text:style-name="Source_20_Text"><text:span text:style-name="T2">nmap -p 80,443 192.168.1.1</text:span></text:span><text:span text:style-name="T2">.</text:span></text:p>
      <text:p text:style-name="P8"><text:span text:style-name="Strong_20_Emphasis"><text:span text:style-name="T5"/></text:span></text:p>
      <text:h text:style-name="P9" text:outline-level="1"><text:span text:style-name="Strong_20_Emphasis"><text:span text:style-name="T6">Python for Cybersecurity</text:span></text:span></text:h>
      <text:p text:style-name="P10"><text:span text:style-name="Strong_20_Emphasis"><text:span text:style-name="T7">Q: </text:span></text:span><text:span text:style-name="Strong_20_Emphasis"><text:span text:style-name="T5">What is the correct way to write a Python script with proper syntax?</text:span></text:span><text:span text:style-name="T5"> -</text:span></text:p>
      <text:p text:style-name="P10"><text:span text:style-name="T7">A:</text:span><text:span text:style-name="T5"> Use valid indentation, proper keywords, and end statements with newlines or semicolons.</text:span></text:p>
      <text:p text:style-name="P10"><text:span text:style-name="Strong_20_Emphasis"><text:span text:style-name="T7">Q: </text:span></text:span><text:span text:style-name="Strong_20_Emphasis"><text:span text:style-name="T5">What are variables, data types, and operators used for in Python?</text:span></text:span></text:p>
      <text:p text:style-name="P10"><text:span text:style-name="T7">A:</text:span><text:span text:style-name="T5"> They store data, define data structures, and perform logical or arithmetic operations.</text:span></text:p>
      <text:p text:style-name="P10"><text:span text:style-name="Strong_20_Emphasis"><text:span text:style-name="T7">Q: </text:span></text:span><text:span text:style-name="Strong_20_Emphasis"><text:span text:style-name="T5">What conditions would you use to implement if, elif, and else statements?</text:span></text:span></text:p>
      <text:p text:style-name="P10"><text:span text:style-name="T7">A:</text:span><text:span text:style-name="T5"> Use </text:span><text:span text:style-name="Source_20_Text"><text:span text:style-name="T5">if</text:span></text:span><text:span text:style-name="T5"> for primary checks, </text:span><text:span text:style-name="Source_20_Text"><text:span text:style-name="T5">elif</text:span></text:span><text:span text:style-name="T5"> for additional conditions, and </text:span><text:span text:style-name="Source_20_Text"><text:span text:style-name="T5">else</text:span></text:span><text:span text:style-name="T5"> for fallback cases.</text:span></text:p>
      <text:p text:style-name="P10"><text:span text:style-name="Strong_20_Emphasis"><text:span text:style-name="T7">Q: </text:span></text:span><text:span text:style-name="Strong_20_Emphasis"><text:span text:style-name="T5">What is the difference between a for loop and a while loop, and when do you use each?</text:span></text:span></text:p>
      <text:p text:style-name="P10"><text:span text:style-name="T7">A:</text:span><text:span text:style-name="T5"> Use </text:span><text:span text:style-name="Source_20_Text"><text:span text:style-name="T5">for</text:span></text:span><text:span text:style-name="T5"> for iterating over sequences and </text:span><text:span text:style-name="Source_20_Text"><text:span text:style-name="T5">while</text:span></text:span><text:span text:style-name="T5"> for repeating until a condition changes.</text:span></text:p>
      <text:p text:style-name="P10"><text:span text:style-name="Strong_20_Emphasis"><text:span text:style-name="T7">Q: </text:span></text:span><text:span text:style-name="Strong_20_Emphasis"><text:span text:style-name="T5">What is a function in Python, and how do you define and call it with parameters and return values?</text:span></text:span></text:p>
      <text:p text:style-name="P10"><text:span text:style-name="T7">A:</text:span><text:span text:style-name="T5"> A reusable block defined with </text:span><text:span text:style-name="Source_20_Text"><text:span text:style-name="T5">def</text:span></text:span><text:span text:style-name="T5"> that accepts inputs (parameters) and sends back results (</text:span><text:span text:style-name="Source_20_Text"><text:span text:style-name="T5">return</text:span></text:span><text:span text:style-name="T5">).</text:span></text:p>
      <text:p text:style-name="P10"><text:span text:style-name="Strong_20_Emphasis"><text:span text:style-name="T7">Q: </text:span></text:span><text:span text:style-name="Strong_20_Emphasis"><text:span text:style-name="T5">What is the socket module used for, and how do you import and use it in a script?</text:span></text:span></text:p>
      <text:p text:style-name="P10"><text:span text:style-name="T7">A:</text:span><text:span text:style-name="T5"> It handles network communication; import with </text:span><text:span text:style-name="Source_20_Text"><text:span text:style-name="T5">import socket</text:span></text:span><text:span text:style-name="T5"> and create connections via </text:span><text:span text:style-name="Source_20_Text"><text:span text:style-name="T5">socket.socket()</text:span></text:span><text:span text:style-name="T5">.</text:span></text:p>
      <text:p text:style-name="P10"><text:span text:style-name="Strong_20_Emphasis"><text:span text:style-name="T7">Q: </text:span></text:span><text:span text:style-name="Strong_20_Emphasis"><text:span text:style-name="T5">What are Python's built-in functions like input(), print(), len(), and open() used for?</text:span></text:span></text:p>
      <text:p text:style-name="P10"><text:span text:style-name="T7">A:</text:span><text:span text:style-name="T5"> They handle user input, output, length calculation, and file access respectively.</text:span></text:p>
      <text:p text:style-name="P10"><text:span text:style-name="Strong_20_Emphasis"><text:span text:style-name="T7">Q: </text:span></text:span><text:span text:style-name="Strong_20_Emphasis"><text:span text:style-name="T5">What do string methods such as .strip(), .split(), and .format() allow you to do?</text:span></text:span><text:span text:style-name="T5"> </text:span></text:p>
      <text:p text:style-name="P11"><text:span text:style-name="T7">A:</text:span><text:span text:style-name="T5"> They remove whitespace, divide strings into lists, and insert values into templates.</text:span></text:p>
      <text:p text:style-name="P11"><text:span text:style-name="Strong_20_Emphasis"><text:span text:style-name="T8">Q: </text:span></text:span><text:span text:style-name="Strong_20_Emphasis"><text:span text:style-name="T5">What operations can you perform on Python lists?</text:span></text:span></text:p>
      <text:p text:style-name="P12"><text:span text:style-name="T8">A:</text:span><text:span text:style-name="T5"> Append, extend, remove, slice, sort, and iterate over list elements.</text:span></text:p>
      <text:p text:style-name="P12"><text:span text:style-name="Strong_20_Emphasis"><text:span text:style-name="T9">Q: </text:span></text:span><text:span text:style-name="Strong_20_Emphasis"><text:span text:style-name="T5">What command do you use to install Python packages using pip?</text:span></text:span></text:p>
      <text:p text:style-name="P13"><text:span text:style-name="T9">A:</text:span><text:span text:style-name="T5"> Run </text:span><text:span text:style-name="Source_20_Text"><text:span text:style-name="T5">pip install package_name</text:span></text:span><text:span text:style-name="T5"> in the terminal.</text:span></text:p>
      <text:p text:style-name="P13"><text:span text:style-name="Strong_20_Emphasis"><text:span text:style-name="T10">Q: </text:span></text:span><text:span text:style-name="Strong_20_Emphasis"><text:span text:style-name="T5">What steps are needed to import and use external modules such as dnspython, requests, or beautifulsoup4?</text:span></text:span></text:p>
      <text:p text:style-name="P13"><text:span text:style-name="T10">A:</text:span><text:span text:style-name="T5"> Install via pip, then use </text:span><text:span text:style-name="Source_20_Text"><text:span text:style-name="T5">import module_name</text:span></text:span><text:span text:style-name="T5"> at the top of your script.</text:span></text:p>
      <text:p text:style-name="P13"><text:span text:style-name="Strong_20_Emphasis"><text:span text:style-name="T10">Q: </text:span></text:span><text:span text:style-name="Strong_20_Emphasis"><text:span text:style-name="T5">What should you look for when reading and understanding Python library documentation?</text:span></text:span></text:p>
      <text:p text:style-name="P14"><text:span text:style-name="T10">A:</text:span><text:span text:style-name="T5"> Look for usage examples, parameter descriptions, return values, and installation instructions.</text:span></text:p>
      <text:p text:style-name="P14"><text:soft-page-break/><text:span text:style-name="Strong_20_Emphasis"><text:span text:style-name="T11">Q: </text:span></text:span><text:span text:style-name="Strong_20_Emphasis"><text:span text:style-name="T5">What is the proper way to use third-party APIs effectively in Python scripts?</text:span></text:span></text:p>
      <text:p text:style-name="P14"><text:span text:style-name="T11">A:</text:span><text:span text:style-name="T5"> Authenticate properly, handle errors, respect rate limits, and parse responses correctly.</text:span></text:p>
      <text:p text:style-name="P14"><text:span text:style-name="Strong_20_Emphasis"><text:span text:style-name="T11">Q: </text:span></text:span><text:span text:style-name="Strong_20_Emphasis"><text:span text:style-name="T5">What methods can you use to read text files using open() and context managers?</text:span></text:span></text:p>
      <text:p text:style-name="P14"><text:span text:style-name="T11">A:</text:span><text:span text:style-name="T5"> Use </text:span><text:span text:style-name="Source_20_Text"><text:span text:style-name="T5">with open('file.txt') as f:</text:span></text:span><text:span text:style-name="T5"> followed by </text:span><text:span text:style-name="Source_20_Text"><text:span text:style-name="T5">.read()</text:span></text:span><text:span text:style-name="T5"> or </text:span><text:span text:style-name="Source_20_Text"><text:span text:style-name="T5">.readline()</text:span></text:span><text:span text:style-name="T5">.</text:span></text:p>
      <text:p text:style-name="P14"><text:span text:style-name="Strong_20_Emphasis"><text:span text:style-name="T11">Q: </text:span></text:span><text:span text:style-name="Strong_20_Emphasis"><text:span text:style-name="T5">What are the correct techniques to write data to files in Python?</text:span></text:span></text:p>
      <text:p text:style-name="P14"><text:span text:style-name="T11">A:</text:span><text:span text:style-name="T5"> Open files in write (</text:span><text:span text:style-name="Source_20_Text"><text:span text:style-name="T5">'w'</text:span></text:span><text:span text:style-name="T5">) or append (</text:span><text:span text:style-name="Source_20_Text"><text:span text:style-name="T5">'a'</text:span></text:span><text:span text:style-name="T5">) mode and use </text:span><text:span text:style-name="Source_20_Text"><text:span text:style-name="T5">.write()</text:span></text:span><text:span text:style-name="T5"> or </text:span><text:span text:style-name="Source_20_Text"><text:span text:style-name="T5">.writelines()</text:span></text:span><text:span text:style-name="T5">.</text:span></text:p>
      <text:p text:style-name="P14"><text:span text:style-name="Strong_20_Emphasis"><text:span text:style-name="T11">Q: </text:span></text:span><text:span text:style-name="Strong_20_Emphasis"><text:span text:style-name="T5">What is the right way to parse file content line by line?</text:span></text:span></text:p>
      <text:p text:style-name="P14"><text:span text:style-name="T11">A:</text:span><text:span text:style-name="T5"> Iterate over the file object directly inside a </text:span><text:span text:style-name="Source_20_Text"><text:span text:style-name="T5">with</text:span></text:span><text:span text:style-name="T5"> block.</text:span></text:p>
      <text:p text:style-name="P14"><text:span text:style-name="Strong_20_Emphasis"><text:span text:style-name="T11">Q: </text:span></text:span><text:span text:style-name="Strong_20_Emphasis"><text:span text:style-name="T5">What are the file modes ('r', 'w', 'a'), and what is each one used for?</text:span></text:span></text:p>
      <text:p text:style-name="P14"><text:span text:style-name="T11">A:</text:span><text:span text:style-name="T5"> </text:span><text:span text:style-name="Source_20_Text"><text:span text:style-name="T5">'r'</text:span></text:span><text:span text:style-name="T5"> reads, </text:span><text:span text:style-name="Source_20_Text"><text:span text:style-name="T5">'w'</text:span></text:span><text:span text:style-name="T5"> overwrites/writes, and </text:span><text:span text:style-name="Source_20_Text"><text:span text:style-name="T5">'a'</text:span></text:span><text:span text:style-name="T5"> appends to a file.</text:span></text:p>
      <text:p text:style-name="P14"><text:span text:style-name="Strong_20_Emphasis"><text:span text:style-name="T11">Q: </text:span></text:span><text:span text:style-name="Strong_20_Emphasis"><text:span text:style-name="T5">How do you resolve a domain to an IP address in Python?</text:span></text:span></text:p>
      <text:p text:style-name="P15"><text:span text:style-name="T12">A</text:span><text:span text:style-name="T11">:</text:span><text:span text:style-name="T5"> Use </text:span><text:span text:style-name="Source_20_Text"><text:span text:style-name="T5">socket.gethostbyname('domain.com')</text:span></text:span><text:span text:style-name="T5">.</text:span></text:p>
      <text:p text:style-name="P15"><text:span text:style-name="Strong_20_Emphasis"><text:span text:style-name="T12">Q: </text:span></text:span><text:span text:style-name="Strong_20_Emphasis"><text:span text:style-name="T5">What is socket.gethostbyname() used for?</text:span></text:span></text:p>
      <text:p text:style-name="P15"><text:span text:style-name="T12">A:</text:span><text:span text:style-name="T5"> It converts a hostname string into its corresponding IP address.</text:span></text:p>
      <text:p text:style-name="P15"><text:span text:style-name="Strong_20_Emphasis"><text:span text:style-name="T12">Q: </text:span></text:span><text:span text:style-name="Strong_20_Emphasis"><text:span text:style-name="T5">What library do you use for advanced DNS queries?</text:span></text:span></text:p>
      <text:p text:style-name="P16"><text:span text:style-name="T12">A:</text:span><text:span text:style-name="T5"> Use </text:span><text:span text:style-name="Source_20_Text"><text:span text:style-name="T5">dnspython</text:span></text:span><text:span text:style-name="T5"> for resolving various DNS record types beyond basic IP mapping.</text:span></text:p>
      <text:p text:style-name="P16"><text:span text:style-name="Strong_20_Emphasis"><text:span text:style-name="T13">Q: </text:span></text:span><text:span text:style-name="Strong_20_Emphasis"><text:span text:style-name="T5">How do you make an HTTP GET request in Python?</text:span></text:span></text:p>
      <text:p text:style-name="P17"><text:span text:style-name="T13">A:</text:span><text:span text:style-name="T5"> Use </text:span><text:span text:style-name="Source_20_Text"><text:span text:style-name="T5">requests.get('url')</text:span></text:span><text:span text:style-name="T5"> from the </text:span><text:span text:style-name="Source_20_Text"><text:span text:style-name="T5">requests</text:span></text:span><text:span text:style-name="T5"> library.</text:span></text:p>
      <text:p text:style-name="P17"><text:span text:style-name="T14">Q: </text:span><text:span text:style-name="Strong_20_Emphasis"><text:span text:style-name="T5">What library do you use for HTTP requests in Python?</text:span></text:span></text:p>
      <text:p text:style-name="P17"><text:span text:style-name="T14">A:</text:span><text:span text:style-name="T5"> The </text:span><text:span text:style-name="Source_20_Text"><text:span text:style-name="T5">requests</text:span></text:span><text:span text:style-name="T5"> library is the standard choice.</text:span></text:p>
      <text:p text:style-name="P17"><text:span text:style-name="Strong_20_Emphasis"><text:span text:style-name="T14">Q: </text:span></text:span><text:span text:style-name="Strong_20_Emphasis"><text:span text:style-name="T5">How do you access response headers in Python?</text:span></text:span></text:p>
      <text:p text:style-name="P17"><text:span text:style-name="T14">A:</text:span><text:span text:style-name="T5"> Access them via </text:span><text:span text:style-name="Source_20_Text"><text:span text:style-name="T5">response.headers['Header-Name']</text:span></text:span><text:span text:style-name="T5"> after making a request.</text:span></text:p>
      <text:p text:style-name="P17"><text:span text:style-name="Strong_20_Emphasis"><text:span text:style-name="T14">Q: </text:span></text:span><text:span text:style-name="Strong_20_Emphasis"><text:span text:style-name="T5">How do you check if a port is open in Python?</text:span></text:span></text:p>
      <text:p text:style-name="P17"><text:span text:style-name="T14">A:</text:span><text:span text:style-name="T5"> Attempt a connection with </text:span><text:span text:style-name="Source_20_Text"><text:span text:style-name="T5">socket.connect_ex((ip, port))</text:span></text:span><text:span text:style-name="T5"> and check for 0.</text:span></text:p>
      <text:p text:style-name="P17"><text:span text:style-name="Strong_20_Emphasis"><text:span text:style-name="T14">Q: </text:span></text:span><text:span text:style-name="Strong_20_Emphasis"><text:span text:style-name="T5">What does socket.connect_ex() return for an open port?</text:span></text:span></text:p>
      <text:p text:style-name="P17"><text:span text:style-name="T14">A:</text:span><text:span text:style-name="T5"> It returns </text:span><text:span text:style-name="Source_20_Text"><text:span text:style-name="T5">0</text:span></text:span><text:span text:style-name="T5"> if the port is open and accessible.</text:span></text:p>
      <text:p text:style-name="P17"><text:span text:style-name="Strong_20_Emphasis"><text:span text:style-name="T14">Q: </text:span></text:span><text:span text:style-name="Strong_20_Emphasis"><text:span text:style-name="T5">What library is used to parse HTML in Python?</text:span></text:span></text:p>
      <text:p text:style-name="P17"><text:span text:style-name="T14">A:</text:span><text:span text:style-name="T5"> </text:span><text:span text:style-name="Source_20_Text"><text:span text:style-name="T5">BeautifulSoup</text:span></text:span><text:span text:style-name="T5"> from the </text:span><text:span text:style-name="Source_20_Text"><text:span text:style-name="T5">bs4</text:span></text:span><text:span text:style-name="T5"> package is commonly used.</text:span></text:p>
      <text:p text:style-name="P17"><text:span text:style-name="Strong_20_Emphasis"><text:span text:style-name="T14">Q: </text:span></text:span><text:span text:style-name="Strong_20_Emphasis"><text:span text:style-name="T5">What is BeautifulSoup used for?</text:span></text:span></text:p>
      <text:p text:style-name="P17"><text:span text:style-name="T14">A:</text:span><text:span text:style-name="T5"> It parses HTML/XML documents to extract and navigate data easily.</text:span></text:p>
      <text:p text:style-name="P17"><text:span text:style-name="Strong_20_Emphasis"><text:span text:style-name="T14">Q: </text:span></text:span><text:span text:style-name="Strong_20_Emphasis"><text:span text:style-name="T5">What does .prettify() do?</text:span></text:span></text:p>
      <text:p text:style-name="P17"><text:soft-page-break/><text:span text:style-name="T14">A:</text:span><text:span text:style-name="T5"> It formats the parsed HTML string with proper indentation for readability.</text:span></text:p>
      <text:p text:style-name="P17"><text:span text:style-name="T14">Q: </text:span><text:span text:style-name="Strong_20_Emphasis"><text:span text:style-name="T5">What is web scraping?</text:span></text:span></text:p>
      <text:p text:style-name="P17"><text:span text:style-name="T14">A:</text:span><text:span text:style-name="T5"> Extracting data from websites automatically using code.</text:span></text:p>
      <text:p text:style-name="P17"><text:span text:style-name="Strong_20_Emphasis"><text:span text:style-name="T14">Q: </text:span></text:span><text:span text:style-name="Strong_20_Emphasis"><text:span text:style-name="T5">What is web crawling?</text:span></text:span></text:p>
      <text:p text:style-name="P17"><text:span text:style-name="T14">A:</text:span><text:span text:style-name="T5"> Systematically browsing the web to index pages or gather links recursively.</text:span></text:p>
      <text:p text:style-name="P17"><text:span text:style-name="T14">Q: </text:span><text:span text:style-name="Strong_20_Emphasis"><text:span text:style-name="T5">What is recursion and how is it used in web crawling?</text:span></text:span></text:p>
      <text:p text:style-name="P18"><text:span text:style-name="T15">A:</text:span> Recursion is a function calling itself; in crawling, it follows links repeatedly to explore sites.</text:p>
      <text:h text:style-name="P19" text:outline-level="1"><text:span text:style-name="Strong_20_Emphasis"><text:span text:style-name="T6">Python for Cybersecurity</text:span></text:span></text:h>
      <text:p text:style-name="P20"><text:span text:style-name="Strong_20_Emphasis"><text:span text:style-name="T16">Q: </text:span></text:span><text:span text:style-name="Strong_20_Emphasis"><text:span text:style-name="T17">What is packet capture and why is it important?</text:span></text:span></text:p>
      <text:p text:style-name="P20"><text:span text:style-name="Strong_20_Emphasis"><text:span text:style-name="T16">A:</text:span></text:span><text:span text:style-name="Strong_20_Emphasis"><text:span text:style-name="T17"> Intercepting and logging network traffic for troubleshooting, security analysis, and monitoring.</text:span></text:span></text:p>
      <text:p text:style-name="P21"><text:span text:style-name="Strong_20_Emphasis"><text:span text:style-name="T18">Q: </text:span></text:span><text:span text:style-name="Strong_20_Emphasis"><text:span text:style-name="T2">How does Wireshark display and dissect network packets?</text:span></text:span></text:p>
      <text:p text:style-name="P22"><text:span text:style-name="T19">A:</text:span> It decodes each packet's protocols layer by layer, showing headers, flags, and payloads in a structured tree view.</text:p>
      <text:p text:style-name="P21"><text:span text:style-name="Strong_20_Emphasis"><text:span text:style-name="T19">Q: </text:span></text:span><text:span text:style-name="Strong_20_Emphasis"><text:span text:style-name="T2">What is the difference between capture filters and display filters?</text:span></text:span></text:p>
      <text:p text:style-name="P21"><text:span text:style-name="T19">A:</text:span><text:span text:style-name="T2"> Capture filters (BPF syntax) discard unwanted packets </text:span><text:span text:style-name="Emphasis"><text:span text:style-name="T2">during</text:span></text:span><text:span text:style-name="T2"> collection; display filters filter visibility </text:span><text:span text:style-name="Emphasis"><text:span text:style-name="T2">after</text:span></text:span><text:span text:style-name="T2"> capture without losing data.</text:span></text:p>
      <text:p text:style-name="P21"><text:span text:style-name="Strong_20_Emphasis"><text:span text:style-name="T19">Q</text:span></text:span><text:span text:style-name="Strong_20_Emphasis"><text:span text:style-name="T19">:</text:span></text:span><text:span text:style-name="Strong_20_Emphasis"><text:span text:style-name="T20"> </text:span></text:span><text:span text:style-name="Strong_20_Emphasis"><text:span text:style-name="T2">How do you follow TCP streams in Wireshark?</text:span></text:span></text:p>
      <text:p text:style-name="P22"><text:span text:style-name="T19">A:</text:span> Right-click a packet → Follow → TCP Stream to reconstruct the full conversation between hosts.</text:p>
      <text:p text:style-name="P21"><text:span text:style-name="Strong_20_Emphasis"><text:span text:style-name="T19">Q: </text:span></text:span><text:span text:style-name="Strong_20_Emphasis"><text:span text:style-name="T2">What is tcpdump and when should you use it over Wireshark?</text:span></text:span></text:p>
      <text:p text:style-name="P22"><text:span text:style-name="T19">A:</text:span> A CLI packet analyzer ideal for headless servers, remote capture, or scripted automation where a GUI isn't available.</text:p>
      <text:p text:style-name="P21"><text:span text:style-name="Strong_20_Emphasis"><text:span text:style-name="T19">Q: </text:span></text:span><text:span text:style-name="Strong_20_Emphasis"><text:span text:style-name="T2">How do you construct effective tcpdump filter expressions?</text:span></text:span></text:p>
      <text:p text:style-name="P21"><text:span text:style-name="T19">A:</text:span><text:span text:style-name="T2"> Use BPF syntax combining primitives like </text:span><text:span text:style-name="Source_20_Text"><text:span text:style-name="T2">host</text:span></text:span><text:span text:style-name="T2">, </text:span><text:span text:style-name="Source_20_Text"><text:span text:style-name="T2">port</text:span></text:span><text:span text:style-name="T2">, </text:span><text:span text:style-name="Source_20_Text"><text:span text:style-name="T2">proto</text:span></text:span><text:span text:style-name="T2">, and logical operators (</text:span><text:span text:style-name="Source_20_Text"><text:span text:style-name="T2">and</text:span></text:span><text:span text:style-name="T2">, </text:span><text:span text:style-name="Source_20_Text"><text:span text:style-name="T2">or</text:span></text:span><text:span text:style-name="T2">, </text:span><text:span text:style-name="Source_20_Text"><text:span text:style-name="T2">not</text:span></text:span><text:span text:style-name="T2">).</text:span></text:p>
      <text:p text:style-name="P21"><text:span text:style-name="Strong_20_Emphasis"><text:span text:style-name="T19">Q: </text:span></text:span><text:span text:style-name="Strong_20_Emphasis"><text:span text:style-name="T2">What are common indicators of network anomalies?</text:span></text:span></text:p>
      <text:p text:style-name="P22"><text:span text:style-name="T19">A:</text:span> Unusual traffic volumes, unexpected ports/protocols, repeated connection attempts, and abnormal DNS lookups.</text:p>
      <text:p text:style-name="P23"><text:span text:style-name="Strong_20_Emphasis"><text:span text:style-name="T21">Q: </text:span></text:span><text:span text:style-name="Strong_20_Emphasis"><text:span text:style-name="T2">How can you identify unauthorized connections in packet captures?</text:span></text:span></text:p>
      <text:p text:style-name="P24"><text:span text:style-name="T21">A:</text:span> Look for traffic to unknown IPs/domains, unexpected ports, odd communication times, or unrecognized protocols.</text:p>
      <text:p text:style-name="P23"><text:span text:style-name="Strong_20_Emphasis"><text:span text:style-name="T21">Q: </text:span></text:span><text:span text:style-name="Strong_20_Emphasis"><text:span text:style-name="T2">What tools does Wireshark provide for traffic statistics?</text:span></text:span></text:p>
      <text:p text:style-name="P24"><text:span text:style-name="T21">A:</text:span> Conversations, Endpoints, Protocol Hierarchy, IO Graphs, and Flow Graphs under the Statistics menu.</text:p>
      <text:p text:style-name="P23"><text:soft-page-break/><text:span text:style-name="Strong_20_Emphasis"><text:span text:style-name="T21">Q: </text:span></text:span><text:span text:style-name="Strong_20_Emphasis"><text:span text:style-name="T2">How do you analyze DNS queries in network traffic?</text:span></text:span></text:p>
      <text:p text:style-name="P23"><text:span text:style-name="T21">A:</text:span><text:span text:style-name="T2"> Filter for DNS protocol (</text:span><text:span text:style-name="Source_20_Text"><text:span text:style-name="T2">udp.port == 53</text:span></text:span><text:span text:style-name="T2">), examine query names, response codes, and lookup patterns for suspicious activity.</text:span></text:p>
      <text:p text:style-name="P23"><text:span text:style-name="Strong_20_Emphasis"><text:span text:style-name="T21">Q: </text:span></text:span><text:span text:style-name="Strong_20_Emphasis"><text:span text:style-name="T2">What are best practices for capturing network traffic?</text:span></text:span></text:p>
      <text:p text:style-name="P24"><text:span text:style-name="T21">A:</text:span> Capture at the right point, use capture filters to reduce noise, save to disk for offline analysis, and protect sensitive data.</text:p>
      <text:p text:style-name="P23"><text:span text:style-name="Strong_20_Emphasis"><text:span text:style-name="T21">Q: </text:span></text:span><text:span text:style-name="Strong_20_Emphasis"><text:span text:style-name="T2">How does encryption affect traffic analysis?</text:span></text:span></text:p>
      <text:p text:style-name="P23"><text:span text:style-name="T21">A:</text:span><text:span text:style-name="T2"> It hides payload content, forcing analysts to rely on metadata like flow patterns, timing, SNI, and volume rather than packet inspec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08:41:34.927219574</meta:creation-date>
    <dc:date>2026-06-24T09:59:19.196561166</dc:date>
    <meta:editing-duration>PT53M59S</meta:editing-duration>
    <meta:editing-cycles>14</meta:editing-cycles>
    <meta:generator>LibreOffice/26.2.4.2$Linux_X86_64 LibreOffice_project/f4d82cf4d44730936b3f1a72d05a6253f577d3e9</meta:generator>
    <meta:document-statistic meta:table-count="0" meta:image-count="0" meta:object-count="0" meta:page-count="5" meta:paragraph-count="120" meta:word-count="1322" meta:character-count="7973" meta:non-whitespace-character-count="6770"/>
  </office:meta>
</office:document-meta>
</file>