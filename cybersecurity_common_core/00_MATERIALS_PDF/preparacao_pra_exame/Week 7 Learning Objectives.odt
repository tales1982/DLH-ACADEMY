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8pt" style:text-underline-style="solid" style:text-underline-width="auto" style:text-underline-color="font-color" fo:font-weight="bold" officeooo:rsid="000b6a1a" officeooo:paragraph-rsid="000b6a1a" style:font-size-asian="18pt" style:font-weight-asian="bold" style:font-size-complex="18pt" style:font-weight-complex="bold"/>
    </style:style>
    <style:style style:name="P2" style:family="paragraph" style:parent-style-name="Standard">
      <style:text-properties officeooo:rsid="000b6a1a" officeooo:paragraph-rsid="000b6a1a"/>
    </style:style>
    <style:style style:name="P3" style:family="paragraph" style:parent-style-name="Standard">
      <style:text-properties fo:font-size="16pt" style:text-underline-style="solid" style:text-underline-width="auto" style:text-underline-color="font-color" fo:font-weight="bold" officeooo:rsid="000b6a1a" officeooo:paragraph-rsid="000b6a1a" style:font-size-asian="16pt" style:font-weight-asian="bold" style:font-size-complex="16pt" style:font-weight-complex="bold"/>
    </style:style>
    <style:style style:name="P4" style:family="paragraph" style:parent-style-name="Text_20_body">
      <style:text-properties officeooo:rsid="000b6a1a" officeooo:paragraph-rsid="000b6a1a"/>
    </style:style>
    <style:style style:name="P5" style:family="paragraph" style:parent-style-name="Text_20_body">
      <style:text-properties officeooo:rsid="000b6a1a"/>
    </style:style>
    <style:style style:name="P6" style:family="paragraph" style:parent-style-name="Text_20_body">
      <style:text-properties fo:font-weight="normal" officeooo:rsid="000b6a1a" officeooo:paragraph-rsid="000b6a1a" style:font-weight-asian="normal" style:font-weight-complex="normal"/>
    </style:style>
    <style:style style:name="P7" style:family="paragraph" style:parent-style-name="Standard">
      <style:text-properties fo:font-weight="normal" officeooo:rsid="000b6a1a" officeooo:paragraph-rsid="000b6a1a" style:font-weight-asian="normal" style:font-weight-complex="normal"/>
    </style:style>
    <style:style style:name="P8" style:family="paragraph" style:parent-style-name="Heading_20_1">
      <style:text-properties fo:font-size="16pt" style:text-underline-style="solid" style:text-underline-width="auto" style:text-underline-color="font-color" fo:font-weight="bold" officeooo:rsid="000b6a1a" officeooo:paragraph-rsid="000b6a1a" style:font-size-asian="14pt" style:font-weight-asian="bold" style:font-size-complex="16pt" style:font-weight-complex="bold"/>
    </style:style>
    <style:style style:name="P9" style:family="paragraph" style:parent-style-name="Text_20_body">
      <style:text-properties fo:font-size="12pt" style:text-underline-style="none" fo:font-weight="normal" officeooo:rsid="000b6a1a" officeooo:paragraph-rsid="000b6a1a" style:font-size-asian="10.5pt" style:font-weight-asian="normal" style:font-size-complex="12pt" style:font-weight-complex="normal"/>
    </style:style>
    <style:style style:name="P10" style:family="paragraph" style:parent-style-name="Text_20_body">
      <style:text-properties officeooo:rsid="000b6a1a" officeooo:paragraph-rsid="000c88df"/>
    </style:style>
    <style:style style:name="P11" style:family="paragraph" style:parent-style-name="Standard">
      <style:text-properties fo:font-size="12pt" style:text-underline-style="none" fo:font-weight="normal" officeooo:rsid="000b6a1a" officeooo:paragraph-rsid="000b6a1a" style:font-size-asian="10.5pt" style:font-weight-asian="normal" style:font-size-complex="12pt" style:font-weight-complex="normal"/>
    </style:style>
    <style:style style:name="T1" style:family="text">
      <style:text-properties style:text-position="super 58%"/>
    </style:style>
    <style:style style:name="T2" style:family="text">
      <style:text-properties officeooo:rsid="000c88df"/>
    </style:style>
    <style:style style:name="T3" style:family="text">
      <style:text-properties officeooo:rsid="000ceb50"/>
    </style:style>
    <style:style style:name="T4" style:family="text">
      <style:text-properties fo:font-size="12pt" style:text-underline-style="none" style:font-size-asian="10.5pt" style:font-size-complex="12pt"/>
    </style:style>
    <style:style style:name="T5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 for test on the 18<text:span text:style-name="T1">th</text:span><text:span text:style-name="T1"/></text:p>
      <text:p text:style-name="P2"/>
      <text:p text:style-name="P3">Understanding Vuln<text:span text:style-name="T2">erabilities</text:span>:</text:p>
      <text:p text:style-name="P3"/>
      <text:p text:style-name="P4"><text:span text:style-name="Strong_20_Emphasis">What is a cybersecurity vulnerability?</text:span><text:line-break/>A weakness or flaw in a system, process, or design that can be exploited to compromise security.</text:p>
      <text:p text:style-name="P5"><text:span text:style-name="Strong_20_Emphasis">What are the different types of vulnerabilities (software, hardware, network)?</text:span><text:line-break/>Software bugs/implementation flaws, hardware firmware/physical weaknesses, and misconfigured network protocols or services, <text:span text:style-name="T3">plus the human factor.</text:span></text:p>
      <text:p text:style-name="P5"><text:span text:style-name="Strong_20_Emphasis">How do vulnerabilities lead to security breaches in technology-driven organizations?</text:span><text:line-break/>Attackers identify and exploit weaknesses to gain unauthorized access, exfiltrate data, or disrupt operations.</text:p>
      <text:p text:style-name="P5"><text:span text:style-name="Strong_20_Emphasis">What is the difference between vulnerabilities, threats, and risks?</text:span><text:line-break/>A vulnerability is a weakness, a threat is a potential attacker or event exploiting it, and risk is the likelihood/consequence of that exploitation.</text:p>
      <text:p text:style-name="P5"><text:span text:style-name="Strong_20_Emphasis">What are Common Vulnerabilities and Exposures (CVE)?</text:span><text:line-break/>A standardized database of publicly known security vulnerabilities with unique identifiers for consistent tracking and communication.</text:p>
      <text:p text:style-name="P5"><text:span text:style-name="Strong_20_Emphasis">What is vulnerability management?</text:span><text:line-break/>The ongoing process of identifying, assessing, prioritizing, remediating, and monitoring security vulnerabilities across an organization.</text:p>
      <text:p text:style-name="P5"><text:span text:style-name="Strong_20_Emphasis">What is responsible disclosure in the context of vulnerabilities?</text:span><text:line-break/>Reported finding vulnerabilities privately to vendors first, allowing time for fixes before public disclosure.</text:p>
      <text:p text:style-name="P5"><text:span text:style-name="Strong_20_Emphasis">What are common tools used for vulnerability scanning?</text:span><text:line-break/>Nessus, OpenVAS, Qualys, Burp Suite, Nmap, and Microsoft Baseline Security Analyzer.</text:p>
      <text:p text:style-name="P5"><text:span text:style-name="Strong_20_Emphasis">Why is vulnerability management essential for a company's cybersecurity posture?</text:span><text:line-break/>It proactively reduces attack surface by systematically addressing weaknesses before adversaries can exploit them.</text:p>
      <text:p text:style-name="P5"/>
      <text:p text:style-name="P3">CVE, CWE and NVD:</text:p>
      <text:p text:style-name="P3"/>
      <text:p text:style-name="P6"><text:span text:style-name="Strong_20_Emphasis">What are CVEs (Common Vulnerabilities and Exposures), and how do they help in identifying and sharing information about publicly known cybersecurity vulnerabilities?</text:span><text:line-break/>CVEs are standardized identifiers for publicly known security vulnerabilities that enable consistent tracking, communication, and reference across the global cybersecurity community.</text:p>
      <text:p text:style-name="P5"><text:span text:style-name="Strong_20_Emphasis">What is the structure of a CVE identifier (e.g., CVE-2024-1234), and what is the significance of each part?</text:span><text:line-break/>Format breaks down as: "CVE" prefix, year discovered/assigned (2024), and sequential ID number (1234) within that year's issuance.</text:p>
      <text:p text:style-name="P5"><text:soft-page-break/><text:span text:style-name="Strong_20_Emphasis">What role do CVE Numbering Authorities (CNAs) play in the CVE assignment process, and what are the criteria for becoming a CNA?</text:span><text:line-break/>CNAs are trusted organizations authorized to assign CVE IDs; they must demonstrate expertise in vulnerability handling and agree to follow MITRE's policies and procedures.</text:p>
      <text:p text:style-name="P5"><text:span text:style-name="Strong_20_Emphasis">How are vulnerabilities reported, reviewed, and assigned a CVE identifier through the CVE entry process?</text:span><text:line-break/>Reporters submit findings to relevant CNAs or MITRE directly, which review validity, uniqueness, and public disclosure readiness before issuing CVE assignments.</text:p>
      <text:p text:style-name="P5"><text:span text:style-name="Strong_20_Emphasis">How can you use the CVE database to search for and retrieve information about specific vulnerabilities?</text:span><text:line-break/>Use cve.mitre.org with keyword/CVE-ID search filters by year, product, vendor, or severity ratings for targeted lookups.</text:p>
      <text:p text:style-name="P5"><text:span text:style-name="Strong_20_Emphasis">What are CWEs (Common Weakness Enumeration), and how do they help in identifying common software weaknesses that can lead to vulnerabilities?</text:span><text:line-break/>CWEs catalog software design/code flaws that could become exploitable vulnerabilities, providing a taxonomy for secure development and testing.</text:p>
      <text:p text:style-name="P5"><text:span text:style-name="Strong_20_Emphasis">What are the different categories, types, and hierarchical structures of CWEs?</text:span><text:line-break/>Organized as tree hierarchy from root weaknesses (like CWE-79 XSS) through subclasses showing specific instances and relationships between weakness types.</text:p>
      <text:p text:style-name="P5"><text:span text:style-name="Strong_20_Emphasis">How are CWEs related to CVEs, and how do they describe the types of weaknesses that lead to vulnerabilities?</text:span><text:line-break/>Multiple CVE entries often map back to single CWEs—CWE describes the root cause flaw type while CVE documents specific instance manifestations.</text:p>
      <text:p text:style-name="P5"><text:span text:style-name="Strong_20_Emphasis">What are some common mitigation techniques and best practices for addressing weaknesses identified by CWEs?</text:span><text:line-break/>Input validation, output encoding, parameterized queries, proper memory management, code review, static analysis tools, and secure coding training.</text:p>
      <text:p text:style-name="P5"><text:span text:style-name="Strong_20_Emphasis">How can weaknesses be prioritized based on their severity, exploitability, and potential impact using CWE scoring?</text:span><text:line-break/>CWE itself lacks intrinsic scoring but teams prioritize based on exploit likelihood, asset criticality, available patches, and associated CVE CVSS scores when mapped.</text:p>
      <text:p text:style-name="P5"><text:span text:style-name="Strong_20_Emphasis">What is the role of the NVD (National Vulnerability Database) in the cybersecurity ecosystem, and how does it support vulnerability management?</text:span><text:line-break/>NVD serves as US-government maintained repository aggregating CVE data with enriched details like CVSS scores, affected configurations, and remediation guidance.</text:p>
      <text:p text:style-name="P5"><text:span text:style-name="Strong_20_Emphasis">What types of data feeds are provided by the NVD, including vulnerability metrics, configurations, and impact scores?</text:span><text:line-break/>JSON/XML feeds containing CVE details, CVSS v2/v3 scores, CPE configurations, affected products, references, and patch availability status updates.</text:p>
      <text:p text:style-name="P5"><text:span text:style-name="Strong_20_Emphasis">How can you use the CVSS (Common Vulnerability Scoring System) to assess the severity of vulnerabilities listed in the NVD?</text:span><text:line-break/><text:soft-page-break/>CVSS provides base/temporal/environmental metrics (attack vector, complexity, privileges required, impact) generating numeric scores 0.0-10.0 for severity ranking.</text:p>
      <text:p text:style-name="P5"><text:span text:style-name="Strong_20_Emphasis">How can you effectively search, filter, and retrieve vulnerability information from the NVD?</text:span><text:line-break/>Apply nvd.nist.gov filters by CVE-ID, keywords, publish date ranges, CVSS score thresholds, CPE product names, or vendor/platform combinations.</text:p>
      <text:p text:style-name="P5"><text:span text:style-name="Strong_20_Emphasis">How can NVD data be integrated with security tools and platforms for automated vulnerability management?</text:span><text:line-break/>Pull API feeds into SIEMs, scanners, ticketing systems, and SOAR platforms to auto-correlate discoveries with known vulnerability data for prioritization workflows.</text:p>
      <text:p text:style-name="P7"/>
      <text:h text:style-name="P8" text:outline-level="1">Upload Vulnerabilities</text:h>
      <text:p text:style-name="P9"><text:span text:style-name="Strong_20_Emphasis"/></text:p>
      <text:p text:style-name="P10"><text:span text:style-name="Strong_20_Emphasis"><text:span text:style-name="T4">What is an unrestricted file upload?</text:span></text:span><text:span text:style-name="T5"><text:line-break/>It is a web vulnerability where an application accepts uploaded files without adequately validating their content, type, or structure.</text:span></text:p>
      <text:p text:style-name="P10"><text:span text:style-name="Strong_20_Emphasis">Why are file uploads a security risk?</text:span><text:line-break/>They allow attackers to bypass application controls by uploading malicious code that the server may execute, leading to full system compromise.</text:p>
      <text:p text:style-name="P10"><text:span text:style-name="Strong_20_Emphasis">How can file upload forms be exploited?</text:span><text:line-break/>Attackers trick servers into storing and executing malware, web shells, or scripts by spoofing headers, bypassing client checks, or exploiting extension weaknesses.</text:p>
      <text:p text:style-name="P10"><text:span text:style-name="Strong_20_Emphasis">What is a web shell?</text:span><text:line-break/>A web shell is a malicious script uploaded to a server that provides attackers with a remote command line interface to control the compromised system.</text:p>
      <text:p text:style-name="P10"><text:span text:style-name="Strong_20_Emphasis">How do MIME types relate to upload security?</text:span><text:line-break/>MIME types indicate file formats in HTTP headers, but relying solely on them is insecure because they can be easily forged by attackers.</text:p>
      <text:p text:style-name="P10"><text:span text:style-name="Strong_20_Emphasis">What is content-type spoofing?</text:span><text:line-break/>This is the technique of manipulating the <text:span text:style-name="Source_20_Text">Content-Type</text:span> header in an upload request to make a malicious file appear as a safe image or document.</text:p>
      <text:p text:style-name="P10"><text:span text:style-name="Strong_20_Emphasis">How can server-side validation mitigate risks?</text:span><text:line-break/>Server-side validation enforces strict checks on file magic numbers, extensions, and content before storage, effectively preventing execution of unauthorized payloads.</text:p>
      <text:p text:style-name="P10"><text:span text:style-name="Strong_20_Emphasis">What is the importance of file extension filtering?</text:span><text:line-break/>Whitelisting allowed extensions ensures that only expected file types (like <text:span text:style-name="Source_20_Text">.jpg</text:span>) can be saved, blocking executable scripts (like <text:span text:style-name="Source_20_Text">.php</text:span> or <text:span text:style-name="Source_20_Text">.exe</text:span>).</text:p>
      <text:p text:style-name="P10"><text:span text:style-name="Strong_20_Emphasis">How can client-side checks be bypassed?</text:span><text:line-break/>Client-side validations run in the user's browser and can be easily circumvented by modifying requests with proxy tools like Burp Suite or curl.</text:p>
      <text:p text:style-name="P10"><text:soft-page-break/><text:span text:style-name="Strong_20_Emphasis">What are some secure file upload practices?</text:span><text:line-break/>Best practices include whitelisting extensions, verifying file magic numbers, renaming files upon upload, storing outside the web root, and disabling script execution in upload folders.</text:p>
      <text:p text:style-name="P10"><text:span text:style-name="Strong_20_Emphasis">How does file size limitation help security?</text:span><text:line-break/>Limiting file sizes prevents denial-of-service attacks caused by massive uploads filling disk space and slows down brute-force attempts to upload large payloads.</text:p>
      <text:p text:style-name="P10"><text:span text:style-name="Strong_20_Emphasis">What are the risks of storing files on the same domain?</text:span><text:line-break/>Storing uploads on the same domain allows malicious scripts to potentially access cookies, local storage, or perform Same Origin Policy bypasses against your legitimate site.</text:p>
      <text:p text:style-name="P10"><text:span text:style-name="Strong_20_Emphasis">How do file permissions affect upload security?</text:span><text:line-break/>Improper permissions (like <text:span text:style-name="Source_20_Text">777</text:span>) on upload directories grant unintended read/write/execute rights, enabling attackers to modify or run the malicious files they placed there.</text:p>
      <text:p text:style-name="P10"><text:span text:style-name="Strong_20_Emphasis">Why should upload directories not be executable?</text:span><text:line-break/>Disabling execution permissions ensures that even if a malicious script is successfully uploaded, the web server treats it as data rather than running it as code.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7T15:33:00.162344497</meta:creation-date>
    <dc:date>2026-06-18T09:04:01.945712194</dc:date>
    <meta:editing-duration>PT11M13S</meta:editing-duration>
    <meta:editing-cycles>3</meta:editing-cycles>
    <meta:generator>LibreOffice/26.2.4.2$Linux_X86_64 LibreOffice_project/f4d82cf4d44730936b3f1a72d05a6253f577d3e9</meta:generator>
    <meta:document-statistic meta:table-count="0" meta:image-count="0" meta:object-count="0" meta:page-count="4" meta:paragraph-count="42" meta:word-count="1198" meta:character-count="8547" meta:non-whitespace-character-count="7392"/>
  </office:meta>
</office:document-meta>
</file>