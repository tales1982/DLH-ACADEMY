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20pt" style:font-size-asian="20pt" style:font-size-complex="20pt"/>
    </style:style>
    <style:style style:name="P2" style:family="paragraph" style:parent-style-name="Heading_20_2">
      <style:text-properties fo:color="#000000" loext:opacity="100%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83bbb" fo:background-color="#ffffff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97041" fo:background-color="#ffffff"/>
    </style:style>
    <style:style style:name="P5" style:family="paragraph" style:parent-style-name="Heading_20_2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background-color="#ffffff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ad407" fo:background-color="#ffffff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c5127" fo:background-color="#ffffff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ddbff" fo:background-color="#ffffff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fbc68" fo:background-color="#ffffff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1fd104" fo:background-color="#ffffff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0397e" fo:background-color="#ffffff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208e9" fo:background-color="#ffffff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3410e" fo:background-color="#ffffff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4061a" fo:background-color="#ffffff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5c1a6" fo:background-color="#ffffff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6208c" fo:background-color="#ffffff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6493f" fo:background-color="#ffffff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7e704" fo:background-color="#ffffff"/>
    </style:style>
    <style:style style:name="P19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8397b" fo:background-color="#ffffff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9c62c" fo:background-color="#ffffff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bbc20" fo:background-color="#ffffff"/>
    </style:style>
    <style:style style:name="P22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cdb9b" fo:background-color="#ffffff"/>
    </style:style>
    <style:style style:name="P23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2e2c8b" fo:background-color="#ffffff"/>
    </style:style>
    <style:style style:name="P25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2e2c8b" fo:background-color="#ffffff"/>
    </style:style>
    <style:style style:name="P26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officeooo:paragraph-rsid="002e2c8b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officeooo:paragraph-rsid="002f4f88"/>
    </style:style>
    <style:style style:name="P29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/>
    </style:style>
    <style:style style:name="T1" style:family="text">
      <style:text-properties officeooo:rsid="002e2c8b"/>
    </style:style>
    <style:style style:name="T2" style:family="text">
      <style:text-properties fo:color="#000000" loext:opacity="100%" officeooo:rsid="002e2c8b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learningobjectives"/>Learning Objectives</text:h>
      <text:h text:style-name="P2" text:outline-level="2">Networking Fundamentals</text:h>
      <text:p text:style-name="P3">Q: What is networking and why is it essential?</text:p>
      <text:p text:style-name="P3">A: Networking connects devices to share resources and data, enabling communication, collaboration, and access to centralized systems across organizations.</text:p>
      <text:p text:style-name="P3">Q: What is the difference between LAN and WAN?</text:p>
      <text:p text:style-name="P3">A: LAN spans a limited geographic area like a building while WAN covers larger distances connecting multiple locations or cities.</text:p>
      <text:p text:style-name="P3">Q: What are the main network topologies (Bus, Star, Ring, Mesh)?</text:p>
      <text:p text:style-name="P3">A: Bus uses a single backbone cable, Star centers around a hub/switch, Ring connects nodes in a circle, and Mesh provides redundant interconnections between all nodes.</text:p>
      <text:p text:style-name="P3">Q: What is the difference between physical and logical topology?</text:p>
      <text:p text:style-name="P3">A: Physical topology describes actual cable/device layout while logical topology defines how data flows through the network regardless of physical connections.</text:p>
      <text:p text:style-name="P4">Q: What are the 7 layers of the OSI model and their functions?</text:p>
      <text:p text:style-name="P4">A: Physical (cabling/signals), Data Link (frames/MAC), Network (packets/routing), Transport (segments/reliability), Session (connections), Presentation (encryption/formatting), Application (user interfaces).</text:p>
      <text:p text:style-name="P4">Q: What happens at each layer during data transmission?</text:p>
      <text:p text:style-name="P4">A: Data encapsulates downward adding headers at each layer during transmission and decapsulates upward removing headers at the receiving end.</text:p>
      <text:p text:style-name="P4">Q: What is encapsulation and decapsulation?</text:p>
      <text:p text:style-name="P4">A: Encapsulation adds protocol headers/footers as data moves down layers while decapsulation removes them as data moves up layers at the destination.</text:p>
      <text:p text:style-name="P4">Q: What are the 4 layers of the TCP/IP model?</text:p>
      <text:p text:style-name="P4">A: Network Interface, Internet, Transport, and Application layers corresponding to OSI's combined physical/data link, network, transport, and session/presentation/application.</text:p>
      <text:p text:style-name="P4">Q: How does TCP/IP compare to the OSI model?</text:p>
      <text:p text:style-name="P4">A: TCP/IP condenses OSI's 7 layers into 4 practical layers with TCP/IP being implementation-focused while OSI serves as a theoretical reference framework.</text:p>
      <text:p text:style-name="Horizontal_20_Line"/>
      <text:h text:style-name="P5" text:outline-level="2">Protocols &amp; Transmission</text:h>
      <text:p text:style-name="P4">Q: What are the main network protocols (HTTP, HTTPS, FTP, SSH, DNS, DHCP)?</text:p>
      <text:p text:style-name="P4"><text:soft-page-break/>A: HTTP/HTTPS for web traffic, FTP for file transfer, SSH for secure remote access, DNS for name resolution, and DHCP for automatic IP address assignment.</text:p>
      <text:p text:style-name="P4">Q: What is the difference between TCP and UDP?</text:p>
      <text:p text:style-name="P4">A: TCP is connection-oriented with guaranteed delivery and ordering while UDP is connectionless with faster but unreliable transmission without guarantees.</text:p>
      <text:p text:style-name="P4">Q: What are the different types of transmission media (wired vs wireless)?</text:p>
      <text:p text:style-name="P4">A: Wired includes twisted pair copper cables and fiber optics while wireless uses radio waves including Wi-Fi, cellular, and microwave technologies.</text:p>
      <text:p text:style-name="P4">Q: What is the role of a Hub, Switch, Router, Firewall?</text:p>
      <text:p text:style-name="P4">A: Hubs broadcast traffic indiscriminately, switches direct frames by MAC addresses, routers route packets between networks, and firewalls filter traffic by rules.</text:p>
      <text:p text:style-name="P4">Q: What is the difference between Layer 2 and Layer 3 devices?</text:p>
      <text:p text:style-name="P4">A: Layer 2 devices forward frames using MAC addresses while Layer 3 devices route packets using IP addresses across networks.</text:p>
      <text:p text:style-name="P4">Q: What is a VLAN and why is it used?</text:p>
      <text:p text:style-name="P4">A: A Virtual Local Area Network logically segments broadcast domains on a single switch for improved security, performance, and traffic management.</text:p>
      <text:p text:style-name="P4">Q: What is 802.1Q tagging?</text:p>
      <text:p text:style-name="P4">A: IEEE 802.1Q adds a 4-byte tag to Ethernet frames identifying VLAN membership for trunk links carrying multiple VLANs.</text:p>
      <text:p text:style-name="P4">Q: What are VLAN hopping attacks and how to prevent them?</text:p>
      <text:p text:style-name="P4">A: VLAN hopping allows unauthorized access across VLANs via switch spoofing or double-tagging; prevent by disabling auto-trunking and limiting native VLAN usage.</text:p>
      <text:p text:style-name="P4">Q: What is Inter-VLAN routing?</text:p>
      <text:p text:style-name="P4">A: Inter-VLAN routing enables communication between different VLANs using a router or Layer 3 switch acting as a gateway between segmented networks.</text:p>
      <text:p text:style-name="P4">Q: What is a MAC address and how is it structured?</text:p>
      <text:p text:style-name="P4">A: A Media Access Control address is a 48-bit unique hardware identifier formatted as six hexadecimal pairs separating OUI from device-specific portions.</text:p>
      <text:p text:style-name="P4">Q: What is the difference between OUI and NIC-specific portions?</text:p>
      <text:p text:style-name="P4">A: The first 24 bits (OUI) identify the manufacturer while the last 24 bits uniquely identify the individual network interface card.</text:p>
      <text:p text:style-name="P4">Q: What are special MAC addresses (broadcast, multicast)?</text:p>
      <text:p text:style-name="P4">A: Broadcast FF:FF:FF:FF:FF:FF reaches all devices while multicast addresses target specific groups and unicast targets a single destination.</text:p>
      <text:p text:style-name="P4"><text:soft-page-break/>Q: What is an IPv4 address and its format?</text:p>
      <text:p text:style-name="P4">A: An IPv4 address is a 32-bit numerical identifier expressed in dotted decimal notation as four octets separated by periods (e.g., 192.168.1.1).</text:p>
      <text:p text:style-name="P4">Q: What are IP address classes (A, B, C, D, E)?</text:p>
      <text:p text:style-name="P4">A: Class A supports large networks (first bit 0), Class B medium (first bits 10), Class C small (first bits 110), Class D for multicast, Class E experimental.</text:p>
      <text:p text:style-name="P4">Q: What are private IP ranges (RFC 1918)?</text:p>
      <text:p text:style-name="P4">A: Private ranges include 10.0.0.0/8, 172.16.0.0/12, and 192.168.0.0/16 which cannot be routed publicly and require NAT for internet access.</text:p>
      <text:p text:style-name="P4">Q: What are special IP addresses (loopback, broadcast)?</text:p>
      <text:p text:style-name="P4">A: Loopback 127.0.0.1 tests local TCP/IP stack and broadcast sends to all hosts within a network segment.</text:p>
      <text:p text:style-name="P4">Q: What is CIDR notation?</text:p>
      <text:p text:style-name="P4">A: Classless Inter-Domain Routing notation expresses IP blocks using prefix length (e.g., /24) indicating the number of bits in the network portion.</text:p>
      <text:p text:style-name="P4">Q: How to calculate subnets, hosts per subnet, and network ranges?</text:p>
      <text:p text:style-name="P4">A: Subnet count equals 2^(borrowed bits), hosts per subnet equals 2^(host bits)-2, and ranges are determined by incrementing the subnet portion systematically.</text:p>
      <text:p text:style-name="P4">Q: How to perform subnetting manually?</text:p>
      <text:p text:style-name="P4">A: Identify borrowed bits, calculate block size from least significant subnet bit, then increment network addresses by that block value.</text:p>
      <text:p text:style-name="P4">Q: What is ARP and how does it work?</text:p>
      <text:p text:style-name="P4">A: Address Resolution Protocol maps IP addresses to MAC addresses by broadcasting requests and caching responses in an ARP table.</text:p>
      <text:p text:style-name="P4">Q: What are the security concerns with ARP (ARP spoofing)?</text:p>
      <text:p text:style-name="P4">A: ARP lacks authentication allowing attackers to forge MAC-to-IP mappings enabling man-in-the-middle interception and traffic redirection attacks.</text:p>
      <text:p text:style-name="P4">Q: Why was IPv6 developed and how does it differ from IPv4?</text:p>
      <text:p text:style-name="P4">A: IPv6 was created to address IPv4 exhaustion with 128-bit addresses eliminating NAT, built-in IPsec, and simplified header structure.</text:p>
      <text:p text:style-name="P4">Q: What are well-known ports (0-1023)?</text:p>
      <text:p text:style-name="P4">A: Well-known ports are system-reserved for standard services like HTTP(80), HTTPS(443), SSH(22), DNS(53), and SMTP(25).</text:p>
      <text:p text:style-name="P4">Q: What are registered ports and dynamic ports?</text:p>
      <text:p text:style-name="P4"><text:soft-page-break/>A: Registered ports (1024-49151) are assigned by IANA for applications while dynamic/ephemeral ports (49152-65535) are client-assigned temporarily.</text:p>
      <text:p text:style-name="P4">Q: What is DHCP and what problem does it solve?</text:p>
      <text:p text:style-name="P4">A: Dynamic Host Configuration Protocol automates IP address assignment preventing manual configuration errors and managing address pool allocation efficiently.</text:p>
      <text:p text:style-name="P4">Q: What is the DORA process (Discover, Offer, Request, Acknowledgement)?</text:p>
      <text:p text:style-name="P4">A: Client broadcasts Discover, server responds with Offer, client requests the offered address, and server acknowledges completing IP lease assignment.</text:p>
      <text:p text:style-name="P4">Q: What is a DHCP lease and how does renewal work?</text:p>
      <text:p text:style-name="P4">A: A DHCP lease is temporary IP assignment renewed automatically at 50% of lease time through unicast T1 renewal or broadcast T2 rebind.</text:p>
      <text:p text:style-name="P4">Q: What are DHCP attacks (Rogue Server, Starvation)?</text:p>
      <text:p text:style-name="P4">A: Rogue server attacks assign malicious configurations while starvation exhausts the address pool by flooding requests with fake MAC addresses.</text:p>
      <text:p text:style-name="P4">Q: What is DHCP Snooping and how does it protect networks?</text:p>
      <text:p text:style-name="P4">A: DHCP Snooping distinguishes trusted from untrusted ports blocking rogue server responses and validating DHCP packet integrity against a binding database.</text:p>
      <text:p text:style-name="P4">Q: What is NAT and why is it used?</text:p>
      <text:p text:style-name="P4">A: Network Address Translation maps private internal addresses to public external addresses conserving IPv4 space and providing basic security obfuscation.</text:p>
      <text:p text:style-name="P4">Q: What is the difference between Static NAT, Dynamic NAT, and PAT?</text:p>
      <text:p text:style-name="P4">A: Static creates permanent 1:1 mappings, Dynamic pools addresses dynamically assigning them, and PAT uses port multiplexing many:one for maximum conservation.</text:p>
      <text:p text:style-name="P4">Q: What is Port Forwarding?</text:p>
      <text:p text:style-name="P4">A: Port forwarding redirects incoming traffic on a specific public port to an internal private IP address and port mapping.</text:p>
      <text:p text:style-name="P4">Q: What is NAT Traversal (STUN, TURN, ICE)?</text:p>
      <text:p text:style-name="P4">A: STUN discovers public addresses, TURN relays through intermediate servers, and ICE combines methods for establishing connections through NAT.</text:p>
      <text:p text:style-name="P6">Q: What is Carrier-Grade NAT (CGNAT)?</text:p>
      <text:p text:style-name="P6">A: CGNAT extends NAT to ISP level where multiple subscribers share public IPs creating additional addressing constraints for end users.</text:p>
      <text:p text:style-name="P6">Q: What is DNS and how does it work?</text:p>
      <text:p text:style-name="P6">A: Domain Name System resolves human-readable domain names to IP addresses through hierarchical query cascading from recursive to authoritative servers.</text:p>
      <text:p text:style-name="P6"><text:soft-page-break/>Q: What is the DNS hierarchy (Root, TLD, Authoritative)?</text:p>
      <text:p text:style-name="P6">A: Root servers delegate to Top-Level Domains which delegate to authoritative name servers holding actual resource records for specific domains.</text:p>
      <text:p text:style-name="P6">Q: What is the DNS resolution process?</text:p>
      <text:p text:style-name="P6">A: Recursive resolver queries root, receives TLD referral, queries TLD, receives authoritative referral, queries authoritative server returning final answer cached locally.</text:p>
      <text:p text:style-name="P6">Q: What are the main DNS record types (A, AAAA, CNAME, MX, NS, TXT, PTR)?</text:p>
      <text:p text:style-name="P6">A: A stores IPv4, AAAA IPv6, CNAME aliases, MX mail routing, NS name servers, TXT text verification, and PTR reverse lookup entries.</text:p>
      <text:p text:style-name="P6">Q: What are DNS security threats (Spoofing, Hijacking, Tunneling)?</text:p>
      <text:p text:style-name="P6">A: Spoofing returns false records, hijacking redirects domains to attacker servers, and tunneling exfiltrates data through DNS query responses.</text:p>
      <text:p text:style-name="P6">Q: What is DNSSEC and encrypted DNS (DoH, DoT)?</text:p>
      <text:p text:style-name="P6">A: DNSSEC digitally signs records ensuring authenticity while DoH/DoT encrypt queries preventing eavesdropping and modification attacks.</text:p>
      <text:p text:style-name="Horizontal_20_Line"/>
      <text:h text:style-name="P5" text:outline-level="2">Authentication &amp; Directory Services</text:h>
      <text:p text:style-name="P7">Q: What is RADIUS and how does it work?</text:p>
      <text:p text:style-name="P7">A: Remote Authentication Dial-In User Service centralizes authentication using shared secrets and UDP transmitting credentials to verify access authorization.</text:p>
      <text:p text:style-name="P7">Q: What is TACACS+ and how does it differ from RADIUS?</text:p>
      <text:p text:style-name="P7">A: TACACS+ separates authentication authorization accounting over TCP encrypting entire payloads while RADIUS only encrypts passwords and combines AAA.</text:p>
      <text:p text:style-name="P7">Q: What is Kerberos and what attacks target it?</text:p>
      <text:p text:style-name="P7">A: Kerberos provides ticket-based mutual authentication requiring KDC; attacks include Golden Ticket, Silver Ticket, Pass-the-Ticket, and AS-REP Roasting.</text:p>
      <text:p text:style-name="P8">Q: What is LDAP and how is it used in networks?</text:p>
      <text:p text:style-name="P8">A: Lightweight Directory Access Protocol queries hierarchical directory databases for user authentication, group memberships, and centralized identity management.</text:p>
      <text:p text:style-name="P8">Q: Why is NTP important for security?</text:p>
      <text:p text:style-name="P8">A: Network Time Protocol ensures synchronized clocks critical for log correlation, certificate validation, Kerberos ticket timestamps, and forensic analysis accuracy.</text:p>
      <text:p text:style-name="P8">Q: What is Syslog and its severity levels?</text:p>
      <text:p text:style-name="P8">A: Syslog collects and forwards logs across 8 severity levels from Emergency(0) to Debug(7) enabling centralized monitoring and incident investigation.</text:p>
      <text:p text:style-name="P9"><text:soft-page-break/>Q: What is an Autonomous System (AS) and ASN?</text:p>
      <text:p text:style-name="P9">A: An Autonomous System is a network under single administrative control identified by a unique Autonomous System Number for routing policy purposes.</text:p>
      <text:p text:style-name="P9">Q: What is BGP and how does it work?</text:p>
      <text:p text:style-name="P9">A: Border Gateway Protocol exchanges routing information between ASes selecting optimal paths based on policies maintaining global internet connectivity tables.</text:p>
      <text:p text:style-name="P9">Q: What are BGP hijacking attacks?</text:p>
      <text:p text:style-name="P9">A: BGP hijacking announces illegitimate prefixes redirecting traffic to attacker-controlled networks enabling interception disruption or surveillance.</text:p>
      <text:p text:style-name="P10">Q: What is peering vs transit?</text:p>
      <text:p text:style-name="P10">A: Peering directly exchanges traffic between networks without payment while transit purchases upstream connectivity accessing broader internet reach.</text:p>
      <text:p text:style-name="P11">Q: What is an Internet Exchange Point (IXP)?</text:p>
      <text:p text:style-name="P11">A: IXPs are physical facilities where networks interconnect for efficient local traffic exchange reducing latency and transit costs through direct peering.</text:p>
      <text:p text:style-name="P12">Q: What is a CDN and how does Anycast work?</text:p>
      <text:p text:style-name="P12">A: Content Delivery Networks cache content geographically while Anycast routes users to nearest identical IP announced from multiple locations simultaneously.</text:p>
      <text:p text:style-name="P12">Q: What are the Wi-Fi frequency bands (2.4 GHz, 5 GHz, 6 GHz)?</text:p>
      <text:p text:style-name="P12">A: 2.4GHz offers range with congestion, 5GHz provides speed with better penetration balance, and 6GHz delivers maximum throughput with limited range.</text:p>
      <text:p text:style-name="P12">Q: What are the Wi-Fi standards (802.11a/b/g/n/ac/ax)?</text:p>
      <text:p text:style-name="P12">A: Standards progress from 802.11a/b legacy through g/n improvements to ac(WiFi5) and ax(WiFi6) offering increasing speeds and efficiency gains.</text:p>
      <text:p text:style-name="P12">Q: What is the difference between WEP, WPA, WPA2, WPA3?</text:p>
      <text:p text:style-name="P12">A: WEP is broken RC4, WPA introduced TKIP, WPA2 mandates AES-CCMP, and WPA3 adds Simultaneous Authentication Equals forward secrecy protection.</text:p>
      <text:p text:style-name="P12">Q: What are common wireless attacks (Evil Twin, Deauth, KRACK)?</text:p>
      <text:p text:style-name="P12">A: Evil Twin mimics legitimate APs, deauthentication floods disconnect clients forcing reconnection, and KRACK exploits WPA2 handshake key reinstallation flaws.</text:p>
      <text:p text:style-name="P13">Q: What are wireless security best practices?</text:p>
      <text:p text:style-name="P13">A: Use WPA3 when available strong passphrases disable WPS separate SSIDs monitor for rogue APs and enable 802.1X Enterprise authentication.</text:p>
      <text:p text:style-name="P13">Q: What is the difference between PSK and Enterprise authentication?</text:p>
      <text:p text:style-name="P13"><text:soft-page-break/>A: PSK uses shared pre-shared keys vulnerable to compromise while Enterprise leverages RADIUS authenticating each user individually with certificates or credentials.</text:p>
      <text:p text:style-name="Horizontal_20_Line"/>
      <text:h text:style-name="P5" text:outline-level="2">Security Principles &amp; Defense</text:h>
      <text:p text:style-name="P13">Q: What is the CIA Triad (Confidentiality, Integrity, Availability)?</text:p>
      <text:p text:style-name="P13">A: Confidentiality prevents unauthorized disclosure, Integrity ensures data accuracy and trustworthiness, and Availability guarantees accessible resources when needed.</text:p>
      <text:p text:style-name="P13">Q: What is Defense in Depth?</text:p>
      <text:p text:style-name="P13">A: Defense in Depth layers multiple security controls across people processes and technology ensuring breach prevention even if individual controls fail.</text:p>
      <text:p text:style-name="P14">Q: What are the key security principles (Least Privilege, Zero Trust)?</text:p>
      <text:p text:style-name="P14">A: Least Privilege grants minimum necessary access rights while Zero Trust assumes no implicit trust requiring continuous verification of every request.</text:p>
      <text:p text:style-name="P14">Q: What is AAA (Authentication, Authorization, Accounting)?</text:p>
      <text:p text:style-name="P14">A: Authentication verifies identity, Authorization grants permissions, and Accounting tracks user actions for accountability and auditing compliance.</text:p>
      <text:p text:style-name="P14">Q: What are the main attack categories (Reconnaissance, Interception, DoS)?</text:p>
      <text:p text:style-name="P14">A: Reconnaissance gathers intelligence, Interception modifies/captures data in transit, and Denial-of-Service overwhelms resources preventing legitimate access.</text:p>
      <text:p text:style-name="P14">Q: What is a Man-in-the-Middle (MitM) attack?</text:p>
      <text:p text:style-name="P14">A: MitM positions attackers between communicating parties intercepting modifying or injecting messages without either party detecting the manipulation.</text:p>
      <text:p text:style-name="P14">Q: What are DDoS attacks (Volumetric, Protocol, Application)?</text:p>
      <text:p text:style-name="P14">A: Volumetric floods bandwidth, Protocol exhausts infrastructure state tables, and Application targets resource-intensive endpoints exhausting server capacity.</text:p>
      <text:p text:style-name="P14">Q: What are common password attacks?</text:p>
      <text:p text:style-name="P14">A: Brute force tries combinations, dictionary uses wordlists, rainbow tables use precomputed hashes, and credential stuffing reuses leaked credentials.</text:p>
      <text:p text:style-name="P15">Q: What are the types of firewalls (Packet Filtering, Stateful, NGFW)?</text:p>
      <text:p text:style-name="P15">A: Packet filters check individual packets, stateful track connection context, and Next-Gen Firewalls add deep inspection IDS application awareness.</text:p>
      <text:p text:style-name="P16">Q: How to write firewall rules?</text:p>
      <text:p text:style-name="P16">A: Define source destination port protocol action allow/deny order matters placing specific rules before general ones with implicit deny all default.</text:p>
      <text:p text:style-name="P16">Q: What is a DMZ?</text:p>
      <text:p text:style-name="P16"><text:soft-page-break/>A: Demilitarized Zone isolates publicly-facing servers from internal networks limiting lateral movement if perimeter systems get compromised.</text:p>
      <text:p text:style-name="P16">Q: What is the difference between IDS and IPS?</text:p>
      <text:p text:style-name="P16">A: Intrusion Detection Systems alert on suspicious activity while Intrusion Prevention Systems actively block detected threats inline with traffic flow.</text:p>
      <text:p text:style-name="P16">Q: What are detection methods (Signature, Anomaly, Heuristic)?</text:p>
      <text:p text:style-name="P16">A: Signatures match known patterns, anomalies identify deviations from baseline behavior, and heuristics apply rule-based logic to detect novel threat indicators.</text:p>
      <text:p text:style-name="P16">Q: What is network segmentation and why is it important?</text:p>
      <text:p text:style-name="P16">A: Segmentation divides networks into isolated zones containing breaches limiting lateral movement and enforcing granular security policy boundaries.</text:p>
      <text:p text:style-name="P17">Q: What is Zero Trust architecture?</text:p>
      <text:p text:style-name="P17">A: Zero Trust requires explicit verification for every access request regardless of network location implementing microsegmentation continuous monitoring multi-factor auth.</text:p>
      <text:p text:style-name="P17">Q: What is a SIEM and what logs should be monitored?</text:p>
      <text:p text:style-name="P17">A: Security Information Event Management aggregates correlates analyzes logs from firewalls endpoints authentication systems and critical infrastructure components continuously.</text:p>
      <text:p text:style-name="P17">Q: What is NAC (Network Access Control)?</text:p>
      <text:p text:style-name="P17">A: Network Access Control validates device compliance identity health posture before granting network access blocking non-compliant endpoints.</text:p>
      <text:p text:style-name="P18">Q: What is 802.1X authentication and the EAP methods?</text:p>
      <text:p text:style-name="P18">A: 802.1X provides port-based network access control using Extensible Authentication Protocol variants including PEAP EAP-TLS and EAP-TTLS.</text:p>
      <text:p text:style-name="Horizontal_20_Line"/>
      <text:h text:style-name="P5" text:outline-level="2">Scanning &amp; Enumeration</text:h>
      <text:p text:style-name="P19">Q: What are the types of port scans (TCP Connect, SYN, UDP)?</text:p>
      <text:p text:style-name="P19">A: TCP Connect completes three-way handshakes, SYN sends flags without completion stealthier, and UDP probes open/closed filtered UDP services.</text:p>
      <text:p text:style-name="P20">Q: What are the port states (Open, Closed, Filtered)?</text:p>
      <text:p text:style-name="P20">A: Open accepts connections, Closed rejects connections actively, and Filtered drops packets silently leaving status ambiguous to scanners.</text:p>
      <text:p text:style-name="P21">Q: What protocols are used for network enumeration (SNMP, NetBIOS, SMB, LDAP)?</text:p>
      <text:p text:style-name="P21">A: SNMP extracts device information, NetBIOS enumerates Windows shares, SMB reveals file shares/user sessions, and LDAP queries directory structures.</text:p>
      <text:p text:style-name="P22">Q: How to defend against reconnaissance?</text:p>
      <text:p text:style-name="P22"><text:soft-page-break/>A: Implement strict firewall rules limit exposed services disable unnecessary protocols log scan attempts use IDS and employ honeytokens honeypots.</text:p>
      <text:h text:style-name="P23" text:outline-level="1">Cryptography Basics</text:h>
      <text:p text:style-name="P24"><text:span text:style-name="T1">Q: </text:span>What is cryptography in cybersecurity?</text:p>
      <text:p text:style-name="P24"><text:span text:style-name="T1">A: </text:span>The science of securing data through mathematical algorithms that convert readable information into unreadable formats to protect confidentiality, integrity, and authenticity.</text:p>
      <text:p text:style-name="P25"><text:span text:style-name="T1">Q: </text:span>What are the different types of cryptography?</text:p>
      <text:p text:style-name="P25"><text:span text:style-name="T1">A: </text:span>Symmetric encryption (single shared key), asymmetric encryption (public-private key pairs), and cryptographic hashing (one-way functions).</text:p>
      <text:p text:style-name="P25"><text:span text:style-name="T1">Q: </text:span>What is Encryption?</text:p>
      <text:p text:style-name="P25"><text:span text:style-name="T1">A: </text:span>The process of transforming plaintext into ciphertext using an algorithm and key, rendering data unreadable without the appropriate decryption key.</text:p>
      <text:p text:style-name="P25"><text:span text:style-name="T1">Q: </text:span>What is Decryption?</text:p>
      <text:p text:style-name="P25"><text:span text:style-name="T1">A: </text:span>The reverse process of converting ciphertext back into readable plaintext using the correct cryptographic key.</text:p>
      <text:p text:style-name="P25"><text:span text:style-name="T1">Q: </text:span>What is the importance of cryptography?</text:p>
      <text:p text:style-name="P25"><text:span text:style-name="T1">A: </text:span>It protects sensitive data at rest and in transit, ensures authentication, prevents tampering, and maintains regulatory compliance across digital systems.</text:p>
      <text:p text:style-name="P25"><text:span text:style-name="T1">Q: </text:span>What are the types of cryptography?</text:p>
      <text:p text:style-name="P25"><text:span text:style-name="T1">A: </text:span>Symmetric cryptography uses one shared secret key, asymmetric uses mathematically linked public-private key pairs, and hashing produces irreversible fixed-length digests for integrity verification.</text:p>
      <text:p text:style-name="P25"><text:span text:style-name="T1">Q: </text:span>What are the applications of cryptography?</text:p>
      <text:p text:style-name="P25"><text:span text:style-name="T1">A: </text:span>Secure communications (TLS/SSL), disk encryption, digital signatures, cryptocurrency/blockchain, authentication systems, VPN tunneling, and secure key exchange protocols.</text:p>
      <text:p text:style-name="P25"><text:span text:style-name="T1">Q: </text:span>What is a hash algorithm?</text:p>
      <text:p text:style-name="P25"><text:span text:style-name="T1">A: </text:span>A one-way mathematical function that converts arbitrary-length input into a fixed-length deterministic output used for integrity checks and password storage without reversible decryption.</text:p>
      <text:p text:style-name="P25"><text:span text:style-name="T1">Q: </text:span>What SHA stands for?</text:p>
      <text:p text:style-name="P25"><text:span text:style-name="T1">A: </text:span>Secure Hash Algorithm, a family of cryptographic hash functions published by NIST producing digests of varying bit lengths (SHA-1, SHA-256, SHA-512, etc.).</text:p>
      <text:p text:style-name="P25"><text:span text:style-name="T1">Q: </text:span>What is John the Ripper?</text:p>
      <text:p text:style-name="P25"><text:span text:style-name="T1">A: </text:span>An open-source password cracking tool that recovers passwords from hashed formats using dictionary attacks, brute force, and rule-based transformations.</text:p>
      <text:p text:style-name="P26"><text:span text:style-name="T2">Q: </text:span><text:span text:style-name="T3">How to use John the Ripper?</text:span></text:p>
      <text:p text:style-name="P26"><text:soft-page-break/><text:span text:style-name="T2">A: </text:span><text:span text:style-name="T3">Run </text:span><text:span text:style-name="Source_20_Text"><text:span text:style-name="T3">john</text:span></text:span><text:span text:style-name="T3"> against a hash file specifying format with </text:span><text:span text:style-name="Source_20_Text"><text:span text:style-name="T3">--format=</text:span></text:span><text:span text:style-name="T3">, optional wordlist with </text:span><text:span text:style-name="Source_20_Text"><text:span text:style-name="T3">--wordlist=</text:span></text:span><text:span text:style-name="T3">, and rules with </text:span><text:span text:style-name="Source_20_Text"><text:span text:style-name="T3">--rules</text:span></text:span><text:span text:style-name="T3">; cracked passwords display via </text:span><text:span text:style-name="Source_20_Text"><text:span text:style-name="T3">--show</text:span></text:span><text:span text:style-name="T3">.</text:span></text:p>
      <text:p text:style-name="P26"><text:span text:style-name="T2">Q: </text:span><text:span text:style-name="T3">How to crack advanced hashes with John the Ripper?</text:span></text:p>
      <text:p text:style-name="P26"><text:span text:style-name="T2">A:</text:span><text:span text:style-name="T3"> Specify exact hash format, apply aggressive rule sets (</text:span><text:span text:style-name="Source_20_Text"><text:span text:style-name="T3">--rules=Jumbo</text:span></text:span><text:span text:style-name="T3">), use large/custom wordlists, enable incremental mode, and leverage dynamic magic for auto-detection.</text:span></text:p>
      <text:p text:style-name="P25"><text:span text:style-name="T1">Q: </text:span>What is hashcat?</text:p>
      <text:p text:style-name="P25"><text:span text:style-name="T1">A:</text:span> A high-performance password recovery tool leveraging GPU acceleration to crack hashes significantly faster than CPU-based tools, supporting hundreds of hash types and multiple attack modes.</text:p>
      <text:p text:style-name="P26"><text:span text:style-name="T2">Q: </text:span><text:span text:style-name="T3">How to use hashcat?</text:span></text:p>
      <text:p text:style-name="P26"><text:span text:style-name="T2">A:</text:span><text:span text:style-name="T3"> Execute </text:span><text:span text:style-name="Source_20_Text"><text:span text:style-name="T3">hashcat</text:span></text:span><text:span text:style-name="T3"> with the hash file, hash type identifier (</text:span><text:span text:style-name="Source_20_Text"><text:span text:style-name="T3">-m #</text:span></text:span><text:span text:style-name="T3">), attack mode (</text:span><text:span text:style-name="Source_20_Text"><text:span text:style-name="T3">-a #</text:span></text:span><text:span text:style-name="T3">), and wordlist/mask path; cracked results display with </text:span><text:span text:style-name="Source_20_Text"><text:span text:style-name="T3">--show</text:span></text:span><text:span text:style-name="T3">.</text:span></text:p>
      <text:h text:style-name="P23" text:outline-level="1">Authentication vs Authorization</text:h>
      <text:p text:style-name="P27"><text:span text:style-name="Strong_20_Emphasis"><text:span text:style-name="T3">General Concepts</text:span></text:span></text:p>
      <text:p text:style-name="P28"><text:span text:style-name="Strong_20_Emphasis"><text:span text:style-name="T3">Q:</text:span></text:span><text:span text:style-name="T3"> What is the purpose of authentication in computer security?</text:span></text:p>
      <text:p text:style-name="P28"><text:span text:style-name="Strong_20_Emphasis"><text:span text:style-name="T3">A:</text:span></text:span><text:span text:style-name="T3"> Authentication verifies the identity of a user, system, or entity requesting access.</text:span></text:p>
      <text:p text:style-name="P28"><text:span text:style-name="Strong_20_Emphasis"><text:span text:style-name="T3">Q:</text:span></text:span><text:span text:style-name="T3"> What is the purpose of authorization in access control systems?</text:span></text:p>
      <text:p text:style-name="P28"><text:span text:style-name="Strong_20_Emphasis"><text:span text:style-name="T3">A:</text:span></text:span><text:span text:style-name="T3"> Authorization determines what actions and resources an authenticated entity is permitted to access.</text:span></text:p>
      <text:p text:style-name="P28"><text:span text:style-name="Strong_20_Emphasis"><text:span text:style-name="T3">Q:</text:span></text:span><text:span text:style-name="T3"> What are the fundamental differences between authentication and authorization?</text:span></text:p>
      <text:p text:style-name="P28"><text:span text:style-name="Strong_20_Emphasis"><text:span text:style-name="T3">A:</text:span></text:span><text:span text:style-name="T3"> Authentication confirms </text:span><text:span text:style-name="Emphasis"><text:span text:style-name="T3">who</text:span></text:span><text:span text:style-name="T3"> you are; authorization determines </text:span><text:span text:style-name="Emphasis"><text:span text:style-name="T3">what</text:span></text:span><text:span text:style-name="T3"> you can do.</text:span></text:p>
      <text:p text:style-name="P28"><text:span text:style-name="Strong_20_Emphasis"><text:span text:style-name="T3">Q:</text:span></text:span><text:span text:style-name="T3"> What is the correct sequence of authentication and authorization in security systems?</text:span></text:p>
      <text:p text:style-name="P28"><text:span text:style-name="Strong_20_Emphasis"><text:span text:style-name="T3">A:</text:span></text:span><text:span text:style-name="T3"> Authentication always occurs first, followed by authorization — you must prove identity before permissions can be evaluated.</text:span></text:p>
      <text:p text:style-name="Horizontal_20_Line"/>
      <text:p text:style-name="P29"><text:span text:style-name="Strong_20_Emphasis"><text:span text:style-name="T3">Authentication</text:span></text:span></text:p>
      <text:p text:style-name="P28"><text:span text:style-name="Strong_20_Emphasis"><text:span text:style-name="T3">Q:</text:span></text:span><text:span text:style-name="T3"> What are the three main authentication factors?</text:span></text:p>
      <text:p text:style-name="P28"><text:span text:style-name="Strong_20_Emphasis"><text:span text:style-name="T3">A:</text:span></text:span><text:span text:style-name="T3"> Something you know (password/PIN), something you have (token/smart card), and something you are (biometrics).</text:span></text:p>
      <text:p text:style-name="P28"><text:span text:style-name="Strong_20_Emphasis"><text:span text:style-name="T3">Q:</text:span></text:span><text:span text:style-name="T3"> How does the authentication process work?</text:span></text:p>
      <text:p text:style-name="P28"><text:span text:style-name="Strong_20_Emphasis"><text:span text:style-name="T3">A:</text:span></text:span><text:span text:style-name="T3"> A subject presents credentials which are validated against a stored identity record, and a token or session is issued upon success.</text:span></text:p>
      <text:p text:style-name="P28"><text:span text:style-name="Strong_20_Emphasis"><text:span text:style-name="T3">Q:</text:span></text:span><text:span text:style-name="T3"> What are the main authentication protocols?</text:span></text:p>
      <text:p text:style-name="P28"><text:span text:style-name="Strong_20_Emphasis"><text:span text:style-name="T3">A:</text:span></text:span><text:span text:style-name="T3"> OAuth 2.0, OpenID Connect (OIDC), SAML, Kerberos, and RADIUS.</text:span></text:p>
      <text:p text:style-name="P28"><text:soft-page-break/><text:span text:style-name="Strong_20_Emphasis"><text:span text:style-name="T3">Q:</text:span></text:span><text:span text:style-name="T3"> What is the difference between single-factor and multi-factor authentication?</text:span></text:p>
      <text:p text:style-name="P28"><text:span text:style-name="Strong_20_Emphasis"><text:span text:style-name="T3">A:</text:span></text:span><text:span text:style-name="T3"> Single-factor uses one credential type, while MFA combines two or more distinct factors, significantly reducing compromise risk.</text:span></text:p>
      <text:p text:style-name="P28"><text:span text:style-name="Strong_20_Emphasis"><text:span text:style-name="T3">Q:</text:span></text:span><text:span text:style-name="T3"> What HTTP status code indicates authentication failure?</text:span></text:p>
      <text:p text:style-name="P28"><text:span text:style-name="Strong_20_Emphasis"><text:span text:style-name="T3">A:</text:span></text:span><text:span text:style-name="T3"> </text:span><text:span text:style-name="Strong_20_Emphasis"><text:span text:style-name="T3">401 Unauthorized</text:span></text:span><text:span text:style-name="T3"> indicates authentication failure (despite the misleading name).</text:span></text:p>
      <text:p text:style-name="Horizontal_20_Line"/>
      <text:p text:style-name="P29"><text:span text:style-name="Strong_20_Emphasis"><text:span text:style-name="T3">Authorization</text:span></text:span></text:p>
      <text:p text:style-name="P28"><text:span text:style-name="Strong_20_Emphasis"><text:span text:style-name="T3">Q:</text:span></text:span><text:span text:style-name="T3"> What are the main authorization models?</text:span></text:p>
      <text:p text:style-name="P28"><text:span text:style-name="Strong_20_Emphasis"><text:span text:style-name="T3">A:</text:span></text:span><text:span text:style-name="T3"> RBAC, ABAC, ACL (Access Control List), MAC (Mandatory Access Control), and DAC (Discretionary Access Control).</text:span></text:p>
      <text:p text:style-name="P28"><text:span text:style-name="Strong_20_Emphasis"><text:span text:style-name="T3">Q:</text:span></text:span><text:span text:style-name="T3"> How does Role-Based Access Control (RBAC) work?</text:span></text:p>
      <text:p text:style-name="P28"><text:span text:style-name="Strong_20_Emphasis"><text:span text:style-name="T3">A:</text:span></text:span><text:span text:style-name="T3"> Permissions are assigned to roles, and users inherit those permissions by being assigned to the appropriate role.</text:span></text:p>
      <text:p text:style-name="P28"><text:span text:style-name="Strong_20_Emphasis"><text:span text:style-name="T3">Q:</text:span></text:span><text:span text:style-name="T3"> How does Attribute-Based Access Control (ABAC) differ from RBAC?</text:span></text:p>
      <text:p text:style-name="P28"><text:span text:style-name="Strong_20_Emphasis"><text:span text:style-name="T3">A:</text:span></text:span><text:span text:style-name="T3"> ABAC evaluates dynamic attributes (user, resource, environment, action) rather than static roles, enabling finer-grained and context-aware decisions.</text:span></text:p>
      <text:p text:style-name="P28"><text:span text:style-name="Strong_20_Emphasis"><text:span text:style-name="T3">Q:</text:span></text:span><text:span text:style-name="T3"> What are the components of authorization?</text:span></text:p>
      <text:p text:style-name="P28"><text:span text:style-name="Strong_20_Emphasis"><text:span text:style-name="T3">A:</text:span></text:span><text:span text:style-name="T3"> Subject (requester), action (operation), resource (target object), and policy/context (rules governing the decision).</text:span></text:p>
      <text:p text:style-name="P28"><text:span text:style-name="Strong_20_Emphasis"><text:span text:style-name="T3">Q:</text:span></text:span><text:span text:style-name="T3"> What HTTP status code indicates authorization failure?</text:span></text:p>
      <text:p text:style-name="P28"><text:span text:style-name="Strong_20_Emphasis"><text:span text:style-name="T3">A:</text:span></text:span><text:span text:style-name="T3"> </text:span><text:span text:style-name="Strong_20_Emphasis"><text:span text:style-name="T3">403 Forbidden</text:span></text:span><text:span text:style-name="T3"> indicates the authenticated user lacks permission for the requested resource.</text:span></text:p>
      <text:p text:style-name="Horizontal_20_Line"/>
      <text:p text:style-name="P29"><text:span text:style-name="Strong_20_Emphasis"><text:span text:style-name="T3">Security Best Practices</text:span></text:span></text:p>
      <text:p text:style-name="P28"><text:span text:style-name="Strong_20_Emphasis"><text:span text:style-name="T3">Q:</text:span></text:span><text:span text:style-name="T3"> What are the advantages of implementing both authentication and authorization?</text:span></text:p>
      <text:p text:style-name="P28"><text:span text:style-name="Strong_20_Emphasis"><text:span text:style-name="T3">A:</text:span></text:span><text:span text:style-name="T3"> Together they enforce defense-in-depth — ensuring only verified identities access only their permitted resources.</text:span></text:p>
      <text:p text:style-name="P28"><text:span text:style-name="Strong_20_Emphasis"><text:span text:style-name="T3">Q:</text:span></text:span><text:span text:style-name="T3"> What are the security risks of skipping authentication or authorization?</text:span></text:p>
      <text:p text:style-name="P28"><text:span text:style-name="Strong_20_Emphasis"><text:span text:style-name="T3">A:</text:span></text:span><text:span text:style-name="T3"> Skipping authentication allows impersonation and uncontrolled entry; skipping authorization lets any authenticated user access all resources, leading to privilege escalation and data breaches.</text:span></text:p>
      <text:p text:style-name="P28"><text:span text:style-name="Strong_20_Emphasis"><text:span text:style-name="T3">Q:</text:span></text:span><text:span text:style-name="T3"> How do authentication and authorization work together to protect systems?</text:span></text:p>
      <text:p text:style-name="P28"><text:span text:style-name="Strong_20_Emphasis"><text:span text:style-name="T3">A:</text:span></text:span><text:span text:style-name="T3"> Authentication gates entry by verifying identity, then authorization restricts scope by enforcing least-privilege access policies.</text:span></text:p>
      <text:p text:style-name="P28"><text:span text:style-name="Strong_20_Emphasis"><text:span text:style-name="T3">Q:</text:span></text:span><text:span text:style-name="T3"> What is the difference between a username/password and biometric authentication?</text:span></text:p>
      <text:p text:style-name="P28"><text:span text:style-name="Strong_20_Emphasis"><text:span text:style-name="T3">A:</text:span></text:span><text:span text:style-name="T3"> Username/password is a knowledge factor that can be shared or reset, while biometrics is an inherent factor that is unique to the individual and cannot be easily changed if compromis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7:46:03.012664574</meta:creation-date>
    <dc:date>2026-06-23T18:49:03.257067952</dc:date>
    <meta:editing-duration>PT1H2M51S</meta:editing-duration>
    <meta:editing-cycles>22</meta:editing-cycles>
    <meta:generator>LibreOffice/26.2.4.2$Linux_X86_64 LibreOffice_project/f4d82cf4d44730936b3f1a72d05a6253f577d3e9</meta:generator>
    <meta:document-statistic meta:table-count="0" meta:image-count="0" meta:object-count="0" meta:page-count="11" meta:paragraph-count="254" meta:word-count="3446" meta:character-count="24060" meta:non-whitespace-character-count="20872"/>
  </office:meta>
</office:document-meta>
</file>