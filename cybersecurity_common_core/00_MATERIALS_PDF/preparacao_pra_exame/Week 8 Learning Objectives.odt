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0241b"/>
    </style:style>
    <style:style style:name="P2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fo:font-size="14pt" officeooo:paragraph-rsid="0010241b" style:font-size-asian="14pt" style:font-size-complex="14pt"/>
    </style:style>
    <style:style style:name="P3" style:family="paragraph" style:parent-style-name="Preformatted_20_Text"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fo:font-size="14pt" style:font-size-asian="14pt" style:font-size-complex="14pt"/>
    </style:style>
    <style:style style:name="P6" style:family="paragraph" style:parent-style-name="Heading_20_1">
      <style:text-properties style:font-name="Liberation Serif" fo:font-size="14pt" style:font-size-asian="14pt" style:font-size-complex="14pt"/>
    </style:style>
    <style:style style:name="P7" style:family="paragraph" style:parent-style-name="Text_20_body">
      <style:text-properties style:font-name="Liberation Serif" fo:font-size="12pt" style:font-size-asian="12pt" style:font-size-complex="12pt"/>
    </style:style>
    <style:style style:name="P8" style:family="paragraph" style:parent-style-name="Text_20_body">
      <style:text-properties officeooo:paragraph-rsid="00119790" style:font-size-asian="12pt"/>
    </style:style>
    <style:style style:name="P9" style:family="paragraph" style:parent-style-name="Text_20_body">
      <style:text-properties style:font-size-asian="12pt"/>
    </style:style>
    <style:style style:name="P10" style:family="paragraph" style:parent-style-name="Standard"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learningobjectives"/>Learning Objectives</text:h>
      <text:h text:style-name="P2" text:outline-level="1"/>
      <text:h text:style-name="P2" text:outline-level="1">Threat Modeling Fundamentals</text:h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Q: Explain the CIA Triad and why it matters in cybersecurity</text:span></text:span></text:p>
      <text:p text:style-name="Preformatted_20_Text"><text:span text:style-name="Source_20_Text"><text:span text:style-name="T1">A: The CIA Triad consists of Confidentiality, Integrity, and Availability—three core principles that guide security controls to protect information assets.</text:span></text:span></text:p>
      <text:p text:style-name="P3"/>
      <text:p text:style-name="Preformatted_20_Text"><text:span text:style-name="Source_20_Text"><text:span text:style-name="T1">Q: Distinguish between assets, threats, vulnerabilities, and risks</text:span></text:span></text:p>
      <text:p text:style-name="Preformatted_20_Text"><text:span text:style-name="Source_20_Text"><text:span text:style-name="T1">A: Assets are valuable resources, threats are potential danger sources, vulnerabilities are weaknesses, and risks represent the probability and impact of threats exploiting vulnerabilities.</text:span></text:span></text:p>
      <text:p text:style-name="P3"/>
      <text:p text:style-name="Preformatted_20_Text"><text:span text:style-name="Source_20_Text"><text:span text:style-name="T1">Q: Identify trust boundaries in system architectures</text:span></text:span></text:p>
      <text:p text:style-name="Preformatted_20_Text"><text:span text:style-name="Source_20_Text"><text:span text:style-name="T1">A: Trust boundaries mark where data transitions between different levels of trust, such as between untrusted networks and protected internal systems.</text:span></text:span></text:p>
      <text:p text:style-name="P3"/>
      <text:p text:style-name="Preformatted_20_Text"><text:span text:style-name="Source_20_Text"><text:span text:style-name="T1">Q: Calculate basic risk scores using industry-standard methods</text:span></text:span></text:p>
      <text:p text:style-name="Preformatted_20_Text"><text:span text:style-name="Source_20_Text"><text:span text:style-name="T1">A: Basic risk scores typically multiply likelihood and impact values (e.g., Risk = Likelihood × Impact) on standardized scales like 1-5 or 1-10.</text:span></text:span></text:p>
      <text:p text:style-name="P3"/>
      <text:p text:style-name="Preformatted_20_Text"><text:span text:style-name="Source_20_Text"><text:span text:style-name="T1">Q: Apply STRIDE methodology to analyze system components</text:span></text:span></text:p>
      <text:p text:style-name="Preformatted_20_Text"><text:span text:style-name="Source_20_Text"><text:span text:style-name="T1">A: STRIDE categorizes threats into Spoofing, Tampering, Repudiation, Information Disclosure, Denial of Service, and Elevation of Privilege across system components.</text:span></text:span></text:p>
      <text:p text:style-name="P3"/>
      <text:p text:style-name="Preformatted_20_Text"><text:span text:style-name="Source_20_Text"><text:span text:style-name="T1">Q: Use DREAD scoring to prioritize security threats</text:span></text:span></text:p>
      <text:p text:style-name="Preformatted_20_Text"><text:span text:style-name="Source_20_Text"><text:span text:style-name="T1">A: DREAD rates threats by Damage Potential, Reproducibility, Exploitability, Affected Users, and Discoverability, each scored 1-10 for an overall risk rating.</text:span></text:span></text:p>
      <text:p text:style-name="P3"/>
      <text:p text:style-name="Preformatted_20_Text"><text:span text:style-name="Source_20_Text"><text:span text:style-name="T1">Q: Understand PASTA process fundamentals for risk-centric threat analysis</text:span></text:span></text:p>
      <text:p text:style-name="Preformatted_20_Text"><text:span text:style-name="Source_20_Text"><text:span text:style-name="T1">A: PASTA (Process for Attack Simulation and Threat Analysis) is a seven-stage framework aligning business objectives with technical requirements through attack simulation.</text:span></text:span></text:p>
      <text:p text:style-name="P3"/>
      <text:p text:style-name="Preformatted_20_Text"><text:span text:style-name="Source_20_Text"><text:span text:style-name="T1">Q: Create a prioritized threat list for remediation</text:span></text:span></text:p>
      <text:p text:style-name="Preformatted_20_Text"><text:span text:style-name="Source_20_Text"><text:span text:style-name="T1">A: Prioritize threats based on risk scores, considering business impact, exploit likelihood, available mitigations, and regulatory compliance requirements.</text:span></text:span></text:p>
      <text:p text:style-name="P3"/>
      <text:p text:style-name="Preformatted_20_Text"><text:span text:style-name="Source_20_Text"><text:span text:style-name="T1">Q: Propose specific, actionable mitigations for identified threats</text:span></text:span></text:p>
      <text:p text:style-name="Preformatted_20_Text"><text:span text:style-name="Source_20_Text"><text:span text:style-name="T1">A: Implement layered controls including input validation, authentication hardening, encryption, least privilege access, and regular security testing.</text:span></text:span></text:p>
      <text:p text:style-name="P3"/>
      <text:p text:style-name="Preformatted_20_Text"><text:span text:style-name="Source_20_Text"><text:span text:style-name="T1">Q: Follow a structured steps threat modeling process</text:span></text:span></text:p>
      <text:p text:style-name="P4"><text:span text:style-name="Source_20_Text"><text:span text:style-name="T1">A: A structured approach includes defining scope, identifying assets, diagramming architecture, identifying threats, analyzing impacts, and documenting mitigations with ownership.</text:span></text:span></text:p>
      <text:h text:style-name="P5" text:outline-level="1">Security Policy Analysis</text:h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Q: What is a security policy and why is it important?</text:span></text:span></text:p>
      <text:p text:style-name="Preformatted_20_Text"><text:span text:style-name="Source_20_Text"><text:span text:style-name="T1">A: A security policy is a formal document defining an organization's approach to protecting information assets, establishing expectations and requirements for security posture.</text:span></text:span></text:p>
      <text:p text:style-name="P3"/>
      <text:p text:style-name="Preformatted_20_Text"><text:soft-page-break/><text:span text:style-name="Source_20_Text"><text:span text:style-name="T1">Q: What are the different types of security policies?</text:span></text:span></text:p>
      <text:p text:style-name="Preformatted_20_Text"><text:span text:style-name="Source_20_Text"><text:span text:style-name="T1">A: Common types include organizational, issue-specific, and system-specific policies covering areas like access control, data handling, acceptable use, and incident response.</text:span></text:span></text:p>
      <text:p text:style-name="P3"/>
      <text:p text:style-name="Preformatted_20_Text"><text:span text:style-name="Source_20_Text"><text:span text:style-name="T1">Q: What is the difference between a policy, standard, procedure, and guideline?</text:span></text:span></text:p>
      <text:p text:style-name="Preformatted_20_Text"><text:span text:style-name="Source_20_Text"><text:span text:style-name="T1">A: Policies define mandatory rules, standards set specific technical requirements, procedures outline step-by-step implementation, and guidelines offer recommended best practices.</text:span></text:span></text:p>
      <text:p text:style-name="P3"/>
      <text:p text:style-name="Preformatted_20_Text"><text:span text:style-name="Source_20_Text"><text:span text:style-name="T1">Q: How do security policies align with business objectives?</text:span></text:span></text:p>
      <text:p text:style-name="Preformatted_20_Text"><text:span text:style-name="Source_20_Text"><text:span text:style-name="T1">A: Policies balance risk management with operational needs by translating business goals into security requirements that enable rather than hinder productivity.</text:span></text:span></text:p>
      <text:p text:style-name="P3"/>
      <text:p text:style-name="Preformatted_20_Text"><text:span text:style-name="Source_20_Text"><text:span text:style-name="T1">Q: What are the essential elements of a security policy?</text:span></text:span></text:p>
      <text:p text:style-name="Preformatted_20_Text"><text:span text:style-name="Source_20_Text"><text:span text:style-name="T1">A: Key elements include purpose, scope, roles and responsibilities, compliance requirements, enforcement mechanisms, review cycles, and exception processes.</text:span></text:span></text:p>
      <text:p text:style-name="P3"/>
      <text:p text:style-name="Preformatted_20_Text"><text:span text:style-name="Source_20_Text"><text:span text:style-name="T1">Q: How do you define scope and applicability?</text:span></text:span></text:p>
      <text:p text:style-name="Preformatted_20_Text"><text:span text:style-name="Source_20_Text"><text:span text:style-name="T1">A: Scope specifies who must comply (employees, contractors, systems), which assets are covered, and where boundaries apply across organizational environments.</text:span></text:span></text:p>
      <text:p text:style-name="P3"/>
      <text:p text:style-name="Preformatted_20_Text"><text:span text:style-name="Source_20_Text"><text:span text:style-name="T1">Q: What is policy enforcement and compliance?</text:span></text:span></text:p>
      <text:p text:style-name="Preformatted_20_Text"><text:span text:style-name="Source_20_Text"><text:span text:style-name="T1">A: Enforcement ensures adherence through monitoring, audits, and consequences while compliance validates alignment with internal policies and external regulations.</text:span></text:span></text:p>
      <text:p text:style-name="P3"/>
      <text:p text:style-name="Preformatted_20_Text"><text:span text:style-name="Source_20_Text"><text:span text:style-name="T1">Q: How often should policies be reviewed and updated?</text:span></text:span></text:p>
      <text:p text:style-name="Preformatted_20_Text"><text:span text:style-name="Source_20_Text"><text:span text:style-name="T1">A: Policies should undergo formal review at least annually or whenever significant changes occur to technology, operations, threats, or regulatory requirements.</text:span></text:span></text:p>
      <text:p text:style-name="P3"/>
      <text:p text:style-name="Preformatted_20_Text"><text:span text:style-name="Source_20_Text"><text:span text:style-name="T1">Q: What is an Acceptable Use Policy (AUP)?</text:span></text:span></text:p>
      <text:p text:style-name="Preformatted_20_Text"><text:span text:style-name="Source_20_Text"><text:span text:style-name="T1">A: An AUP defines appropriate employee behavior when using organizational IT resources, including internet, email, devices, and network access restrictions.</text:span></text:span></text:p>
      <text:p text:style-name="P3"/>
      <text:p text:style-name="Preformatted_20_Text"><text:span text:style-name="Source_20_Text"><text:span text:style-name="T1">Q: What is an Access Control Policy?</text:span></text:span></text:p>
      <text:p text:style-name="Preformatted_20_Text"><text:span text:style-name="Source_20_Text"><text:span text:style-name="T1">A: This policy governs how authentication, authorization, and accounting mechanisms control who can access specific systems, data, and facilities within the organization.</text:span></text:span></text:p>
      <text:p text:style-name="P3"/>
      <text:p text:style-name="Preformatted_20_Text"><text:span text:style-name="Source_20_Text"><text:span text:style-name="T1">Q: What is an Incident Response Policy?</text:span></text:span></text:p>
      <text:p text:style-name="Preformatted_20_Text"><text:span text:style-name="Source_20_Text"><text:span text:style-name="T1">A: An Incident Response Policy establishes procedures for detecting, reporting, containing, investigating, and recovering from security incidents and breaches.</text:span></text:span></text:p>
      <text:p text:style-name="P3"/>
      <text:p text:style-name="Preformatted_20_Text"><text:span text:style-name="Source_20_Text"><text:span text:style-name="T1">Q: What is a Data Classification Policy?</text:span></text:span></text:p>
      <text:p text:style-name="Preformatted_20_Text"><text:span text:style-name="Source_20_Text"><text:span text:style-name="T1">A: This policy categorizes information based on sensitivity levels (public, internal, confidential, restricted) to determine appropriate handling and protection measures.</text:span></text:span></text:p>
      <text:p text:style-name="P3"/>
      <text:p text:style-name="Preformatted_20_Text"><text:span text:style-name="Source_20_Text"><text:span text:style-name="T1">Q: What is a Password Policy?</text:span></text:span></text:p>
      <text:p text:style-name="Preformatted_20_Text"><text:span text:style-name="Source_20_Text"><text:span text:style-name="T1">A: A Password Policy mandates complexity requirements, rotation schedules, storage rules, and multi-factor authentication to protect authentication credentials.</text:span></text:span></text:p>
      <text:p text:style-name="P3"/>
      <text:p text:style-name="Preformatted_20_Text"><text:span text:style-name="Source_20_Text"><text:span text:style-name="T1">Q: How do policies support regulatory compliance (GDPR, HIPAA, PCI-DSS)?</text:span></text:span></text:p>
      <text:p text:style-name="Preformatted_20_Text"><text:span text:style-name="Source_20_Text"><text:span text:style-name="T1">A: Policies translate legal requirements into internal controls ensuring data protection, audit trails, breach notification, and documented security practices for regulators.</text:span></text:span></text:p>
      <text:p text:style-name="P3"/>
      <text:p text:style-name="Preformatted_20_Text"><text:soft-page-break/><text:span text:style-name="Source_20_Text"><text:span text:style-name="T1">Q: What is a policy exception process?</text:span></text:span></text:p>
      <text:p text:style-name="Preformatted_20_Text"><text:span text:style-name="Source_20_Text"><text:span text:style-name="T1">A: Exception processes allow temporary deviations from policies when justified, requiring documented approval, compensating controls, risk acceptance, and defined expiration dates.</text:span></text:span></text:p>
      <text:p text:style-name="P3"/>
      <text:p text:style-name="Preformatted_20_Text"><text:span text:style-name="Source_20_Text"><text:span text:style-name="T1">Q: How do you measure policy effectiveness?</text:span></text:span></text:p>
      <text:p text:style-name="P4"><text:span text:style-name="Source_20_Text"><text:span text:style-name="T1">A: Effectiveness is measured through compliance audits, incident frequency trends, user awareness metrics, violation rates, and feedback from security control testing.</text:span></text:span></text:p>
      <text:h text:style-name="P6" text:outline-level="1">Exploring Career Pathways in Cybersecurity</text:h>
      <text:p text:style-name="P7"><text:span text:style-name="Strong_20_Emphasis">Career Pathways Understanding</text:span></text:p>
      <text:p text:style-name="P8">Q: What are the main career tracks in penetration testing and security?</text:p>
      <text:p text:style-name="P8">A: The primary tracks include offensive security (pentesting/red teaming), defensive security (blue team/SOC), GRC (governance, risk, compliance), and incident response.</text:p>
      <text:p text:style-name="P8">Q: How do offensive security roles differ from defensive security roles?</text:p>
      <text:p text:style-name="P8">A: Offensive roles simulate attacks to find weaknesses, while defensive roles monitor, detect, and respond to actual threats.</text:p>
      <text:p text:style-name="P8">Q: What is the career progression from junior to senior positions?</text:p>
      <text:p text:style-name="P8">A: Progression typically flows from Junior Analyst → Security Engineer/Specialist → Senior Engineer → Principal Architect → Leadership/CISO.</text:p>
      <text:p text:style-name="P8">Q: What are the emerging specializations in cybersecurity?</text:p>
      <text:p text:style-name="P8">A: Cloud security, AI/ML security, IoT/embedded systems, automotive security, and OT/ICS security are among the fastest-growing specializations.</text:p>
      <text:p text:style-name="P9"><text:span text:style-name="Strong_20_Emphasis">Role-Specific Knowledge</text:span></text:p>
      <text:p text:style-name="P8">Q: What does a penetration tester do on a day-to-day basis?</text:p>
      <text:p text:style-name="P8">A: They conduct authorized security assessments, test systems for vulnerabilities, document findings, write reports, and recommend remediation strategies.</text:p>
      <text:p text:style-name="P8">Q: What are the responsibilities of a red team operator vs. a vulnerability assessor?</text:p>
      <text:p text:style-name="P8">A: Red team operators simulate realistic multi-stage attacks while vulnerability assessors systematically scan and catalog known vulnerabilities.</text:p>
      <text:p text:style-name="P8">Q: How does a security consultant role differ from an in-house security engineer?</text:p>
      <text:p text:style-name="P8">A: Consultants serve multiple clients across diverse environments while in-house engineers develop deep expertise protecting one organization continuously.</text:p>
      <text:p text:style-name="P8">Q: What is the role of a bug bounty hunter and how viable is it as a career?</text:p>
      <text:p text:style-name="P8">A: Bug bounty hunters find vulnerabilities in exchange for bounties; viable as supplemental income but inconsistent full-time earnings without significant reputation.</text:p>
      <text:p text:style-name="P9"><text:span text:style-name="Strong_20_Emphasis"/></text:p>
      <text:p text:style-name="P9"><text:span text:style-name="Strong_20_Emphasis"/></text:p>
      <text:p text:style-name="P9"><text:soft-page-break/><text:span text:style-name="Strong_20_Emphasis">Skills &amp; Qualifications</text:span></text:p>
      <text:p text:style-name="P8">Q: What technical skills are essential for entry-level positions?</text:p>
      <text:p text:style-name="P8">A: Network fundamentals, Linux/Windows administration, basic scripting, and familiarity with security tools like Wireshark and Nmap.</text:p>
      <text:p text:style-name="P8">Q: What programming languages are most valuable for security professionals?</text:p>
      <text:p text:style-name="P8">A: Python, Bash, PowerShell, and SQL are most valuable, with C/C++ and JavaScript being beneficial for specific specializations.</text:p>
      <text:p text:style-name="P8">Q: How important are certifications in the hiring process?</text:p>
      <text:p text:style-name="P8">A: Certifications help pass resume filters and validate baseline knowledge, though practical experience typically carries more weight once past initial screening.</text:p>
      <text:p text:style-name="P8">Q: What soft skills are critical for advancement in security careers?</text:p>
      <text:p text:style-name="P8">A: Clear communication, analytical thinking, ethical judgment, collaboration, and the ability to explain technical risks to non-technical stakeholders.</text:p>
      <text:p text:style-name="P9"><text:span text:style-name="Strong_20_Emphasis">Certifications &amp; Education</text:span></text:p>
      <text:p text:style-name="P8">Q: What is the difference between OSCP, CEH, and GPEN certifications?</text:p>
      <text:p text:style-name="P8">A: OSCP is highly respected for hands-on exploitation skills, CEH covers broad theoretical concepts, and GPEN focuses on structured penetration testing methodology.</text:p>
      <text:p text:style-name="P8">Q: When should you pursue certifications vs. hands-on experience?</text:p>
      <text:p text:style-name="P8">A: Pursue certifications early to gain credibility, but prioritize hands-on labs and real-world practice throughout your entire career.</text:p>
      <text:p text:style-name="P8">Q: What are the most respected certifications at different career levels?</text:p>
      <text:p text:style-name="P8">A: Entry: Security+, Network+; Mid-level: OSCP, SANS/GIAC; Senior: CISSP, OSWE/OSEP depending on specialization.</text:p>
      <text:p text:style-name="P8">Q: How do employers view self-taught security professionals vs. degree holders?</text:p>
      <text:p text:style-name="P8">A: Employers increasingly value demonstrated skills and portfolios equally with degrees, particularly when backed by relevant certifications and practical experience.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2T11:49:21.024932836</meta:creation-date>
    <dc:date>2026-06-23T17:28:34.241085951</dc:date>
    <meta:editing-duration>PT10M55S</meta:editing-duration>
    <meta:editing-cycles>2</meta:editing-cycles>
    <meta:generator>LibreOffice/26.2.4.2$Linux_X86_64 LibreOffice_project/f4d82cf4d44730936b3f1a72d05a6253f577d3e9</meta:generator>
    <meta:document-statistic meta:table-count="0" meta:image-count="0" meta:object-count="0" meta:page-count="4" meta:paragraph-count="92" meta:word-count="1245" meta:character-count="9329" meta:non-whitespace-character-count="8177"/>
  </office:meta>
</office:document-meta>
</file>