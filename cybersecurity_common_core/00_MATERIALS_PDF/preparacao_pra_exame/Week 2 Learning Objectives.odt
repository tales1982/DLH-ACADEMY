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009a65" officeooo:paragraph-rsid="00009a65" style:font-size-asian="16pt" style:font-weight-asian="bold" style:font-size-complex="16pt" style:font-weight-complex="bold"/>
    </style:style>
    <style:style style:name="P2" style:family="paragraph" style:parent-style-name="Heading_20_1">
      <style:text-properties fo:font-size="14pt" officeooo:rsid="00009a65" officeooo:paragraph-rsid="00009a65" style:font-size-asian="14pt" style:font-size-complex="14pt"/>
    </style:style>
    <style:style style:name="P3" style:family="paragraph" style:parent-style-name="Text_20_body">
      <style:text-properties officeooo:rsid="00009a65" officeooo:paragraph-rsid="00009a65"/>
    </style:style>
    <style:style style:name="P4" style:family="paragraph" style:parent-style-name="Text_20_body">
      <style:text-properties officeooo:rsid="00009a65"/>
    </style:style>
    <style:style style:name="P5" style:family="paragraph" style:parent-style-name="Text_20_body">
      <style:text-properties fo:font-size="14pt" fo:font-weight="bold" officeooo:rsid="0001cd78" officeooo:paragraph-rsid="0001cd78" style:font-size-asian="14pt" style:font-weight-asian="bold" style:font-size-complex="14pt" style:font-weight-complex="bold"/>
    </style:style>
    <style:style style:name="P6" style:family="paragraph" style:parent-style-name="Text_20_body">
      <style:text-properties fo:font-weight="normal" officeooo:rsid="0001cd78" officeooo:paragraph-rsid="0001cd78" style:font-weight-asian="normal" style:font-weight-complex="normal"/>
    </style:style>
    <style:style style:name="P7" style:family="paragraph" style:parent-style-name="Text_20_body">
      <style:text-properties officeooo:rsid="0001cd78"/>
    </style:style>
    <style:style style:name="P8" style:family="paragraph" style:parent-style-name="Heading_20_1">
      <style:text-properties fo:font-size="12pt" officeooo:rsid="0001cd78" style:font-size-asian="12pt" style:font-size-complex="12pt"/>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ing Objectives</text:p>
      <text:h text:style-name="P2" text:outline-level="1">Permissions, SUID &amp; SGID</text:h>
      <text:p text:style-name="P3"><text:span text:style-name="Strong_20_Emphasis">What are the three user-based permission groups in Linux?</text:span> Owner, group, and others.</text:p>
      <text:p text:style-name="P4"><text:span text:style-name="Strong_20_Emphasis">What are the Linux commands chmod, sudo, su, chown, and chgrp used for?</text:span> chmod modifies file access rights, sudo executes commands with elevated privileges, su switches the current user identity, chown changes file ownership, and chgrp changes the associated group.</text:p>
      <text:p text:style-name="P4"><text:span text:style-name="Strong_20_Emphasis">What is the purpose of the setuid and setgid in Linux file permissions, and how do you use them?</text:span> setuid and setgid cause a file to execute with the permissions of its owner or group respectively and are applied using <text:span text:style-name="Source_20_Text">chmod u+s</text:span> or <text:span text:style-name="Source_20_Text">g+s</text:span>.</text:p>
      <text:p text:style-name="P4"><text:span text:style-name="Strong_20_Emphasis">What is the difference between the chown and chgrp commands?</text:span> chown is used to change both the user and group ownership of a file, whereas chgrp is restricted to changing only the group ownership.</text:p>
      <text:p text:style-name="P4"><text:span text:style-name="Strong_20_Emphasis">What are some best practices for managing file permissions on Linux?</text:span> Best practices include applying the principle of least privilege, avoiding world-writable permissions on sensitive files, and regularly auditing access controls.</text:p>
      <text:p text:style-name="P4"><text:span text:style-name="Strong_20_Emphasis">How can you audit file permissions changes on your system?</text:span> You can audit file permission changes by configuring auditd rules to monitor specific paths or by analyzing system logs for relevant syscalls.</text:p>
      <text:p text:style-name="P4"><text:span text:style-name="Strong_20_Emphasis">What is Umask in Linux?</text:span> Umask is a numeric mask that determines the default file creation permissions by subtracting specified bits from the system's maximum allowable permissions.</text:p>
      <text:p text:style-name="P5">MAC</text:p>
      <text:p text:style-name="P6"><text:span text:style-name="Strong_20_Emphasis">What is MAC in Linux?</text:span> MAC (Mandatory Access Control) is a security model where the system enforces access policies that users cannot modify, overriding traditional discretionary permissions.</text:p>
      <text:p text:style-name="P7"><text:span text:style-name="Strong_20_Emphasis">How does SELinux enforce MAC?</text:span> SELinux enforces MAC by attaching security labels to processes and objects and allowing or denying actions based on configurable policy rules.</text:p>
      <text:p text:style-name="P7"><text:span text:style-name="Strong_20_Emphasis">What are the differences between SELinux and AppArmor?</text:span> SELinux uses label-based policies with fine-grained type enforcement, while AppArmor uses path-based profiles that are generally simpler to configure and manage.</text:p>
      <text:p text:style-name="P7"><text:span text:style-name="Strong_20_Emphasis">What is the purpose of policy in MAC systems?</text:span> A policy defines the rules governing which interactions between subjects and objects are permitted, serving as the authoritative source for all access decisions.</text:p>
      <text:p text:style-name="P7"><text:span text:style-name="Strong_20_Emphasis">How do labels work in SELinux?</text:span> Labels assign a security context (user, role, type, and optionally level) to every process and object, and policy rules reference these labels to determine allowed operations.</text:p>
      <text:p text:style-name="P7"><text:span text:style-name="Strong_20_Emphasis">What are Type Enforcement, Role-Based Access Control, and Multi-Level Security in SELinux?</text:span> Type Enforcement governs access by process and object types, RBAC restricts which roles can access which types, and MLS adds hierarchical secrecy levels to prevent unauthorized information flow.</text:p>
      <text:p text:style-name="P7"><text:soft-page-break/><text:span text:style-name="Strong_20_Emphasis">How can you check the status of SELinux on a system?</text:span> Run <text:span text:style-name="Source_20_Text">sestatus</text:span> or <text:span text:style-name="Source_20_Text">getenforce</text:span> to see whether SELinux is enabled and whether it is running in enforcing, permissive, or disabled mode.</text:p>
      <text:p text:style-name="P7"><text:span text:style-name="Strong_20_Emphasis">What are common SELinux management commands?</text:span> Common commands include <text:span text:style-name="Source_20_Text">sestatus</text:span>, <text:span text:style-name="Source_20_Text">getenforce</text:span>, <text:span text:style-name="Source_20_Text">setenforce</text:span>, <text:span text:style-name="Source_20_Text">audit2allow</text:span>, <text:span text:style-name="Source_20_Text">restorecon</text:span>, <text:span text:style-name="Source_20_Text">chcon</text:span>, and <text:span text:style-name="Source_20_Text">semanage</text:span>.</text:p>
      <text:p text:style-name="P7"><text:span text:style-name="Strong_20_Emphasis">How do you set file contexts in SELinux?</text:span> Use <text:span text:style-name="Source_20_Text">chcon</text:span> for temporary context changes or <text:span text:style-name="Source_20_Text">semanage fcontext</text:span> with <text:span text:style-name="Source_20_Text">restorecon</text:span> for persistent, policy-backed modifications.</text:p>
      <text:p text:style-name="P7"><text:span text:style-name="Strong_20_Emphasis">What is an AppArmor profile?</text:span> An AppArmor profile is a set of rules defining what files, capabilities, and network accesses a confined application is permitted to use.</text:p>
      <text:p text:style-name="P7"><text:span text:style-name="Strong_20_Emphasis">How do you reload AppArmor profiles?</text:span> Run <text:span text:style-name="Source_20_Text">aa-disable</text:span> or <text:span text:style-name="Source_20_Text">aa-enforce</text:span> followed by <text:span text:style-name="Source_20_Text">apparmor_parser -r &lt;profile&gt;</text:span> or simply <text:span text:style-name="Source_20_Text">systemctl reload apparmor</text:span>.</text:p>
      <text:p text:style-name="P7"><text:span text:style-name="Strong_20_Emphasis">What is the concept of least privilege in MAC?</text:span> Least privilege means granting only the minimum access rights necessary for a process or user to perform their intended function, reducing the attack surface.</text:p>
      <text:p text:style-name="P7"><text:span text:style-name="Strong_20_Emphasis">How do you troubleshoot SELinux issues?</text:span> Check <text:span text:style-name="Source_20_Text">/var/log/audit/audit.log</text:span> for AVC denials, use <text:span text:style-name="Source_20_Text">audit2why</text:span> and <text:span text:style-name="Source_20_Text">audit2allow</text:span> to interpret them, and temporarily switch to permissive mode to isolate SELinux-related blocks.</text:p>
      <text:p text:style-name="P7"><text:span text:style-name="Strong_20_Emphasis">What is the significance of audit logs in MAC systems?</text:span> Audit logs record every policy denial and relevant access event, providing visibility into blocked operations and enabling administrators to refine policies.</text:p>
      <text:p text:style-name="P7"><text:span text:style-name="Strong_20_Emphasis">Can you explain the concept of capabilities in Linux security?</text:span> Capabilities break the monolithic root privilege into distinct units (e.g., CAP_NET_RAW, CAP_SYS_ADMIN), allowing fine-grained assignment of specific kernel-level permissions to processes without granting full root.</text:p>
      <text:p text:style-name="P7"><text:span text:style-name="Strong_20_Emphasis">How do you use semanage?</text:span> Use <text:span text:style-name="Source_20_Text">semanage</text:span> to modify SELinux policy components persistently—for example, <text:span text:style-name="Source_20_Text">semanage fcontext -a -t httpd_sys_content_t "/web(/.*)?"</text:span> to add a file context rule, followed by <text:span text:style-name="Source_20_Text">restorecon -R /web</text:span>.</text:p>
      <text:p text:style-name="P7"><text:span text:style-name="Strong_20_Emphasis"/></text:p>
      <text:p text:style-name="P7"><text:span text:style-name="Strong_20_Emphasis">Windows Fundamentals</text:span></text:p>
      <text:p text:style-name="P7"><text:span text:style-name="Strong_20_Emphasis">What is Windows and how does it differ from other operating systems? </text:span><text:span text:style-name="Strong_20_Emphasis"><text:span text:style-name="T1">Windows is a proprietary, GUI-centric operating system developed by Microsoft that relies on the NT kernel and closed-source architecture, distinguishing it from open-source or UNIX-like systems.</text:span></text:span></text:p>
      <text:p text:style-name="P7"><text:span text:style-name="Strong_20_Emphasis">What is the Windows architecture and how do kernel mode and user mode interact?</text:span> The architecture separates privileged kernel mode (handling hardware and core OS functions) from unprivileged user mode (running applications), with interactions occurring strictly through defined system calls and message passing to ensure stability.</text:p>
      <text:p text:style-name="P7"><text:span text:style-name="Strong_20_Emphasis">How does the Windows file system (NTFS) work and what are permissions and ACLs?</text:span> NTFS manages data storage using Master File Table records and enforces security via Access Control Lists (ACLs) containing Access Control Entries (ACEs) that define specific allow/deny rules for users and groups.</text:p>
      <text:p text:style-name="P7"><text:soft-page-break/><text:span text:style-name="Strong_20_Emphasis">What is the Windows Registry and what role does it play in system configuration?</text:span> The Registry is a hierarchical database storing low-level settings for the OS and applications, serving as the central repository for configuration data that replaces many legacy text-based config files.</text:p>
      <text:p text:style-name="P7"><text:span text:style-name="Strong_20_Emphasis">How does Windows manage users, groups, and access control?</text:span> Windows uses Security Identifiers (SIDs) to uniquely identify users and groups, applying access tokens generated at login to enforce permissions against objects secured by ACLs.</text:p>
      <text:p text:style-name="P7"><text:span text:style-name="Strong_20_Emphasis">How do you navigate the Windows interface and use built-in administrative tools?</text:span> Navigation is primarily graphical via the Start menu and File Explorer, while administrative tasks are performed using tools like Computer Management, Task Manager, PowerShell, and the Settings app.</text:p>
      <text:p text:style-name="P7"><text:span text:style-name="Strong_20_Emphasis">What are Windows processes and services and how do you monitor them?</text:span> Processes are active program instances running in memory, while services run in the background without direct user interaction; both are monitored and managed via Task Manager or the Services.msc console.</text:p>
      <text:p text:style-name="P7"><text:span text:style-name="Strong_20_Emphasis">How do you use the Command Prompt (cmd.exe) for basic system administration?</text:span> Command Prompt executes legacy DOS-style commands like <text:span text:style-name="Source_20_Text">dir</text:span>, <text:span text:style-name="Source_20_Text">ipconfig</text:span>, and <text:span text:style-name="Source_20_Text">netstat</text:span> to perform file management, network diagnostics, and system queries in a text-based interface.</text:p>
      <text:p text:style-name="P7"><text:span text:style-name="Strong_20_Emphasis">What are Windows Event Logs and how do you read and interpret them?</text:span> Event Logs record system, security, and application events chronologically, which administrators analyze using Event Viewer to troubleshoot issues, track security incidents, and monitor system health.</text:p>
      <text:p text:style-name="P7"><text:span text:style-name="Strong_20_Emphasis">What built-in security features does Windows provide, such as UAC, Windows Defender, and BitLocker?</text:span> Windows includes User Account Control (UAC) to limit privilege escalation, Windows Defender for real-time antivirus protection, and BitLocker for full-disk encryption of data volumes.</text:p>
      <text:p text:style-name="P7"><text:span text:style-name="Strong_20_Emphasis">How does Windows handle network configuration and connectivity?</text:span> Network configuration is managed through the Network and Sharing Center, PowerShell cmdlets, and the TCP/IP stack settings, utilizing DHCP, DNS, and firewall rules to establish and secure connections.</text:p>
      <text:p text:style-name="P7"><text:span text:style-name="Strong_20_Emphasis">What are common Windows-based attack surfaces and how can they be mitigated?</text:span> Common attack vectors include unpatched vulnerabilities, weak credentials, and exposed RDP ports, which are mitigated by regular updates, strong authentication policies, firewall restrictions, and disabling unnecessary services.</text:p>
      <text:h text:style-name="P8" text:outline-level="1">Forensic Ethics &amp; Methodologies</text:h>
      <text:p text:style-name="P7"><text:span text:style-name="Strong_20_Emphasis">What is digital forensics?</text:span> Digital forensics is the scientific process of identifying, preserving, analyzing, and presenting digital evidence in a manner that is legally admissible.</text:p>
      <text:p text:style-name="P7"><text:span text:style-name="Strong_20_Emphasis">Why is ethics important in digital forensics?</text:span> Ethics ensure investigators maintain public trust, protect individual privacy rights, and guarantee that evidence is handled impartially without bias or unauthorized access.</text:p>
      <text:p text:style-name="P7"><text:span text:style-name="Strong_20_Emphasis">What are common ethical issues in digital forensics?</text:span> Common issues include privacy violations, scope creep during data collection, conflicts of interest, and the accidental exposure of sensitive non-relevant information.</text:p>
      <text:p text:style-name="P7"><text:soft-page-break/><text:span text:style-name="Strong_20_Emphasis">What is the role of integrity in forensic analysis?</text:span> Integrity ensures that evidence remains unaltered from the time of seizure to presentation in court, typically verified through cryptographic hashing to prove authenticity.</text:p>
      <text:p text:style-name="P7"><text:span text:style-name="Strong_20_Emphasis">How does one maintain objectivity in digital investigations?</text:span> Objectivity is maintained by following standardized procedures, avoiding preconceived notions about the outcome, and documenting all findings regardless of whether they support the initial hypothesis.</text:p>
      <text:p text:style-name="P7"><text:span text:style-name="Strong_20_Emphasis">What are the ACPO principles for computer forensics?</text:span> The ACPO principles mandate that no action should change data, an audit trail must be created, the investigator must be competent, and law enforcement guidance must be followed throughout the process.</text:p>
      <text:p text:style-name="P7"><text:span text:style-name="Strong_20_Emphasis">How do you ensure evidence is admissible in court?</text:span> Evidence is made admissible by strictly adhering to legal standards, maintaining a documented chain of custody, using validated tools, and proving the evidence's authenticity and integrity.</text:p>
      <text:p text:style-name="P7"><text:span text:style-name="Strong_20_Emphasis">What is chain of custody and why is it crucial?</text:span> Chain of custody is the chronological documentation of who handled evidence, when, and why; it is crucial to prevent tampering claims and establish the evidence's reliability in legal proceedings.</text:p>
      <text:p text:style-name="P7"><text:span text:style-name="Strong_20_Emphasis">What are the stages of the digital forensic process?</text:span> The standard stages are identification, preservation, collection, examination, analysis, and reporting, often followed by presentation in legal or administrative settings.</text:p>
      <text:p text:style-name="P7"><text:span text:style-name="Strong_20_Emphasis">How does one document findings in a forensic report?</text:span> Findings are documented in a clear, reproducible report that details the methodology used, tools employed, step-by-step actions taken, and the specific results obtained without interpretation or bias.</text:p>
      <text:p text:style-name="P7"><text:span text:style-name="Strong_20_Emphasis">What are some standard digital forensic methodologies?</text:span> Standard methodologies include the NIST SP 800-86 framework, the Scientific Method applied to digital evidence, and industry-specific protocols like those from SANS or IACIS.</text:p>
      <text:p text:style-name="P7"><text:span text:style-name="Strong_20_Emphasis">How does one handle digital evidence to preserve its integrity?</text:span> Integrity is preserved by creating bit-for-bit forensic images, writing-blocking original media, calculating hash values before and after analysis, and storing evidence in secure, controlled environments.</text:p>
      <text:p text:style-name="P7"><text:span text:style-name="Strong_20_Emphasis">What are some common tools used in digital forensics?</text:span> Common tools include Autopsy (open source), EnCase, FTK (Forensic Toolkit), Wireshark for network analysis, and various write-blockers like Tableau or WiebeTech hardware.</text:p>
      <text:p text:style-name="P7"><text:span text:style-name="Strong_20_Emphasis">What organizations set standards for digital forensic practices?</text:span> Key organizations include NIST (National Institute of Standards and Technology), ISO (International Organization for Standardization), SWGDE (Scientific Working Group on Digital Evidence), and ENFSI.</text:p>
      <text:p text:style-name="P7"><text:span text:style-name="Strong_20_Emphasis">How do you stay current with evolving technology in forensics?</text:span> Investigators stay current through continuous education, attending conferences (like DFRWS), obtaining certifications (CFE, GCFA), and participating in professional communities and training workshops.</text:p>
      <text:p text:style-name="P7"><text:span text:style-name="Strong_20_Emphasis">What are the legal implications of digital forensic investigations?</text:span> Legal implications involve compliance with search and seizure laws (like the Fourth Amendment in the US), adherence to data protection regulations (like GDPR), and potential liability for mishandling evidence or violating privac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1T21:25:29.372589150</meta:creation-date>
    <dc:date>2026-06-21T21:36:56.735250523</dc:date>
    <meta:editing-duration>PT11M26S</meta:editing-duration>
    <meta:editing-cycles>4</meta:editing-cycles>
    <meta:generator>LibreOffice/26.2.4.2$Linux_X86_64 LibreOffice_project/f4d82cf4d44730936b3f1a72d05a6253f577d3e9</meta:generator>
    <meta:document-statistic meta:table-count="0" meta:image-count="0" meta:object-count="0" meta:page-count="4" meta:paragraph-count="56" meta:word-count="1701" meta:character-count="11882" meta:non-whitespace-character-count="10238"/>
  </office:meta>
</office:document-meta>
</file>