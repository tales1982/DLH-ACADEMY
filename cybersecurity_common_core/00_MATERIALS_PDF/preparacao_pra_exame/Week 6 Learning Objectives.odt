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2.25pt" style:font-size-complex="14pt"/>
    </style:style>
    <style:style style:name="P2" style:family="paragraph" style:parent-style-name="Text_20_body">
      <style:text-properties fo:font-size="12pt" officeooo:paragraph-rsid="001cf89f" style:font-size-asian="10.5pt" style:font-size-complex="12pt"/>
    </style:style>
    <style:style style:name="P3" style:family="paragraph" style:parent-style-name="Text_20_body">
      <style:text-properties fo:font-size="12pt" fo:font-weight="normal" officeooo:paragraph-rsid="001cf89f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1cf89f"/>
    </style:style>
    <style:style style:name="P5" style:family="paragraph" style:parent-style-name="Text_20_body">
      <style:text-properties fo:font-weight="normal" officeooo:paragraph-rsid="001cf89f" style:font-weight-asian="normal" style:font-weight-complex="normal"/>
    </style:style>
    <style:style style:name="P6" style:family="paragraph" style:parent-style-name="Text_20_body">
      <style:text-properties officeooo:paragraph-rsid="001e6f47"/>
    </style:style>
    <style:style style:name="P7" style:family="paragraph" style:parent-style-name="Text_20_body">
      <style:text-properties fo:font-weight="normal" officeooo:paragraph-rsid="001e6f47" style:font-weight-asian="normal" style:font-weight-complex="normal"/>
    </style:style>
    <style:style style:name="P8" style:family="paragraph" style:parent-style-name="Heading_20_1">
      <style:text-properties fo:font-weight="bold" officeooo:paragraph-rsid="001e6f47" style:font-weight-asian="bold" style:font-weight-complex="bold"/>
    </style:style>
    <style:style style:name="P9" style:family="paragraph" style:parent-style-name="Text_20_body">
      <style:text-properties fo:font-size="12pt" officeooo:paragraph-rsid="001e6f47" style:font-size-asian="10.5pt" style:font-size-complex="12pt"/>
    </style:style>
    <style:style style:name="P10" style:family="paragraph" style:parent-style-name="Heading_20_1">
      <style:text-properties fo:font-size="14pt" officeooo:paragraph-rsid="001e6f47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learningobjectives"/>Learning Objectives</text:h>
      <text:h text:style-name="P1" text:outline-level="1">OWASP Top 10</text:h>
      <text:p text:style-name="P2"><text:span text:style-name="Strong_20_Emphasis"><text:span text:style-name="T1">Q:</text:span></text:span><text:span text:style-name="Strong_20_Emphasis"><text:span text:style-name="T2"> What is the OWASP Top 10?</text:span></text:span></text:p>
      <text:p text:style-name="P3"><text:span text:style-name="T1">A:</text:span> A standard awareness document listing the ten most critical web application security risks, updated periodically by the OWASP community.</text:p>
      <text:p text:style-name="P4"><text:span text:style-name="Strong_20_Emphasis"><text:span text:style-name="T1">Q:</text:span></text:span><text:span text:style-name="Strong_20_Emphasis"><text:span text:style-name="T2"> Why is injection dangerous?</text:span></text:span></text:p>
      <text:p text:style-name="P5"><text:span text:style-name="T1">A:</text:span> It allows attackers to send malicious data to an interpreter, potentially executing unintended commands or accessing unauthorized data.</text:p>
      <text:p text:style-name="P4"><text:span text:style-name="Strong_20_Emphasis"><text:span text:style-name="T1">Q:</text:span></text:span><text:span text:style-name="Strong_20_Emphasis"><text:span text:style-name="T2"> How does XSS affect web applications?</text:span></text:span></text:p>
      <text:p text:style-name="P5"><text:span text:style-name="T1">A:</text:span> It lets attackers inject client-side scripts into pages viewed by other users, enabling session hijacking, defacement, or credential theft.</text:p>
      <text:p text:style-name="P4"><text:span text:style-name="Strong_20_Emphasis"><text:span text:style-name="T1">Q:</text:span></text:span><text:span text:style-name="Strong_20_Emphasis"><text:span text:style-name="T2"> What is the risk of broken authentication?</text:span></text:span></text:p>
      <text:p text:style-name="P5"><text:span text:style-name="T1">A:</text:span> It allows attackers to compromise passwords, keys, or session tokens to assume other users' identities.</text:p>
      <text:p text:style-name="P4"><text:span text:style-name="Strong_20_Emphasis"><text:span text:style-name="T1">Q:</text:span></text:span><text:span text:style-name="Strong_20_Emphasis"><text:span text:style-name="T2"> Can you explain sensitive data exposure?</text:span></text:span></text:p>
      <text:p text:style-name="P5"><text:span text:style-name="T1">A:</text:span> It occurs when applications fail to adequately protect sensitive data (like credentials or PII), exposing it to unauthorized access through weak encryption or missing controls.</text:p>
      <text:p text:style-name="P4"><text:span text:style-name="Strong_20_Emphasis"><text:span text:style-name="T1">Q:</text:span></text:span><text:span text:style-name="Strong_20_Emphasis"><text:span text:style-name="T2"> Describe a security misconfiguration.</text:span></text:span></text:p>
      <text:p text:style-name="P5"><text:span text:style-name="T1">A:</text:span> Any insecure default setting, incomplete setup, open cloud storage, or unnecessary features left enabled—like default admin accounts or verbose error messages.</text:p>
      <text:p text:style-name="P6"><text:span text:style-name="Strong_20_Emphasis"><text:span text:style-name="T1">Q:</text:span></text:span><text:span text:style-name="Strong_20_Emphasis"><text:span text:style-name="T2"> What is XML External Entity (XXE)?</text:span></text:span></text:p>
      <text:p text:style-name="P7"><text:span text:style-name="T1">A:</text:span> An attack exploiting poorly configured XML parsers to disclose internal files, execute server-side requests, or cause denial of service.</text:p>
      <text:p text:style-name="P6"><text:span text:style-name="Strong_20_Emphasis"><text:span text:style-name="T1">Q:</text:span></text:span><text:span text:style-name="Strong_20_Emphasis"><text:span text:style-name="T2"> How do broken access controls impact security?</text:span></text:span></text:p>
      <text:p text:style-name="P7"><text:span text:style-name="T1">A:</text:span> They let users act outside their intended permissions, accessing data or functions they shouldn't—often the most prevalent and impactful flaw.</text:p>
      <text:p text:style-name="P6"><text:span text:style-name="Strong_20_Emphasis"><text:span text:style-name="T1">Q:</text:span></text:span><text:span text:style-name="Strong_20_Emphasis"><text:span text:style-name="T2"> What are common web application security flaws?</text:span></text:span></text:p>
      <text:p text:style-name="P7"><text:span text:style-name="T1">A:</text:span> Injection, broken authentication, XSS, broken access controls, misconfigurations, insecure deserialization, and vulnerable components rank among the most common.</text:p>
      <text:p text:style-name="P6"><text:span text:style-name="Strong_20_Emphasis"><text:span text:style-name="T1">Q:</text:span></text:span><text:span text:style-name="Strong_20_Emphasis"><text:span text:style-name="T2"> How to prevent Insecure Deserialization?</text:span></text:span></text:p>
      <text:p text:style-name="P7"><text:span text:style-name="T1">A:</text:span> Implement integrity checks (like digital signatures), enforce strict type constraints, and avoid deserializing data from untrusted sources entirely.</text:p>
      <text:p text:style-name="P6"><text:span text:style-name="Strong_20_Emphasis"><text:span text:style-name="T1">Q:</text:span></text:span><text:span text:style-name="Strong_20_Emphasis"><text:span text:style-name="T2"> What is the use of security logging and monitoring?</text:span></text:span></text:p>
      <text:p text:style-name="P7"><text:soft-page-break/><text:span text:style-name="T1">A:</text:span> Detecting, responding to, and investigating breaches by recording suspicious activity and alerting on anomalies in real time.</text:p>
      <text:p text:style-name="P6"><text:span text:style-name="Strong_20_Emphasis"><text:span text:style-name="T1">Q:</text:span></text:span><text:span text:style-name="Strong_20_Emphasis"><text:span text:style-name="T2"> Explain the risks of using components with known vulnerabilities.</text:span></text:span></text:p>
      <text:p text:style-name="P7"><text:span text:style-name="T1">A:</text:span> Attackers can exploit known CVEs in libraries, frameworks, or dependencies to compromise the application without crafting new exploits.</text:p>
      <text:p text:style-name="P6"><text:span text:style-name="Strong_20_Emphasis"><text:span text:style-name="T1">Q:</text:span></text:span><text:span text:style-name="Strong_20_Emphasis"><text:span text:style-name="T2"> How can using APIs increase security risks?</text:span></text:span></text:p>
      <text:p text:style-name="P7"><text:span text:style-name="T1">A:</text:span> APIs expand the attack surface by exposing additional endpoints, often with inconsistent authentication, excessive data exposure, or missing rate limiting.</text:p>
      <text:p text:style-name="P6"><text:span text:style-name="Strong_20_Emphasis"><text:span text:style-name="T1">Q:</text:span></text:span><text:span text:style-name="Strong_20_Emphasis"><text:span text:style-name="T2"> Understand SSRF and modern API-related risks.</text:span></text:span></text:p>
      <text:p text:style-name="P7"><text:span text:style-name="T1">A:</text:span> SSRF lets attackers coerce a server into making requests to unintended internal or external resources, often bypassing firewalls to access internal services.</text:p>
      <text:p text:style-name="P6"><text:span text:style-name="Strong_20_Emphasis"><text:span text:style-name="T1">Q:</text:span></text:span><text:span text:style-name="Strong_20_Emphasis"><text:span text:style-name="T2"> Explain the importance of Security Logging and Monitoring.</text:span></text:span></text:p>
      <text:p text:style-name="P7"><text:span text:style-name="T1">A:</text:span> Without it, breaches go undetected for extended periods—logging provides forensic evidence and monitoring enables rapid incident response.</text:p>
      <text:p text:style-name="P6"><text:span text:style-name="Strong_20_Emphasis"><text:span text:style-name="T1">Q:</text:span></text:span><text:span text:style-name="Strong_20_Emphasis"><text:span text:style-name="T2"> Identify risks from Vulnerable and Outdated Components.</text:span></text:span></text:p>
      <text:p text:style-name="P7"><text:span text:style-name="T1">A:</text:span> Outdated libraries may contain unpatched CVEs, lack vendor support, or introduce supply chain compromises that attackers actively target.</text:p>
      <text:p text:style-name="P6"><text:span text:style-name="Strong_20_Emphasis"><text:span text:style-name="T1">Q:</text:span></text:span><text:span text:style-name="Strong_20_Emphasis"><text:span text:style-name="T2"> Analyze common web application security flaws.</text:span></text:span></text:p>
      <text:p text:style-name="P7"><text:span text:style-name="T1">A:</text:span> Most stem from insufficient input validation, poor access control enforcement, weak authentication mechanisms, and failure to keep dependencies updated.</text:p>
      <text:p text:style-name="P6"><text:span text:style-name="Strong_20_Emphasis"><text:span text:style-name="T1">Q:</text:span></text:span><text:span text:style-name="Strong_20_Emphasis"><text:span text:style-name="T2"> Understand how modern APIs expand the attack surface.</text:span></text:span></text:p>
      <text:p text:style-name="P7"><text:span text:style-name="T1">A:</text:span> APIs introduce new endpoints with varying auth models, expose underlying business logic and data structures, and often inherit backend trust that attackers can abuse.</text:p>
      <text:h text:style-name="P8" text:outline-level="1"><text:span text:style-name="T3">BurpSuite - Fundamentals</text:span></text:h>
      <text:p text:style-name="P9"><text:span text:style-name="Strong_20_Emphasis"><text:span text:style-name="T1">Q:</text:span></text:span><text:span text:style-name="Strong_20_Emphasis"><text:span text:style-name="T2"> What is Burp Suite?</text:span></text:span><text:span text:style-name="T2"><text:line-break/></text:span><text:span text:style-name="T1">A:</text:span><text:span text:style-name="T2"> A comprehensive integrated platform for performing security testing of web applications, developed by PortSwigger.</text:span></text:p>
      <text:p text:style-name="Text_20_body"><text:span text:style-name="Strong_20_Emphasis"><text:span text:style-name="T1">Q:</text:span></text:span><text:span text:style-name="Strong_20_Emphasis"><text:span text:style-name="T2"> How do you set up a proxy in Burp Suite?</text:span></text:span><text:span text:style-name="T2"><text:line-break/></text:span><text:span text:style-name="T1">A:</text:span><text:span text:style-name="T2"> Configure your browser or system proxy settings to route traffic through </text:span><text:span text:style-name="Source_20_Text"><text:span text:style-name="T2">127.0.0.1</text:span></text:span><text:span text:style-name="T2"> on port 8080 (default) and install Burp’s CA certificate to intercept HTTPS.</text:span></text:p>
      <text:p text:style-name="Text_20_body"><text:span text:style-name="Strong_20_Emphasis"><text:span text:style-name="T1">Q:</text:span></text:span><text:span text:style-name="Strong_20_Emphasis"><text:span text:style-name="T2"> What are Burp Suite's main components?</text:span></text:span><text:span text:style-name="T2"><text:line-break/></text:span><text:span text:style-name="T1">A:</text:span><text:span text:style-name="T2"> Proxy, Repeater, Intruder, Scanner (Pro only), Decoder, Comparer, and Extender, each serving distinct roles in interception, manipulation, automation, and analysis.</text:span></text:p>
      <text:p text:style-name="Text_20_body"><text:span text:style-name="Strong_20_Emphasis"><text:span text:style-name="T1">Q:</text:span></text:span><text:span text:style-name="Strong_20_Emphasis"><text:span text:style-name="T2"> How does Spider work in Burp Suite?</text:span></text:span><text:span text:style-name="T2"><text:line-break/></text:span><text:span text:style-name="T1">A:</text:span><text:span text:style-name="T2"> It crawls the target website automatically to discover content, functionality, and hidden parameters by following links and parsing forms.</text:span></text:p>
      <text:p text:style-name="Text_20_body"><text:soft-page-break/><text:span text:style-name="Strong_20_Emphasis"><text:span text:style-name="T1">Q:</text:span></text:span><text:span text:style-name="Strong_20_Emphasis"><text:span text:style-name="T2"> What is the purpose of Repeater in Burp Suite?</text:span></text:span><text:span text:style-name="T2"><text:line-break/></text:span><text:span text:style-name="T1">A:</text:span><text:span text:style-name="T2"> To manually modify and resend individual HTTP requests repeatedly while observing how the server responds to different payloads.</text:span></text:p>
      <text:p text:style-name="Text_20_body"><text:span text:style-name="Strong_20_Emphasis"><text:span text:style-name="T1">Q:</text:span></text:span><text:span text:style-name="Strong_20_Emphasis"><text:span text:style-name="T2"> How can Intruder be used for attacks?</text:span></text:span><text:span text:style-name="T2"><text:line-break/></text:span><text:span text:style-name="T1">A:</text:span><text:span text:style-name="T2"> It automates customized attacks like fuzzing, brute-forcing, or credential stuffing using payload lists, position markers, and grep-matching rules.</text:span></text:p>
      <text:p text:style-name="Text_20_body"><text:span text:style-name="Strong_20_Emphasis"><text:span text:style-name="T1">Q:</text:span></text:span><text:span text:style-name="Strong_20_Emphasis"><text:span text:style-name="T2"> What is Burp Scanner and when to use it?</text:span></text:span><text:span text:style-name="T2"><text:line-break/></text:span><text:span text:style-name="T1">A:</text:span><text:span text:style-name="T2"> An automated vulnerability scanning tool (available in Pro) that identifies issues like SQLi, XSS, and misconfigurations during active assessments.</text:span></text:p>
      <text:p text:style-name="Text_20_body"><text:span text:style-name="Strong_20_Emphasis"><text:span text:style-name="T1">Q:</text:span></text:span><text:span text:style-name="Strong_20_Emphasis"><text:span text:style-name="T2"> How to interpret results from Burp Suite?</text:span></text:span><text:span text:style-name="T2"><text:line-break/></text:span><text:span text:style-name="T1">A:</text:span><text:span text:style-name="T2"> Review findings categorized by severity, examine request/response details, validate false positives manually, and prioritize based on exploitability and impact.</text:span></text:p>
      <text:p text:style-name="Text_20_body"><text:span text:style-name="Strong_20_Emphasis"><text:span text:style-name="T1">Q:</text:span></text:span><text:span text:style-name="Strong_20_Emphasis"><text:span text:style-name="T2"> What are some common issues that Burp Suite can identify?</text:span></text:span><text:span text:style-name="T2"><text:line-break/></text:span><text:span text:style-name="T1">A:</text:span><text:span text:style-name="T2"> Injection flaws (SQLi, command injection), XSS, broken authentication, insecure direct object references, security misconfigurations, and vulnerable components.</text:span></text:p>
      <text:p text:style-name="Text_20_body"><text:span text:style-name="Strong_20_Emphasis"><text:span text:style-name="T1">Q:</text:span></text:span><text:span text:style-name="Strong_20_Emphasis"><text:span text:style-name="T2"> How do you configure Burp Suite for HTTPS traffic?</text:span></text:span><text:span text:style-name="T2"><text:line-break/></text:span><text:span text:style-name="T1">A:</text:span><text:span text:style-name="T2"> Enable SSL/TLS in Proxy settings, navigate to any HTTPS site using the Burp-configured browser, and install Burp’s Certificate Authority to decrypt encrypted traffic.</text:span></text:p>
      <text:h text:style-name="P10" text:outline-level="1">Content Discovery</text:h>
      <text:p text:style-name="P9"><text:span text:style-name="Strong_20_Emphasis"><text:span text:style-name="T1">Q:</text:span></text:span><text:span text:style-name="Strong_20_Emphasis"><text:span text:style-name="T2"> What is content discovery?</text:span></text:span><text:span text:style-name="T2"><text:line-break/></text:span><text:span text:style-name="T1">A:</text:span><text:span text:style-name="T2"> The process of identifying hidden or undocumented web resources, endpoints, directories, and files that aren't linked from the main site navigation.</text:span></text:p>
      <text:p text:style-name="Text_20_body"><text:span text:style-name="Strong_20_Emphasis"><text:span text:style-name="T1">Q: </text:span></text:span><text:span text:style-name="Strong_20_Emphasis"><text:span text:style-name="T2">Why is content discovery important?</text:span></text:span><text:span text:style-name="T2"><text:line-break/></text:span><text:span text:style-name="T1">A:</text:span><text:span text:style-name="T2"> It reveals attack surface areas attackers could exploit—often containing unpatched admin panels, backup files, or misconfigured services missed during standard audits.</text:span></text:p>
      <text:p text:style-name="Text_20_body"><text:span text:style-name="Strong_20_Emphasis"><text:span text:style-name="T1">Q:</text:span></text:span><text:span text:style-name="Strong_20_Emphasis"><text:span text:style-name="T2"> How does directory bruteforcing work?</text:span></text:span><text:span text:style-name="T2"><text:line-break/></text:span><text:span text:style-name="T1">A:</text:span><text:span text:style-name="T2"> It systematically tests a wordlist of common directory/file names against a target server, checking HTTP response codes to identify existing resources.</text:span></text:p>
      <text:p text:style-name="Text_20_body"><text:span text:style-name="Strong_20_Emphasis"><text:span text:style-name="T1">Q:</text:span></text:span><text:span text:style-name="Strong_20_Emphasis"><text:span text:style-name="T2"> What is Gobuster and how is it used?</text:span></text:span><text:span text:style-name="T2"><text:line-break/></text:span><text:span text:style-name="T1">A:</text:span><text:span text:style-name="T2"> A fast command-line tool for brute-forcing directories, subdomains, and virtual hosts by iterating through wordlists and analyzing server responses.</text:span></text:p>
      <text:p text:style-name="Text_20_body"><text:span text:style-name="Strong_20_Emphasis"><text:span text:style-name="T1">Q:</text:span></text:span><text:span text:style-name="Strong_20_Emphasis"><text:span text:style-name="T2"> Explain the use of Burp Suite in content discovery.</text:span></text:span><text:span text:style-name="T2"><text:line-break/></text:span><text:span text:style-name="T1">A:</text:span><text:span text:style-name="T2"> Burp's Spider and passive scanning features automatically map website structure, while extensions like "Site Map" and Active Scan help uncover hidden paths.</text:span></text:p>
      <text:p text:style-name="Text_20_body"><text:span text:style-name="Strong_20_Emphasis"><text:span text:style-name="T1">Q:</text:span></text:span><text:span text:style-name="Strong_20_Emphasis"><text:span text:style-name="T2"> How does OWASP ZAP assist in content discovery?</text:span></text:span><text:span text:style-name="T2"><text:line-break/></text:span><text:span text:style-name="T1">A:</text:span><text:span text:style-name="T2"> Its automated spider crawls sites to find all accessible URLs, and active scan modules probe for hidden content using configurable wordlists and heuristics.</text:span></text:p>
      <text:p text:style-name="Text_20_body"><text:soft-page-break/><text:span text:style-name="Strong_20_Emphasis"><text:span text:style-name="T1">Q:</text:span></text:span><text:span text:style-name="Strong_20_Emphasis"><text:span text:style-name="T2"> What are wordlists and how are they used in content discovery?</text:span></text:span><text:span text:style-name="T2"><text:line-break/></text:span><text:span text:style-name="T1">A:</text:span><text:span text:style-name="T2"> Precompiled lists of common filenames/directories (like </text:span><text:span text:style-name="Source_20_Text"><text:span text:style-name="T2">/admin</text:span></text:span><text:span text:style-name="T2">, </text:span><text:span text:style-name="Source_20_Text"><text:span text:style-name="T2">/backup</text:span></text:span><text:span text:style-name="T2">) used to systematically test which paths exist on a target server.</text:span></text:p>
      <text:p text:style-name="Text_20_body"><text:span text:style-name="Strong_20_Emphasis"><text:span text:style-name="T1">Q:</text:span></text:span><text:span text:style-name="Strong_20_Emphasis"><text:span text:style-name="T2"> Describe the purpose of tools like DirBuster.</text:span></text:span><text:span text:style-name="T2"><text:line-break/></text:span><text:span text:style-name="T1">A:</text:span><text:span text:style-name="T2"> Multi-threaded directory/file enumeration tools designed to efficiently brute-force web paths by testing thousands of wordlist entries against targets.</text:span></text:p>
      <text:p text:style-name="Text_20_body"><text:span text:style-name="Strong_20_Emphasis"><text:span text:style-name="T1">Q:</text:span></text:span><text:span text:style-name="Strong_20_Emphasis"><text:span text:style-name="T2"> What are hidden directories and files in web security?</text:span></text:span><text:span text:style-name="T2"><text:line-break/></text:span><text:span text:style-name="T1">A:</text:span><text:span text:style-name="T2"> Resources not publicly linked but still accessible via direct URL—often admin interfaces, config backups, or developer files exposed through poor access controls.</text:span></text:p>
      <text:p text:style-name="Text_20_body"><text:span text:style-name="Strong_20_Emphasis"><text:span text:style-name="T1">Q:</text:span></text:span><text:span text:style-name="Strong_20_Emphasis"><text:span text:style-name="T2"> Explain fuzzing in the context of web security.</text:span></text:span><text:span text:style-name="T2"><text:line-break/></text:span><text:span text:style-name="T1">A:</text:span><text:span text:style-name="T2"> Automated input manipulation where testers send unexpected/payload data to parameters to trigger errors, reveal vulnerabilities, or discover undocumented endpoints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0:00:55.500178296</meta:creation-date>
    <dc:date>2026-06-24T10:26:02.194765941</dc:date>
    <meta:editing-duration>PT25M5S</meta:editing-duration>
    <meta:editing-cycles>7</meta:editing-cycles>
    <meta:generator>LibreOffice/26.2.4.2$Linux_X86_64 LibreOffice_project/f4d82cf4d44730936b3f1a72d05a6253f577d3e9</meta:generator>
    <meta:document-statistic meta:table-count="0" meta:image-count="0" meta:object-count="0" meta:page-count="4" meta:paragraph-count="60" meta:word-count="1104" meta:character-count="7578" meta:non-whitespace-character-count="6539"/>
  </office:meta>
</office:document-meta>
</file>