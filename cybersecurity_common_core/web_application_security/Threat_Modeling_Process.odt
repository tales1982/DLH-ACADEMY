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A0000007EC9874904.png" manifest:media-type="image/png"/>
  <manifest:file-entry manifest:full-path="Pictures/10000001000002BD000000FC6C1EA37E.png" manifest:media-type="image/png"/>
  <manifest:file-entry manifest:full-path="Pictures/100000010000024400000160D466F698.png" manifest:media-type="image/png"/>
  <manifest:file-entry manifest:full-path="Pictures/10000001000002B7000001B3446BA6E5.png" manifest:media-type="image/png"/>
  <manifest:file-entry manifest:full-path="Pictures/10000001000002B900000157427CF67F.png" manifest:media-type="image/png"/>
  <manifest:file-entry manifest:full-path="Pictures/10000001000001B7000002D1861CA059.png" manifest:media-type="image/png"/>
  <manifest:file-entry manifest:full-path="Pictures/1000000100000278000001E6BADA6005.png" manifest:media-type="image/png"/>
  <manifest:file-entry manifest:full-path="Pictures/10000001000002BA000000B891BF1BC5.png" manifest:media-type="image/png"/>
  <manifest:file-entry manifest:full-path="Pictures/10000001000002B500000069CEC6BD22.png" manifest:media-type="image/png"/>
  <manifest:file-entry manifest:full-path="Pictures/100000010000027C0000024DBABD7250.png" manifest:media-type="image/png"/>
  <manifest:file-entry manifest:full-path="Pictures/10000001000002B4000000EF26FBC74D.png" manifest:media-type="image/png"/>
  <manifest:file-entry manifest:full-path="Pictures/100000010000025B000000C612820B87.png" manifest:media-type="image/png"/>
  <manifest:file-entry manifest:full-path="Pictures/10000001000002BD0000013523C1C4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apple-system" svg:font-family="apple-system, BlinkMacSystemFont, 'Segoe UI', Roboto, sans-serif"/>
    <style:font-face style:name="monospace" svg:font-family="monospace"/>
    <style:font-face style:name="sans-serif" svg:font-family="sans-serif"/>
  </office:font-face-decls>
  <office:automatic-styles>
    <style:style style:name="Table1" style:family="table">
      <style:table-properties style:width="3.5458in" fo:margin-left="0.3125in" table:align="left" fo:background-color="transparent">
        <style:background-image/>
      </style:table-properties>
    </style:style>
    <style:style style:name="Table1.A" style:family="table-column">
      <style:table-column-properties style:column-width="0.8542in"/>
    </style:style>
    <style:style style:name="Table1.B" style:family="table-column">
      <style:table-column-properties style:column-width="2.0868in"/>
    </style:style>
    <style:style style:name="Table1.C" style:family="table-column">
      <style:table-column-properties style:column-width="0.6049in"/>
    </style:style>
    <style:style style:name="Table1.A1" style:family="table-cell">
      <style:table-cell-properties style:vertical-align="middle" fo:background-color="#1c2128" fo:padding="0.0521in" fo:border="0.05pt solid #474c52">
        <style:background-image/>
      </style:table-cell-properties>
    </style:style>
    <style:style style:name="Table2" style:family="table">
      <style:table-properties style:width="2.3507in" fo:margin-left="0.3125in" table:align="left" fo:background-color="transparent">
        <style:background-image/>
      </style:table-properties>
    </style:style>
    <style:style style:name="Table2.A" style:family="table-column">
      <style:table-column-properties style:column-width="0.8528in"/>
    </style:style>
    <style:style style:name="Table2.B" style:family="table-column">
      <style:table-column-properties style:column-width="0.6382in"/>
    </style:style>
    <style:style style:name="Table2.C" style:family="table-column">
      <style:table-column-properties style:column-width="0.8597in"/>
    </style:style>
    <style:style style:name="Table2.A1" style:family="table-cell">
      <style:table-cell-properties style:vertical-align="middle" fo:background-color="#1c2128" fo:padding="0.0521in" fo:border="0.05pt solid #474c52">
        <style:background-image/>
      </style:table-cell-properties>
    </style:style>
    <style:style style:name="Table3" style:family="table">
      <style:table-properties style:width="5.9097in" fo:margin-left="0.3125in" table:align="left" fo:background-color="transparent">
        <style:background-image/>
      </style:table-properties>
    </style:style>
    <style:style style:name="Table3.A" style:family="table-column">
      <style:table-column-properties style:column-width="1.0979in"/>
    </style:style>
    <style:style style:name="Table3.B" style:family="table-column">
      <style:table-column-properties style:column-width="0.7035in"/>
    </style:style>
    <style:style style:name="Table3.C" style:family="table-column">
      <style:table-column-properties style:column-width="0.8549in"/>
    </style:style>
    <style:style style:name="Table3.D" style:family="table-column">
      <style:table-column-properties style:column-width="0.9535in"/>
    </style:style>
    <style:style style:name="Table3.E" style:family="table-column">
      <style:table-column-properties style:column-width="1.1493in"/>
    </style:style>
    <style:style style:name="Table3.F" style:family="table-column">
      <style:table-column-properties style:column-width="0.3701in"/>
    </style:style>
    <style:style style:name="Table3.G" style:family="table-column">
      <style:table-column-properties style:column-width="0.7806in"/>
    </style:style>
    <style:style style:name="Table3.A1" style:family="table-cell">
      <style:table-cell-properties style:vertical-align="middle" fo:background-color="#1c2128" fo:padding="0.0521in" fo:border="0.05pt solid #474c52">
        <style:background-image/>
      </style:table-cell-properties>
    </style:style>
    <style:style style:name="Table4" style:family="table">
      <style:table-properties style:width="3.9472in" fo:margin-left="0.3125in" table:align="left" fo:background-color="transparent">
        <style:background-image/>
      </style:table-properties>
    </style:style>
    <style:style style:name="Table4.A" style:family="table-column">
      <style:table-column-properties style:column-width="1.1299in"/>
    </style:style>
    <style:style style:name="Table4.B" style:family="table-column">
      <style:table-column-properties style:column-width="0.4951in"/>
    </style:style>
    <style:style style:name="Table4.C" style:family="table-column">
      <style:table-column-properties style:column-width="2.3222in"/>
    </style:style>
    <style:style style:name="Table4.A1" style:family="table-cell">
      <style:table-cell-properties style:vertical-align="middle" fo:background-color="#1c2128" fo:padding="0.0521in" fo:border="0.05pt solid #474c52">
        <style:background-image/>
      </style:table-cell-properties>
    </style:style>
    <style:style style:name="Table5" style:family="table">
      <style:table-properties style:width="6.3806in" fo:margin-left="0.3125in" table:align="left" fo:background-color="transparent">
        <style:background-image/>
      </style:table-properties>
    </style:style>
    <style:style style:name="Table5.A" style:family="table-column">
      <style:table-column-properties style:column-width="1.0194in"/>
    </style:style>
    <style:style style:name="Table5.B" style:family="table-column">
      <style:table-column-properties style:column-width="1.9542in"/>
    </style:style>
    <style:style style:name="Table5.C" style:family="table-column">
      <style:table-column-properties style:column-width="1.0167in"/>
    </style:style>
    <style:style style:name="Table5.D" style:family="table-column">
      <style:table-column-properties style:column-width="0.8681in"/>
    </style:style>
    <style:style style:name="Table5.E" style:family="table-column">
      <style:table-column-properties style:column-width="1.5222in"/>
    </style:style>
    <style:style style:name="Table5.A1" style:family="table-cell">
      <style:table-cell-properties style:vertical-align="middle" fo:background-color="#1c2128" fo:padding="0.0521in" fo:border="0.05pt solid #474c52">
        <style:background-image/>
      </style:table-cell-properties>
    </style:style>
    <style:style style:name="P1" style:family="paragraph" style:parent-style-name="Heading_20_1">
      <style:paragraph-properties fo:text-align="start" style:justify-single-word="false"/>
      <style:text-properties fo:font-variant="normal" fo:text-transform="none" fo:color="#000000" loext:opacity="100%" style:font-name="Inter" fo:font-size="27pt" fo:letter-spacing="normal" fo:font-style="normal" fo:font-weight="normal" officeooo:rsid="00248142" officeooo:paragraph-rsid="00248142" fo:background-color="transparent"/>
    </style:style>
    <style:style style:name="P2" style:family="paragraph" style:parent-style-name="Heading_20_2">
      <style:paragraph-properties fo:margin-left="0.3126in" fo:margin-right="0in" fo:margin-top="0.5209in" fo:margin-bottom="0.4165in" style:contextual-spacing="false" fo:line-height="110%" fo:orphans="2" fo:widows="2" fo:text-indent="0in" style:auto-text-indent="false"/>
      <style:text-properties fo:font-variant="normal" fo:text-transform="none" fo:color="#000000" loext:opacity="100%" style:font-name="Inter" fo:font-size="22.5pt" fo:letter-spacing="normal" fo:font-style="normal" fo:font-weight="bold"/>
    </style:style>
    <style:style style:name="P3" style:family="paragraph" style:parent-style-name="Heading_20_3">
      <style:paragraph-properties fo:text-align="start" style:justify-single-word="false"/>
      <style:text-properties fo:color="#000000" loext:opacity="100%" officeooo:rsid="00248142" officeooo:paragraph-rsid="00248142" fo:background-color="transparent"/>
    </style:style>
    <style:style style:name="P4" style:family="paragraph" style:parent-style-name="Heading_20_3">
      <style:paragraph-properties fo:margin-left="0.3126in" fo:margin-right="0in" fo:margin-top="0.3126in" fo:margin-bottom="0.2083in" style:contextual-spacing="false" fo:line-height="110%" fo:orphans="2" fo:widows="2" fo:text-indent="0in" style:auto-text-indent="false"/>
      <style:text-properties fo:font-variant="normal" fo:text-transform="none" fo:color="#000000" loext:opacity="100%" style:font-name="Inter" fo:font-size="14.25pt" fo:letter-spacing="normal" fo:font-style="normal" fo:font-weight="bold"/>
    </style:style>
    <style:style style:name="P5" style:family="paragraph" style:parent-style-name="Heading_20_3">
      <style:paragraph-properties fo:margin-left="0.3126in" fo:margin-right="0in" fo:margin-top="0.3126in" fo:margin-bottom="0.2083in" style:contextual-spacing="false" fo:line-height="110%" fo:orphans="2" fo:widows="2" fo:text-indent="0in" style:auto-text-indent="false"/>
      <style:text-properties fo:font-variant="normal" fo:text-transform="none" fo:color="#fffffe" loext:opacity="100%" style:font-name="Inter" fo:font-size="14.25pt" fo:letter-spacing="normal" fo:font-style="normal" fo:font-weight="bold"/>
    </style:style>
    <style:style style:name="P6" style:family="paragraph" style:parent-style-name="Heading_20_4">
      <style:paragraph-properties fo:margin-left="0.3126in" fo:margin-right="0in" fo:margin-top="0.1043in" fo:margin-bottom="0.1043in" style:contextual-spacing="false" fo:line-height="110%" fo:orphans="2" fo:widows="2" fo:text-indent="0in" style:auto-text-indent="false"/>
      <style:text-properties fo:font-variant="normal" fo:text-transform="none" fo:color="#000000" loext:opacity="100%" style:font-name="Inter" fo:font-size="13.5pt" fo:letter-spacing="normal" fo:font-style="normal" fo:font-weight="bold"/>
    </style:style>
    <style:style style:name="P7" style:family="paragraph" style:parent-style-name="Heading_20_4">
      <style:paragraph-properties fo:margin-left="0.3126in" fo:margin-right="0in" fo:margin-top="0.1043in" fo:margin-bottom="0.1043in" style:contextual-spacing="false" fo:line-height="110%" fo:orphans="2" fo:widows="2" fo:text-indent="0in" style:auto-text-indent="false"/>
      <style:text-properties fo:font-variant="normal" fo:text-transform="none" fo:color="#fffffe" loext:opacity="100%" style:font-name="Inter" fo:font-size="13.5pt" fo:letter-spacing="normal" fo:font-style="normal" fo:font-weight="bold"/>
    </style:style>
    <style:style style:name="P8" style:family="paragraph" style:parent-style-name="Horizontal_20_Line">
      <style:paragraph-properties fo:margin-left="0.3126in" fo:margin-right="0in" fo:margin-top="0.5209in" fo:margin-bottom="0.0972in" style:contextual-spacing="false" fo:orphans="2" fo:widows="2" fo:text-indent="0in" style:auto-text-indent="false"/>
      <style:text-properties fo:color="#000000" loext:opacity="100%"/>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style:contextual-spacing="false" fo:text-indent="0in" style:auto-text-indent="false"/>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orphans="2" fo:widows="2" fo:text-indent="0in" style:auto-text-indent="false"/>
      <style:text-properties fo:color="#ffffff" loext:opacity="100%" officeooo:paragraph-rsid="002857d6"/>
    </style:style>
    <style:style style:name="P13" style:family="paragraph" style:parent-style-name="Preformatted_20_Text">
      <style:paragraph-properties fo:orphans="2" fo:widows="2" fo:text-indent="0in" style:auto-text-indent="false"/>
      <style:text-properties fo:font-variant="normal" fo:text-transform="none" fo:color="#ffffff" loext:opacity="100%" fo:letter-spacing="normal"/>
    </style:style>
    <style:style style:name="P14" style:family="paragraph" style:parent-style-name="Preformatted_20_Text">
      <loext:graphic-properties draw:fill="solid" draw:fill-color="#31363c" draw:opacity="100%"/>
      <style:paragraph-properties fo:margin-left="0.3126in" fo:margin-right="0in" fo:margin-top="0in" fo:margin-bottom="0.1043in" style:contextual-spacing="false" fo:line-height="142%" fo:orphans="2" fo:widows="2" fo:text-indent="0in" style:auto-text-indent="false" fo:background-color="#31363c" fo:padding-left="0in" fo:padding-right="0in" fo:padding-top="0.1043in" fo:padding-bottom="0.1043in" fo:border-left="none" fo:border-right="none" fo:border-top="0.74pt solid #474c52" fo:border-bottom="0.74pt solid #474c52"/>
    </style:style>
    <style:style style:name="P15" style:family="paragraph" style:parent-style-name="Preformatted_20_Text">
      <loext:graphic-properties draw:fill="solid" draw:fill-color="#31363c" draw:opacity="100%"/>
      <style:paragraph-properties fo:margin-left="0.3126in" fo:margin-right="0in" fo:margin-top="0in" fo:margin-bottom="0.1043in" style:contextual-spacing="false" fo:line-height="142%" fo:orphans="2" fo:widows="2" fo:text-indent="0in" style:auto-text-indent="false" fo:background-color="#31363c" fo:padding-left="0in" fo:padding-right="0in" fo:padding-top="0.1043in" fo:padding-bottom="0.1043in" fo:border-left="none" fo:border-right="none" fo:border-top="0.74pt solid #474c52" fo:border-bottom="0.74pt solid #474c52"/>
      <style:text-properties fo:color="#fffffe" loext:opacity="100%"/>
    </style:style>
    <style:style style:name="P16" style:family="paragraph" style:parent-style-name="Quotations">
      <style:paragraph-properties fo:margin-left="0.7063in" fo:margin-right="0.3937in" fo:margin-top="0in" fo:margin-bottom="0in" style:contextual-spacing="false" fo:orphans="2" fo:widows="2" fo:text-indent="0in" style:auto-text-indent="false" fo:padding-left="0.2083in" fo:padding-right="0in" fo:padding-top="0in" fo:padding-bottom="0in" fo:border-left="3.74pt solid #eeeeee" fo:border-right="none" fo:border-top="none" fo:border-bottom="none"/>
    </style:style>
    <style:style style:name="P17" style:family="paragraph" style:parent-style-name="Standard">
      <style:paragraph-properties fo:text-align="start" style:justify-single-word="false"/>
      <style:text-properties fo:color="#000000" loext:opacity="100%" fo:font-weight="bold" officeooo:paragraph-rsid="00267689" style:font-weight-asian="bold" style:font-weight-complex="bold"/>
    </style:style>
    <style:style style:name="P18" style:family="paragraph" style:parent-style-name="Standard">
      <style:paragraph-properties fo:text-align="start" style:justify-single-word="false"/>
      <style:text-properties fo:color="#000000" loext:opacity="100%" fo:font-weight="bold" officeooo:rsid="00248142" officeooo:paragraph-rsid="00255180" fo:background-color="transparent" style:font-weight-asian="bold" style:font-weight-complex="bold"/>
    </style:style>
    <style:style style:name="P19" style:family="paragraph" style:parent-style-name="Standard">
      <style:paragraph-properties fo:text-align="start" style:justify-single-word="false"/>
      <style:text-properties fo:color="#000000" loext:opacity="100%" officeooo:rsid="00248142" officeooo:paragraph-rsid="00248142" fo:background-color="transparent"/>
    </style:style>
    <style:style style:name="P20" style:family="paragraph" style:parent-style-name="Standard">
      <style:paragraph-properties fo:text-align="start" style:justify-single-word="false"/>
      <style:text-properties fo:color="#000000" loext:opacity="100%" officeooo:rsid="00248142" officeooo:paragraph-rsid="0024977e" fo:background-color="transparent"/>
    </style:style>
    <style:style style:name="P21" style:family="paragraph" style:parent-style-name="Standard">
      <style:paragraph-properties fo:text-align="start" style:justify-single-word="false"/>
      <style:text-properties fo:color="#000000" loext:opacity="100%" officeooo:rsid="00248142" officeooo:paragraph-rsid="00255180" fo:background-color="transparent"/>
    </style:style>
    <style:style style:name="P22" style:family="paragraph" style:parent-style-name="Standard">
      <style:paragraph-properties fo:text-align="start" style:justify-single-word="false"/>
      <style:text-properties fo:color="#000000" loext:opacity="100%" officeooo:rsid="00248142" officeooo:paragraph-rsid="002857d6" fo:background-color="transparent"/>
    </style:style>
    <style:style style:name="P23" style:family="paragraph" style:parent-style-name="Standard">
      <style:paragraph-properties fo:text-align="start" style:justify-single-word="false"/>
      <style:text-properties fo:color="#000000" loext:opacity="100%" officeooo:rsid="00255180" officeooo:paragraph-rsid="00255180" fo:background-color="transparent"/>
    </style:style>
    <style:style style:name="P24" style:family="paragraph" style:parent-style-name="Standard">
      <style:paragraph-properties fo:text-align="start" style:justify-single-word="false"/>
      <style:text-properties fo:color="#000000" loext:opacity="100%" officeooo:rsid="00248142" officeooo:paragraph-rsid="00248142" fo:background-color="#7ffe00"/>
    </style:style>
    <style:style style:name="P25" style:family="paragraph" style:parent-style-name="Standard">
      <style:paragraph-properties fo:text-align="start" style:justify-single-word="false"/>
      <style:text-properties fo:color="#000000" loext:opacity="100%" officeooo:paragraph-rsid="00267689"/>
    </style:style>
    <style:style style:name="P26" style:family="paragraph" style:parent-style-name="Standard">
      <style:paragraph-properties fo:text-align="start" style:justify-single-word="false"/>
      <style:text-properties fo:color="#00763b" loext:opacity="100%" fo:font-weight="bold" officeooo:rsid="00248142" officeooo:paragraph-rsid="00255180" fo:background-color="transparent" style:font-weight-asian="bold" style:font-weight-complex="bold"/>
    </style:style>
    <style:style style:name="P27" style:family="paragraph" style:parent-style-name="Table_20_Contents">
      <style:paragraph-properties fo:margin-left="0in" fo:margin-right="0in" fo:text-indent="0in" style:auto-text-indent="false"/>
    </style:style>
    <style:style style:name="P28" style:family="paragraph" style:parent-style-name="Table_20_Contents">
      <style:paragraph-properties fo:margin-left="0in" fo:margin-right="0in" fo:text-indent="0in" style:auto-text-indent="false"/>
      <style:text-properties fo:color="#fffffe" loext:opacity="100%"/>
    </style:style>
    <style:style style:name="P29" style:family="paragraph" style:parent-style-name="Table_20_Contents">
      <style:text-properties fo:color="#fffffe" loext:opacity="100%"/>
    </style:style>
    <style:style style:name="P30" style:family="paragraph" style:parent-style-name="Table_20_Contents">
      <style:paragraph-properties fo:margin-left="0in" fo:margin-right="0in" fo:text-indent="0in" style:auto-text-indent="false"/>
      <style:text-properties fo:color="#fffffe" loext:opacity="100%" fo:font-size="2pt" style:font-size-asian="2pt" style:font-size-complex="2pt"/>
    </style:style>
    <style:style style:name="P31" style:family="paragraph" style:parent-style-name="Table_20_Contents">
      <style:text-properties fo:color="#fffffe" loext:opacity="100%" fo:font-size="2pt" style:font-size-asian="2pt" style:font-size-complex="2pt"/>
    </style:style>
    <style:style style:name="P32" style:family="paragraph" style:parent-style-name="Table_20_Heading">
      <style:paragraph-properties fo:margin-left="0in" fo:margin-right="0in" fo:text-align="start" style:justify-single-word="false" fo:text-indent="0in" style:auto-text-indent="false"/>
      <style:text-properties fo:color="#fffffe" loext:opacity="100%"/>
    </style:style>
    <style:style style:name="P33" style:family="paragraph" style:parent-style-name="Text_20_body">
      <style:paragraph-properties fo:margin-left="0.3126in" fo:margin-right="0in" fo:margin-top="0in" fo:margin-bottom="0.1043in" style:contextual-spacing="false" fo:orphans="2" fo:widows="2" fo:text-indent="0in" style:auto-text-indent="false"/>
    </style:style>
    <style:style style:name="P34" style:family="paragraph" style:parent-style-name="Text_20_body" style:list-style-name="L11">
      <style:paragraph-properties fo:margin-left="0.3126in" fo:margin-right="0in" fo:margin-top="0.1043in" fo:margin-bottom="0.1043in" style:contextual-spacing="false" fo:orphans="2" fo:widows="2" fo:text-indent="0in" style:auto-text-indent="false"/>
    </style:style>
    <style:style style:name="P35" style:family="paragraph" style:parent-style-name="Text_20_body" style:list-style-name="L12">
      <style:paragraph-properties fo:margin-left="0.3126in" fo:margin-right="0in" fo:margin-top="0.1043in" fo:margin-bottom="0.1043in" style:contextual-spacing="false" fo:orphans="2" fo:widows="2" fo:text-indent="0in" style:auto-text-indent="false"/>
    </style:style>
    <style:style style:name="P36" style:family="paragraph" style:parent-style-name="Text_20_body" style:list-style-name="L37">
      <style:paragraph-properties fo:margin-left="0.3126in" fo:margin-right="0in" fo:margin-top="0in" fo:margin-bottom="0.1043in" style:contextual-spacing="false" fo:orphans="2" fo:widows="2" fo:text-indent="0in" style:auto-text-indent="false"/>
    </style:style>
    <style:style style:name="P37" style:family="paragraph" style:parent-style-name="Text_20_body" style:list-style-name="L38">
      <style:paragraph-properties fo:margin-left="0.3126in" fo:margin-right="0in" fo:margin-top="0in" fo:margin-bottom="0.1043in" style:contextual-spacing="false" fo:orphans="2" fo:widows="2" fo:text-indent="0in" style:auto-text-indent="false"/>
    </style:style>
    <style:style style:name="P38" style:family="paragraph" style:parent-style-name="Text_20_body" style:list-style-name="L39">
      <style:paragraph-properties fo:margin-left="0.3126in" fo:margin-right="0in" fo:margin-top="0in" fo:margin-bottom="0.1043in" style:contextual-spacing="false" fo:orphans="2" fo:widows="2" fo:text-indent="0in" style:auto-text-indent="false"/>
    </style:style>
    <style:style style:name="P39" style:family="paragraph" style:parent-style-name="Text_20_body" style:list-style-name="L40">
      <style:paragraph-properties fo:margin-left="0.3126in" fo:margin-right="0in" fo:margin-top="0in" fo:margin-bottom="0.1043in" style:contextual-spacing="false" fo:orphans="2" fo:widows="2" fo:text-indent="0in" style:auto-text-indent="false"/>
    </style:style>
    <style:style style:name="P40" style:family="paragraph" style:parent-style-name="Text_20_body" style:list-style-name="L41">
      <style:paragraph-properties fo:margin-left="0.3126in" fo:margin-right="0in" fo:margin-top="0in" fo:margin-bottom="0.1043in" style:contextual-spacing="false" fo:orphans="2" fo:widows="2" fo:text-indent="0in" style:auto-text-indent="false"/>
    </style:style>
    <style:style style:name="P41" style:family="paragraph" style:parent-style-name="Text_20_body" style:list-style-name="L42">
      <style:paragraph-properties fo:margin-left="0.3126in" fo:margin-right="0in" fo:margin-top="0in" fo:margin-bottom="0.1043in" style:contextual-spacing="false" fo:orphans="2" fo:widows="2" fo:text-indent="0in" style:auto-text-indent="false"/>
    </style:style>
    <style:style style:name="P42" style:family="paragraph" style:parent-style-name="Text_20_body" style:list-style-name="L43">
      <style:paragraph-properties fo:margin-left="0.3126in" fo:margin-right="0in" fo:margin-top="0in" fo:margin-bottom="0.1043in" style:contextual-spacing="false" fo:orphans="2" fo:widows="2" fo:text-indent="0in" style:auto-text-indent="false"/>
    </style:style>
    <style:style style:name="P43" style:family="paragraph" style:parent-style-name="Text_20_body" style:list-style-name="L44">
      <style:paragraph-properties fo:margin-left="0.3126in" fo:margin-right="0in" fo:margin-top="0in" fo:margin-bottom="0.1043in" style:contextual-spacing="false" fo:orphans="2" fo:widows="2" fo:text-indent="0in" style:auto-text-indent="false"/>
    </style:style>
    <style:style style:name="P44" style:family="paragraph" style:parent-style-name="Text_20_body" style:list-style-name="L45">
      <style:paragraph-properties fo:margin-left="0.3126in" fo:margin-right="0in" fo:margin-top="0in" fo:margin-bottom="0.1043in" style:contextual-spacing="false" fo:orphans="2" fo:widows="2" fo:text-indent="0in" style:auto-text-indent="false"/>
    </style:style>
    <style:style style:name="P45" style:family="paragraph" style:parent-style-name="Text_20_body" style:list-style-name="L46">
      <style:paragraph-properties fo:margin-left="0.3126in" fo:margin-right="0in" fo:margin-top="0in" fo:margin-bottom="0.1043in" style:contextual-spacing="false" fo:orphans="2" fo:widows="2" fo:text-indent="0in" style:auto-text-indent="false"/>
    </style:style>
    <style:style style:name="P46" style:family="paragraph" style:parent-style-name="Text_20_body" style:list-style-name="L47">
      <style:paragraph-properties fo:margin-left="0.3126in" fo:margin-right="0in" fo:margin-top="0in" fo:margin-bottom="0.1043in" style:contextual-spacing="false" fo:orphans="2" fo:widows="2" fo:text-indent="0in" style:auto-text-indent="false"/>
    </style:style>
    <style:style style:name="P47" style:family="paragraph" style:parent-style-name="Text_20_body" style:list-style-name="L62">
      <style:paragraph-properties fo:margin-left="0.3126in" fo:margin-right="0in" fo:margin-top="0in" fo:margin-bottom="0.1043in" style:contextual-spacing="false" fo:orphans="2" fo:widows="2" fo:text-indent="0in" style:auto-text-indent="false"/>
    </style:style>
    <style:style style:name="P48" style:family="paragraph" style:parent-style-name="Text_20_body">
      <style:paragraph-properties fo:text-align="start" style:justify-single-word="false"/>
      <style:text-properties fo:color="#000000" loext:opacity="100%" officeooo:rsid="00248142" officeooo:paragraph-rsid="00248142" fo:background-color="transparent"/>
    </style:style>
    <style:style style:name="P49" style:family="paragraph" style:parent-style-name="Text_20_body">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0" style:family="paragraph" style:parent-style-name="Text_20_body" style:list-style-name="L13">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1" style:family="paragraph" style:parent-style-name="Text_20_body" style:list-style-name="L14">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2" style:family="paragraph" style:parent-style-name="Text_20_body" style:list-style-name="L15">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3" style:family="paragraph" style:parent-style-name="Text_20_body" style:list-style-name="L16">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4" style:family="paragraph" style:parent-style-name="Text_20_body" style:list-style-name="L17">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5" style:family="paragraph" style:parent-style-name="Text_20_body" style:list-style-name="L18">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6" style:family="paragraph" style:parent-style-name="Text_20_body" style:list-style-name="L19">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7" style:family="paragraph" style:parent-style-name="Text_20_body" style:list-style-name="L20">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8" style:family="paragraph" style:parent-style-name="Text_20_body" style:list-style-name="L21">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59" style:family="paragraph" style:parent-style-name="Text_20_body" style:list-style-name="L22">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0" style:family="paragraph" style:parent-style-name="Text_20_body" style:list-style-name="L23">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1" style:family="paragraph" style:parent-style-name="Text_20_body" style:list-style-name="L24">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2" style:family="paragraph" style:parent-style-name="Text_20_body" style:list-style-name="L25">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3" style:family="paragraph" style:parent-style-name="Text_20_body" style:list-style-name="L26">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4" style:family="paragraph" style:parent-style-name="Text_20_body" style:list-style-name="L27">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5" style:family="paragraph" style:parent-style-name="Text_20_body" style:list-style-name="L28">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6" style:family="paragraph" style:parent-style-name="Text_20_body" style:list-style-name="L29">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7" style:family="paragraph" style:parent-style-name="Text_20_body" style:list-style-name="L30">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8" style:family="paragraph" style:parent-style-name="Text_20_body" style:list-style-name="L31">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69" style:family="paragraph" style:parent-style-name="Text_20_body" style:list-style-name="L32">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0" style:family="paragraph" style:parent-style-name="Text_20_body" style:list-style-name="L33">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1" style:family="paragraph" style:parent-style-name="Text_20_body" style:list-style-name="L34">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2" style:family="paragraph" style:parent-style-name="Text_20_body" style:list-style-name="L35">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3" style:family="paragraph" style:parent-style-name="Text_20_body" style:list-style-name="L36">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4" style:family="paragraph" style:parent-style-name="Text_20_body" style:list-style-name="L48">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5" style:family="paragraph" style:parent-style-name="Text_20_body" style:list-style-name="L49">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6" style:family="paragraph" style:parent-style-name="Text_20_body" style:list-style-name="L50">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7" style:family="paragraph" style:parent-style-name="Text_20_body" style:list-style-name="L51">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8" style:family="paragraph" style:parent-style-name="Text_20_body" style:list-style-name="L52">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79" style:family="paragraph" style:parent-style-name="Text_20_body" style:list-style-name="L53">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0" style:family="paragraph" style:parent-style-name="Text_20_body" style:list-style-name="L54">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1" style:family="paragraph" style:parent-style-name="Text_20_body" style:list-style-name="L55">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2" style:family="paragraph" style:parent-style-name="Text_20_body" style:list-style-name="L56">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3" style:family="paragraph" style:parent-style-name="Text_20_body" style:list-style-name="L57">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4" style:family="paragraph" style:parent-style-name="Text_20_body" style:list-style-name="L58">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5" style:family="paragraph" style:parent-style-name="Text_20_body" style:list-style-name="L59">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6" style:family="paragraph" style:parent-style-name="Text_20_body" style:list-style-name="L60">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7" style:family="paragraph" style:parent-style-name="Text_20_body" style:list-style-name="L61">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8" style:family="paragraph" style:parent-style-name="Text_20_body" style:list-style-name="L63">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style:font-name="Inter" fo:font-size="10.5pt" fo:letter-spacing="normal" fo:font-style="normal" fo:font-weight="normal"/>
    </style:style>
    <style:style style:name="P89" style:family="paragraph" style:parent-style-name="Text_20_body">
      <style:paragraph-properties fo:margin-left="0.3126in" fo:margin-right="0in" fo:margin-top="0in" fo:margin-bottom="0.1043in" style:contextual-spacing="false" fo:orphans="2" fo:widows="2" fo:text-indent="0in" style:auto-text-indent="false"/>
      <style:text-properties fo:font-variant="normal" fo:text-transform="none" fo:color="#000000" loext:opacity="100%" fo:letter-spacing="normal"/>
    </style:style>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list-style-name="L10"/>
    <style:style style:name="T1" style:family="text">
      <style:text-properties fo:font-style="normal" fo:font-weight="normal"/>
    </style:style>
    <style:style style:name="T2" style:family="text">
      <style:text-properties fo:font-variant="normal" fo:text-transform="none" fo:color="#000000" loext:opacity="100%" fo:letter-spacing="normal" fo:background-color="#31363c" loext:char-shading-value="0" loext:padding="0in" loext:border="none"/>
    </style:style>
    <style:style style:name="T3" style:family="text">
      <style:text-properties fo:font-variant="normal" fo:text-transform="none" fo:color="#000000" loext:opacity="100%" style:font-name="Inter" fo:font-size="10.5pt" fo:letter-spacing="normal" fo:font-style="normal" fo:font-weight="bold"/>
    </style:style>
    <style:style style:name="T4" style:family="text">
      <style:text-properties fo:font-variant="normal" fo:text-transform="none" fo:color="#000000" loext:opacity="100%" style:font-name="Inter" fo:font-size="10.5pt" fo:letter-spacing="normal" fo:font-style="normal" fo:font-weight="normal"/>
    </style:style>
    <style:style style:name="T5" style:family="text">
      <style:text-properties fo:font-variant="normal" fo:text-transform="none" fo:color="#000000" loext:opacity="100%" style:font-name="Inter" fo:font-size="12.75pt" fo:letter-spacing="normal" fo:font-style="normal" fo:font-weight="bold"/>
    </style:style>
    <style:style style:name="T6" style:family="text">
      <style:text-properties fo:font-variant="normal" fo:text-transform="none" fo:color="#000000" loext:opacity="100%" style:font-name="Inter" fo:font-size="12.75pt" fo:letter-spacing="normal" fo:font-style="normal" fo:font-weight="normal"/>
    </style:style>
    <style:style style:name="T7" style:family="text">
      <style:text-properties fo:font-variant="normal" fo:text-transform="none" fo:color="#000000" loext:opacity="100%" style:font-name="Menlo" fo:font-size="9.75pt" fo:letter-spacing="normal" fo:font-style="italic" fo:font-weight="normal" fo:background-color="#31363c" loext:char-shading-value="0" loext:padding="0in" loext:border="none"/>
    </style:style>
    <style:style style:name="T8" style:family="text">
      <style:text-properties fo:font-variant="normal" fo:text-transform="none" fo:color="#000000" loext:opacity="100%" style:font-name="Menlo" fo:font-size="9.75pt" fo:letter-spacing="normal" fo:font-style="italic" fo:font-weight="bold" fo:background-color="#31363c" loext:char-shading-value="0" loext:padding="0in" loext:border="none"/>
    </style:style>
    <style:style style:name="T9" style:family="text">
      <style:text-properties fo:font-variant="normal" fo:text-transform="none" fo:color="#000000" loext:opacity="100%" style:font-name="Menlo" fo:font-size="9.75pt" fo:letter-spacing="normal" fo:font-style="normal" fo:font-weight="bold" fo:background-color="#31363c" loext:char-shading-value="0" loext:padding="0in" loext:border="none"/>
    </style:style>
    <style:style style:name="T10" style:family="text">
      <style:text-properties fo:font-variant="normal" fo:text-transform="none" fo:color="#000000" loext:opacity="100%" style:font-name="Menlo" fo:font-size="9.75pt" fo:letter-spacing="normal" fo:font-style="normal" fo:font-weight="normal" fo:background-color="#31363c" loext:char-shading-value="0" loext:padding="0in" loext:border="none"/>
    </style:style>
    <style:style style:name="T11" style:family="text">
      <style:text-properties fo:font-variant="normal" fo:text-transform="none" fo:letter-spacing="normal" fo:background-color="#31363c" loext:char-shading-value="0" loext:padding="0in" loext:border="none"/>
    </style:style>
    <style:style style:name="T12" style:family="text">
      <style:text-properties fo:font-variant="normal" fo:text-transform="none" fo:color="#ffffff" loext:opacity="100%" fo:letter-spacing="normal" fo:font-style="normal" fo:font-weight="normal" officeooo:rsid="00248142" fo:background-color="transparent" loext:char-shading-value="0"/>
    </style:style>
    <style:style style:name="T13" style:family="text">
      <style:text-properties fo:font-variant="normal" fo:text-transform="none" fo:color="#00763b" loext:opacity="100%" style:font-name="Times New Roman" fo:font-size="14pt" fo:letter-spacing="normal" fo:font-style="normal" fo:font-weight="bold" style:font-weight-asian="bold" style:font-weight-complex="bold"/>
    </style:style>
    <style:style style:name="T14" style:family="text">
      <style:text-properties fo:font-variant="normal" fo:text-transform="none" fo:color="#f5f6fb" loext:opacity="100%" style:font-name="Inter" fo:font-size="10.5pt" fo:letter-spacing="normal" fo:font-style="normal" fo:font-weight="bold"/>
    </style:style>
    <style:style style:name="T15" style:family="text">
      <style:text-properties fo:font-variant="normal" fo:text-transform="none" fo:color="#f5f6fb" loext:opacity="100%" style:font-name="Inter" fo:font-size="10.5pt" fo:letter-spacing="normal" fo:font-style="normal" fo:font-weight="normal"/>
    </style:style>
    <style:style style:name="T16" style:family="text">
      <style:text-properties fo:font-variant="normal" fo:text-transform="none" fo:color="#f5f6fb" loext:opacity="100%" style:font-name="Inter" fo:font-size="12.75pt" fo:letter-spacing="normal" fo:font-style="normal" fo:font-weight="bold"/>
    </style:style>
    <style:style style:name="T17" style:family="text">
      <style:text-properties fo:font-variant="normal" fo:text-transform="none" fo:color="#f5f6fb" loext:opacity="100%" style:font-name="Inter" fo:font-size="12.75pt" fo:letter-spacing="normal" fo:font-style="normal" fo:font-weight="normal"/>
    </style:style>
    <style:style style:name="T18" style:family="text">
      <style:text-properties fo:font-variant="normal" fo:text-transform="none" fo:color="#f5f6fb" loext:opacity="100%" style:font-name="Menlo" fo:font-size="9.75pt" fo:letter-spacing="normal" fo:font-style="normal" fo:font-weight="normal" fo:background-color="#31363c" loext:char-shading-value="0" loext:padding="0in" loext:border="none"/>
    </style:style>
    <style:style style:name="T19" style:family="text">
      <style:text-properties fo:font-variant="normal" fo:text-transform="none" fo:color="#f5f6fb" loext:opacity="100%" fo:letter-spacing="normal" fo:background-color="#31363c" loext:char-shading-value="0" loext:padding="0in" loext:border="none"/>
    </style:style>
    <style:style style:name="T20" style:family="text">
      <style:text-properties fo:font-variant="normal" fo:text-transform="none" fo:color="#6272a4" loext:opacity="100%" style:font-name="Menlo" fo:font-size="9.75pt" fo:letter-spacing="normal" fo:font-style="italic" fo:font-weight="normal" fo:background-color="#31363c" loext:char-shading-value="0" loext:padding="0in" loext:border="none"/>
    </style:style>
    <style:style style:name="T21" style:family="text">
      <style:text-properties fo:font-variant="normal" fo:text-transform="none" fo:color="#ff79c6" loext:opacity="100%" style:font-name="Menlo" fo:font-size="9.75pt" fo:letter-spacing="normal" fo:font-style="normal" fo:font-weight="bold" fo:background-color="#31363c" loext:char-shading-value="0" loext:padding="0in" loext:border="none"/>
    </style:style>
    <style:style style:name="T22" style:family="text">
      <style:text-properties fo:font-variant="normal" fo:text-transform="none" fo:color="#50fa7b" loext:opacity="100%" style:font-name="Menlo" fo:font-size="9.75pt" fo:letter-spacing="normal" fo:font-style="italic" fo:font-weight="bold" fo:background-color="#31363c" loext:char-shading-value="0" loext:padding="0in" loext:border="none"/>
    </style:style>
    <style:style style:name="T23" style:family="text">
      <style:text-properties fo:font-variant="normal" fo:text-transform="none" fo:color="#f1fa8c" loext:opacity="100%" style:font-name="Menlo" fo:font-size="9.75pt" fo:letter-spacing="normal" fo:font-style="normal" fo:font-weight="normal" fo:background-color="#31363c" loext:char-shading-value="0" loext:padding="0in" loext:border="none"/>
    </style:style>
    <style:style style:name="T24" style:family="text">
      <style:text-properties fo:font-variant="normal" fo:text-transform="none" fo:color="#f1fa8c" loext:opacity="100%" fo:letter-spacing="normal" fo:background-color="#31363c" loext:char-shading-value="0" loext:padding="0in" loext:border="none"/>
    </style:style>
    <style:style style:name="T25" style:family="text">
      <style:text-properties fo:font-variant="normal" fo:text-transform="none" fo:color="#f8f8f2" loext:opacity="100%" style:font-name="Menlo" fo:font-size="9.75pt" fo:letter-spacing="normal" fo:font-style="normal" fo:font-weight="normal" fo:background-color="#31363c" loext:char-shading-value="0" loext:padding="0in" loext:border="none"/>
    </style:style>
    <style:style style:name="T26" style:family="text">
      <style:text-properties fo:font-variant="normal" fo:text-transform="none" style:font-name="Inter" fo:font-size="10.5pt" fo:letter-spacing="normal" fo:font-style="normal" fo:font-weight="bold"/>
    </style:style>
    <style:style style:name="T27" style:family="text">
      <style:text-properties fo:font-variant="normal" fo:text-transform="none" style:font-name="Inter" fo:font-size="10.5pt" fo:letter-spacing="normal" fo:font-style="normal" fo:font-weight="normal"/>
    </style:style>
    <style:style style:name="T28" style:family="text">
      <style:text-properties fo:font-variant="normal" fo:text-transform="none" style:font-name="Inter" fo:font-size="12.75pt" fo:letter-spacing="normal" fo:font-style="normal" fo:font-weight="bold"/>
    </style:style>
    <style:style style:name="T29" style:family="text">
      <style:text-properties fo:font-variant="normal" fo:text-transform="none" style:font-name="Inter" fo:font-size="12.75pt" fo:letter-spacing="normal" fo:font-style="normal" fo:font-weight="normal"/>
    </style:style>
    <style:style style:name="T30" style:family="text">
      <style:text-properties fo:font-variant="normal" fo:text-transform="none" style:font-name="Menlo" fo:font-size="9.75pt" fo:letter-spacing="normal" fo:font-style="italic" fo:font-weight="normal" fo:background-color="#31363c" loext:char-shading-value="0" loext:padding="0in" loext:border="none"/>
    </style:style>
    <style:style style:name="T31" style:family="text">
      <style:text-properties fo:font-variant="normal" fo:text-transform="none" style:font-name="Menlo" fo:font-size="9.75pt" fo:letter-spacing="normal" fo:font-style="italic" fo:font-weight="bold" fo:background-color="#31363c" loext:char-shading-value="0" loext:padding="0in" loext:border="none"/>
    </style:style>
    <style:style style:name="T32" style:family="text">
      <style:text-properties fo:font-variant="normal" fo:text-transform="none" style:font-name="Menlo" fo:font-size="9.75pt" fo:letter-spacing="normal" fo:font-style="normal" fo:font-weight="bold" fo:background-color="#31363c" loext:char-shading-value="0" loext:padding="0in" loext:border="none"/>
    </style:style>
    <style:style style:name="T33" style:family="text">
      <style:text-properties fo:font-variant="normal" fo:text-transform="none" style:font-name="Menlo" fo:font-size="9.75pt" fo:letter-spacing="normal" fo:font-style="normal" fo:font-weight="normal" fo:background-color="#31363c" loext:char-shading-value="0" loext:padding="0in" loext:border="none"/>
    </style:style>
    <style:style style:name="T34" style:family="text">
      <style:text-properties fo:font-variant="normal" fo:text-transform="none" fo:color="#fffffe" loext:opacity="100%" fo:letter-spacing="normal" fo:background-color="#31363c" loext:char-shading-value="0" loext:padding="0in" loext:border="none"/>
    </style:style>
    <style:style style:name="T35" style:family="text">
      <style:text-properties fo:font-variant="normal" fo:text-transform="none" fo:color="#fffffe" loext:opacity="100%" style:font-name="Menlo" fo:font-size="9.75pt" fo:letter-spacing="normal" fo:font-style="normal" fo:font-weight="normal" fo:background-color="#31363c" loext:char-shading-value="0" loext:padding="0in" loext:border="none"/>
    </style:style>
    <style:style style:name="T36" style:family="text">
      <style:text-properties fo:font-variant="normal" fo:text-transform="none" fo:color="#fffffe" loext:opacity="100%" style:font-name="Menlo" fo:font-size="9.75pt" fo:letter-spacing="normal" fo:font-style="normal" fo:font-weight="bold" fo:background-color="#31363c" loext:char-shading-value="0" loext:padding="0in" loext:border="none"/>
    </style:style>
    <style:style style:name="T37" style:family="text">
      <style:text-properties fo:font-variant="normal" fo:text-transform="none" fo:color="#fffffe" loext:opacity="100%" style:font-name="Menlo" fo:font-size="9.75pt" fo:letter-spacing="normal" fo:font-style="italic" fo:font-weight="normal" fo:background-color="#31363c" loext:char-shading-value="0" loext:padding="0in" loext:border="none"/>
    </style:style>
    <style:style style:name="T38" style:family="text">
      <style:text-properties fo:font-variant="normal" fo:text-transform="none" fo:color="#fffffe" loext:opacity="100%" style:font-name="Menlo" fo:font-size="9.75pt" fo:letter-spacing="normal" fo:font-style="italic" fo:font-weight="bold" fo:background-color="#31363c" loext:char-shading-value="0" loext:padding="0in" loext:border="none"/>
    </style:style>
    <style:style style:name="T39" style:family="text">
      <style:text-properties officeooo:rsid="00248142" fo:background-color="transparent" loext:char-shading-value="0"/>
    </style:style>
    <style:style style:name="T40" style:family="text">
      <style:text-properties officeooo:rsid="00267689" fo:background-color="transparent" loext:char-shading-value="0"/>
    </style:style>
    <style:style style:name="T41" style:family="text">
      <style:text-properties officeooo:rsid="00292397" fo:background-color="transparent" loext:char-shading-value="0"/>
    </style:style>
    <style:style style:name="T42" style:family="text">
      <style:text-properties officeooo:rsid="002a13f4" fo:background-color="transparent" loext:char-shading-value="0"/>
    </style:style>
    <style:style style:name="T43" style:family="text">
      <style:text-properties fo:color="#000000" loext:opacity="100%" fo:font-weight="bold"/>
    </style:style>
    <style:style style:name="T44" style:family="text">
      <style:text-properties fo:color="#000000" loext:opacity="100%" officeooo:rsid="00248142" fo:background-color="#fe7f00" loext:char-shading-value="0"/>
    </style:style>
    <style:style style:name="T45" style:family="text">
      <style:text-properties fo:color="#000000" loext:opacity="100%" officeooo:rsid="00248142" fo:background-color="transparent" loext:char-shading-value="0"/>
    </style:style>
    <style:style style:name="T46" style:family="text">
      <style:text-properties fo:color="#000000" loext:opacity="100%" officeooo:rsid="00255180" fo:background-color="transparent" loext:char-shading-value="0"/>
    </style:style>
    <style:style style:name="T47" style:family="text">
      <style:text-properties fo:color="#000000" loext:opacity="100%" officeooo:rsid="002a13f4" fo:background-color="transparent" loext:char-shading-value="0"/>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24977e" style:font-weight-asian="bold" style:font-weight-complex="bold"/>
    </style:style>
    <style:style style:name="T51" style:family="text">
      <style:text-properties fo:font-weight="bold" officeooo:rsid="002857d6" style:font-weight-asian="bold" style:font-weight-complex="bold"/>
    </style:style>
    <style:style style:name="T52" style:family="text">
      <style:text-properties fo:font-weight="bold" officeooo:rsid="00292397" style:font-weight-asian="bold" style:font-weight-complex="bold"/>
    </style:style>
    <style:style style:name="T53" style:family="text">
      <style:text-properties fo:background-color="#fe7f00" loext:char-shading-value="0"/>
    </style:style>
    <style:style style:name="T54" style:family="text">
      <style:text-properties officeooo:rsid="0024977e"/>
    </style:style>
    <style:style style:name="T55" style:family="text">
      <style:text-properties officeooo:rsid="00255180"/>
    </style:style>
    <style:style style:name="T56" style:family="text">
      <style:text-properties officeooo:rsid="00267689"/>
    </style:style>
    <style:style style:name="T57" style:family="text">
      <style:text-properties fo:color="#00763b" loext:opacity="100%" fo:font-weight="bold" officeooo:rsid="00267689" fo:background-color="transparent" loext:char-shading-value="0" style:font-weight-asian="bold" style:font-weight-complex="bold"/>
    </style:style>
    <style:style style:name="T58" style:family="text">
      <style:text-properties fo:color="#00763b" loext:opacity="100%" fo:font-weight="bold" style:font-weight-asian="bold" style:font-weight-complex="bold"/>
    </style:style>
    <style:style style:name="T59" style:family="text">
      <style:text-properties officeooo:rsid="002857d6"/>
    </style:style>
    <style:style style:name="T60" style:family="text">
      <style:text-properties officeooo:rsid="00292397"/>
    </style:style>
    <style:style style:name="T61" style:family="text">
      <style:text-properties style:font-name="Inter" fo:font-size="10.5pt" fo:font-style="normal" fo:font-weight="normal"/>
    </style:style>
    <style:style style:name="T62" style:family="text">
      <style:text-properties fo:color="#f5f6fb" loext:opacity="100%" fo:font-weight="bold"/>
    </style:style>
    <style:style style:name="T63" style:family="text">
      <style:text-properties fo:color="#fffffe" loext:opacity="100%"/>
    </style:style>
    <style:style style:name="T64" style:family="text">
      <style:text-properties fo:color="#fffffe" loext:opacity="100%" fo:font-weight="bold"/>
    </style:style>
    <style:style style:name="T65" style:family="text">
      <style:text-properties officeooo:rsid="002c234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reat modeling fundamentals</text:h>
      <text:h text:style-name="P2" text:outline-level="2">Introduction</text:h>
      <text:h text:style-name="P4" text:outline-level="3">What is Threat Modeling?</text:h>
      <text:p text:style-name="P49">Threat modeling is a structured approach to identifying, quantifying, and addressing security risks in a system. It’s a proactive security practice that helps organizations understand potential threats before they materialize into actual attacks.</text:p>
      <text:p text:style-name="P49">Think of threat modeling as a security blueprint review. Just as architects review building plans for structural weaknesses, security professionals use threat modeling to identify security weaknesses in system designs.</text:p>
      <text:h text:style-name="P4" text:outline-level="3">Why Threat Modeling Matters</text:h>
      <text:p text:style-name="P33"><text:span text:style-name="Strong_20_Emphasis"><text:span text:style-name="T3">Key Insight</text:span></text:span><text:span text:style-name="T4">:</text:span></text:p>
      <text:p text:style-name="P49">Finding and fixing security issues during design is 100x cheaper than fixing them in production.</text:p>
      <text:p text:style-name="P49">Threat modeling is essential because:</text:p>
      <text:list text:style-name="L11">
        <text:list-item>
          <text:p text:style-name="P34"><text:span text:style-name="Strong_20_Emphasis"><text:span text:style-name="T3">Early Detection</text:span></text:span><text:span text:style-name="T4">: Identifies vulnerabilities before code is written</text:span></text:p>
        </text:list-item>
        <text:list-item>
          <text:p text:style-name="P34"><text:span text:style-name="Strong_20_Emphasis"><text:span text:style-name="T3">Cost Efficiency</text:span></text:span><text:span text:style-name="T4">: Fixing design flaws is far cheaper than post-deployment patches</text:span></text:p>
        </text:list-item>
        <text:list-item>
          <text:p text:style-name="P34"><text:span text:style-name="Strong_20_Emphasis"><text:span text:style-name="T3">Comprehensive View</text:span></text:span><text:span text:style-name="T4">: Provides a holistic understanding of system security</text:span></text:p>
        </text:list-item>
        <text:list-item>
          <text:p text:style-name="P34"><text:span text:style-name="Strong_20_Emphasis"><text:span text:style-name="T3">Risk Prioritization</text:span></text:span><text:span text:style-name="T4">: Helps allocate security resources effectively</text:span></text:p>
        </text:list-item>
        <text:list-item>
          <text:p text:style-name="P34"><text:span text:style-name="Strong_20_Emphasis"><text:span text:style-name="T3">Compliance</text:span></text:span><text:span text:style-name="T4">: Meets regulatory requirements (PCI-DSS, HIPAA, GDPR)</text:span></text:p>
        </text:list-item>
        <text:list-item>
          <text:p text:style-name="P34"><text:span text:style-name="Strong_20_Emphasis"><text:span text:style-name="T3">Security Culture</text:span></text:span><text:span text:style-name="T4">: Builds security awareness across development teams</text:span></text:p>
        </text:list-item>
      </text:list>
      <text:h text:style-name="P4" text:outline-level="3"><text:soft-page-break/>Real-World Relevance</text:h>
      <text:p text:style-name="P49">Threat modeling is used across industries:</text:p>
      <text:list text:style-name="L12">
        <text:list-item>
          <text:p text:style-name="P35"><text:span text:style-name="Strong_20_Emphasis"><text:span text:style-name="T3">Financial Services</text:span></text:span><text:span text:style-name="T4">: Protecting customer financial data and transactions</text:span></text:p>
        </text:list-item>
        <text:list-item>
          <text:p text:style-name="P35"><text:span text:style-name="Strong_20_Emphasis"><text:span text:style-name="T3">Healthcare</text:span></text:span><text:span text:style-name="T4">: Securing patient records and medical devices</text:span></text:p>
        </text:list-item>
        <text:list-item>
          <text:p text:style-name="P35"><text:span text:style-name="Strong_20_Emphasis"><text:span text:style-name="T3">E-commerce</text:span></text:span><text:span text:style-name="T4">: Safeguarding payment information and user accounts</text:span></text:p>
        </text:list-item>
        <text:list-item>
          <text:p text:style-name="P35"><text:span text:style-name="Strong_20_Emphasis"><text:span text:style-name="T3">IoT</text:span></text:span><text:span text:style-name="T4">: Protecting connected devices from remote attacks</text:span></text:p>
        </text:list-item>
        <text:list-item>
          <text:p text:style-name="P35"><text:span text:style-name="Strong_20_Emphasis"><text:span text:style-name="T3">Cloud Services</text:span></text:span><text:span text:style-name="T4">: Securing multi-tenant environments and APIs</text:span></text:p>
        </text:list-item>
        <text:list-item>
          <text:p text:style-name="P35"><text:span text:style-name="Strong_20_Emphasis"><text:span text:style-name="T3">Government</text:span></text:span><text:span text:style-name="T4">: Protecting critical infrastructure and classified information</text:span></text:p>
        </text:list-item>
      </text:list>
      <text:h text:style-name="P4" text:outline-level="3">Learning Objectives</text:h>
      <text:p text:style-name="P49">By the end of this guide, you will be able to:</text:p>
      <text:list text:style-name="L13">
        <text:list-item>
          <text:p text:style-name="P50">Explain core security concepts including the CIA Triad</text:p>
        </text:list-item>
        <text:list-item>
          <text:p text:style-name="P50">Differentiate between assets, threats, vulnerabilities, and risks</text:p>
        </text:list-item>
        <text:list-item>
          <text:p text:style-name="P50">Apply the STRIDE methodology to identify threats</text:p>
        </text:list-item>
        <text:list-item>
          <text:p text:style-name="P50">Use the DREAD system to prioritize risks</text:p>
        </text:list-item>
        <text:list-item>
          <text:p text:style-name="P50">Follow a structured 6 - step threat modeling process</text:p>
        </text:list-item>
      </text:list>
      <text:p text:style-name="P8"/>
      <text:h text:style-name="P2" text:outline-level="2"><text:soft-page-break/></text:h>
      <text:h text:style-name="P2" text:outline-level="2">Core Security Concepts</text:h>
      <text:h text:style-name="P4" text:outline-level="3">The CIA Triad</text:h>
      <text:p text:style-name="P49">The CIA Triad is the foundation of information security, representing three core principles:</text:p>
      <text:p text:style-name="P89"><draw:frame draw:style-name="fr2" draw:name="Image1" text:anchor-type="char" svg:width="5.011in" svg:height="2.2091in" draw:z-index="0"><draw:image xlink:href="Pictures/10000001000002BD0000013523C1C425.png" xlink:type="simple" xlink:show="embed" xlink:actuate="onLoad" draw:mime-type="image/png"/></draw:frame></text:p>
      <text:h text:style-name="P6" text:outline-level="4">Confidentiality<text:span text:style-name="T65">\</text:span></text:h>
      <text:p text:style-name="P33"><text:span text:style-name="Strong_20_Emphasis"><text:span text:style-name="T3">Definition</text:span></text:span><text:span text:style-name="T4">:</text:span></text:p>
      <text:p text:style-name="P49">Ensuring that information is accessible only to those authorized to access it.</text:p>
      <text:p text:style-name="P33"><text:span text:style-name="Strong_20_Emphasis"><text:span text:style-name="T3">Threats</text:span></text:span><text:span text:style-name="T4">:</text:span></text:p>
      <text:list text:style-name="L14">
        <text:list-item>
          <text:p text:style-name="P51">Unauthorized data access</text:p>
        </text:list-item>
        <text:list-item>
          <text:p text:style-name="P51">Man-in-the-middle attacks</text:p>
        </text:list-item>
        <text:list-item>
          <text:p text:style-name="P51">Data breaches</text:p>
        </text:list-item>
        <text:list-item>
          <text:p text:style-name="P51">Social engineering</text:p>
        </text:list-item>
      </text:list>
      <text:p text:style-name="P33"><text:span text:style-name="Strong_20_Emphasis"><text:span text:style-name="T3">Controls</text:span></text:span><text:span text:style-name="T4">:</text:span></text:p>
      <text:list text:style-name="L15">
        <text:list-item>
          <text:p text:style-name="P52">Encryption (at rest and in transit)</text:p>
        </text:list-item>
        <text:list-item>
          <text:p text:style-name="P52">Access control lists (ACLs)</text:p>
        </text:list-item>
        <text:list-item>
          <text:p text:style-name="P52">Multi-factor authentication (MFA)</text:p>
        </text:list-item>
        <text:list-item>
          <text:p text:style-name="P52">Data classification policies</text:p>
        </text:list-item>
      </text:list>
      <text:p text:style-name="P33"><text:soft-page-break/><text:span text:style-name="Strong_20_Emphasis"><text:span text:style-name="T3">Example</text:span></text:span><text:span text:style-name="T4">:</text:span></text:p>
      <text:p text:style-name="P49">A healthcare app must ensure that patient medical records are only viewable by authorized medical staff, not other patients or unauthorized third parties.</text:p>
      <text:h text:style-name="P6" text:outline-level="4">Integrity</text:h>
      <text:p text:style-name="P33"><text:span text:style-name="Strong_20_Emphasis"><text:span text:style-name="T3">Definition</text:span></text:span><text:span text:style-name="T4">:</text:span></text:p>
      <text:p text:style-name="P49">Ensuring that information is accurate, complete, and has not been tampered with.</text:p>
      <text:p text:style-name="P33"><text:span text:style-name="Strong_20_Emphasis"><text:span text:style-name="T3">Threats</text:span></text:span><text:span text:style-name="T4">:</text:span></text:p>
      <text:list text:style-name="L16">
        <text:list-item>
          <text:p text:style-name="P53">Data tampering</text:p>
        </text:list-item>
        <text:list-item>
          <text:p text:style-name="P53">SQL injection</text:p>
        </text:list-item>
        <text:list-item>
          <text:p text:style-name="P53">Man-in-the-middle attacks</text:p>
        </text:list-item>
        <text:list-item>
          <text:p text:style-name="P53">Unauthorized modifications</text:p>
        </text:list-item>
      </text:list>
      <text:p text:style-name="P33"><text:span text:style-name="Strong_20_Emphasis"><text:span text:style-name="T3">Controls</text:span></text:span><text:span text:style-name="T4">:</text:span></text:p>
      <text:list text:style-name="L17">
        <text:list-item>
          <text:p text:style-name="P54">Digital signatures</text:p>
        </text:list-item>
        <text:list-item>
          <text:p text:style-name="P54">Hash functions (SHA-256)</text:p>
        </text:list-item>
        <text:list-item>
          <text:p text:style-name="P54">Version control</text:p>
        </text:list-item>
        <text:list-item>
          <text:p text:style-name="P54">Input validation</text:p>
        </text:list-item>
        <text:list-item>
          <text:p text:style-name="P54">Database constraints</text:p>
        </text:list-item>
      </text:list>
      <text:p text:style-name="P33"><text:span text:style-name="Strong_20_Emphasis"><text:span text:style-name="T3">Example</text:span></text:span><text:span text:style-name="T4">:</text:span></text:p>
      <text:p text:style-name="P49">A banking application must ensure that transaction amounts cannot be modified during transmission or storage.</text:p>
      <text:h text:style-name="P6" text:outline-level="4">Availability</text:h>
      <text:p text:style-name="P33"><text:span text:style-name="Strong_20_Emphasis"><text:span text:style-name="T3">Definition</text:span></text:span><text:span text:style-name="T4">:</text:span></text:p>
      <text:p text:style-name="P49">Ensuring that information and resources are accessible to authorized users when needed.</text:p>
      <text:p text:style-name="P33"><text:span text:style-name="Strong_20_Emphasis"><text:span text:style-name="T3">Threats</text:span></text:span><text:span text:style-name="T4">:</text:span></text:p>
      <text:list text:style-name="L18">
        <text:list-item>
          <text:p text:style-name="P55">Denial of Service (DoS) attacks</text:p>
        </text:list-item>
        <text:list-item>
          <text:p text:style-name="P55">Distributed Denial of Service (DDoS) attacks</text:p>
        </text:list-item>
        <text:list-item>
          <text:p text:style-name="P55">Hardware failures</text:p>
        </text:list-item>
        <text:list-item>
          <text:p text:style-name="P55">Natural disasters</text:p>
        </text:list-item>
        <text:list-item>
          <text:p text:style-name="P55">Ransomware</text:p>
        </text:list-item>
      </text:list>
      <text:p text:style-name="P33"><text:span text:style-name="Strong_20_Emphasis"><text:span text:style-name="T3">Controls</text:span></text:span><text:span text:style-name="T4">:</text:span></text:p>
      <text:list text:style-name="L19">
        <text:list-item>
          <text:p text:style-name="P56"><text:soft-page-break/>Load balancing</text:p>
        </text:list-item>
        <text:list-item>
          <text:p text:style-name="P56">Redundancy and failover systems</text:p>
        </text:list-item>
        <text:list-item>
          <text:p text:style-name="P56">DDoS protection services</text:p>
        </text:list-item>
        <text:list-item>
          <text:p text:style-name="P56">Regular backups</text:p>
        </text:list-item>
        <text:list-item>
          <text:p text:style-name="P56">Disaster recovery plans</text:p>
        </text:list-item>
      </text:list>
      <text:p text:style-name="P33"><text:span text:style-name="Strong_20_Emphasis"><text:span text:style-name="T3">Example</text:span></text:span><text:span text:style-name="T4">:</text:span></text:p>
      <text:p text:style-name="P49">An e-commerce website must remain accessible to customers 24/7, especially during peak shopping periods.</text:p>
      <text:h text:style-name="P2" text:outline-level="2">Assets, Threats, Vulnerabilities, and Risks</text:h>
      <text:p text:style-name="P49">Understanding these four concepts is crucial for effective threat modeling:</text:p>
      <text:p text:style-name="P89"><draw:frame draw:style-name="fr1" draw:name="Image2" text:anchor-type="char" svg:width="6.2811in" svg:height="2.0626in" draw:z-index="1"><draw:image xlink:href="Pictures/100000010000025B000000C612820B87.png" xlink:type="simple" xlink:show="embed" xlink:actuate="onLoad" draw:mime-type="image/png"/></draw:frame></text:p>
      <text:h text:style-name="P6" text:outline-level="4">Assets</text:h>
      <text:p text:style-name="P33"><text:span text:style-name="Strong_20_Emphasis"><text:span text:style-name="T3">Definition</text:span></text:span><text:span text:style-name="T4">:</text:span></text:p>
      <text:p text:style-name="P49">Anything of value to the organization that needs protection.</text:p>
      <text:p text:style-name="P33"><text:span text:style-name="Strong_20_Emphasis"><text:span text:style-name="T3">Types of Assets</text:span></text:span><text:span text:style-name="T4">:</text:span></text:p>
      <text:p text:style-name="P33"><text:span text:style-name="Strong_20_Emphasis"><text:span text:style-name="T3">Data</text:span></text:span><text:span text:style-name="T4">: Customer information, financial records, intellectual property</text:span></text:p>
      <text:p text:style-name="P33"><text:span text:style-name="Strong_20_Emphasis"><text:span text:style-name="T3">Hardware</text:span></text:span><text:span text:style-name="T4">: Servers, workstations, mobile devices, IoT sensors</text:span></text:p>
      <text:p text:style-name="P33"><text:span text:style-name="Strong_20_Emphasis"><text:span text:style-name="T3">Software</text:span></text:span><text:span text:style-name="T4">: Applications, databases, operating systems</text:span></text:p>
      <text:p text:style-name="P33"><text:span text:style-name="Strong_20_Emphasis"><text:span text:style-name="T3">Services</text:span></text:span><text:span text:style-name="T4">: APIs, cloud services, authentication systems</text:span></text:p>
      <text:p text:style-name="P33"><text:soft-page-break/><text:span text:style-name="Strong_20_Emphasis"><text:span text:style-name="T3">People</text:span></text:span><text:span text:style-name="T4">: Employees, contractors, administrators</text:span></text:p>
      <text:p text:style-name="P33"><text:span text:style-name="Strong_20_Emphasis"><text:span text:style-name="T3">Reputation</text:span></text:span><text:span text:style-name="T4">: Brand image, customer trust</text:span></text:p>
      <text:p text:style-name="P33"><text:span text:style-name="Strong_20_Emphasis"><text:span text:style-name="T3">Example Assets</text:span></text:span><text:span text:style-name="T4">:</text:span></text:p>
      <table:table table:name="Table1" table:style-name="Table1">
        <table:table-column table:style-name="Table1.A"/>
        <table:table-column table:style-name="Table1.B"/>
        <table:table-column table:style-name="Table1.C"/>
        <table:table-row>
          <table:table-cell table:style-name="Table1.A1" office:value-type="string">
            <text:p text:style-name="P32">Asset Type</text:p>
          </table:table-cell>
          <table:table-cell table:style-name="Table1.A1" office:value-type="string">
            <text:p text:style-name="P32">Example</text:p>
          </table:table-cell>
          <table:table-cell table:style-name="Table1.A1" office:value-type="string">
            <text:p text:style-name="P32">Value</text:p>
          </table:table-cell>
        </table:table-row>
        <table:table-row>
          <table:table-cell table:style-name="Table1.A1" office:value-type="string">
            <text:p text:style-name="P28">Data</text:p>
          </table:table-cell>
          <table:table-cell table:style-name="Table1.A1" office:value-type="string">
            <text:p text:style-name="P28">Customer credit card numbers</text:p>
          </table:table-cell>
          <table:table-cell table:style-name="Table1.A1" office:value-type="string">
            <text:p text:style-name="P28">Critical</text:p>
          </table:table-cell>
        </table:table-row>
        <table:table-row>
          <table:table-cell table:style-name="Table1.A1" office:value-type="string">
            <text:p text:style-name="P28">Data</text:p>
          </table:table-cell>
          <table:table-cell table:style-name="Table1.A1" office:value-type="string">
            <text:p text:style-name="P28">User email addresses</text:p>
          </table:table-cell>
          <table:table-cell table:style-name="Table1.A1" office:value-type="string">
            <text:p text:style-name="P28">High</text:p>
          </table:table-cell>
        </table:table-row>
        <table:table-row>
          <table:table-cell table:style-name="Table1.A1" office:value-type="string">
            <text:p text:style-name="P28">Hardware</text:p>
          </table:table-cell>
          <table:table-cell table:style-name="Table1.A1" office:value-type="string">
            <text:p text:style-name="P28">Production database server</text:p>
          </table:table-cell>
          <table:table-cell table:style-name="Table1.A1" office:value-type="string">
            <text:p text:style-name="P28">Critical</text:p>
          </table:table-cell>
        </table:table-row>
        <table:table-row>
          <table:table-cell table:style-name="Table1.A1" office:value-type="string">
            <text:p text:style-name="P28">Software</text:p>
          </table:table-cell>
          <table:table-cell table:style-name="Table1.A1" office:value-type="string">
            <text:p text:style-name="P28">Payment processing API</text:p>
          </table:table-cell>
          <table:table-cell table:style-name="Table1.A1" office:value-type="string">
            <text:p text:style-name="P28">Critical</text:p>
          </table:table-cell>
        </table:table-row>
        <table:table-row>
          <table:table-cell table:style-name="Table1.A1" office:value-type="string">
            <text:p text:style-name="P28">Reputation</text:p>
          </table:table-cell>
          <table:table-cell table:style-name="Table1.A1" office:value-type="string">
            <text:p text:style-name="P28">Company brand</text:p>
          </table:table-cell>
          <table:table-cell table:style-name="Table1.A1" office:value-type="string">
            <text:p text:style-name="P29">High</text:p>
          </table:table-cell>
        </table:table-row>
      </table:table>
      <text:h text:style-name="P6" text:outline-level="4">Threats</text:h>
      <text:p text:style-name="P33"><text:span text:style-name="Strong_20_Emphasis"><text:span text:style-name="T3">Definition</text:span></text:span><text:span text:style-name="T4">:</text:span></text:p>
      <text:p text:style-name="P49">Potential causes of unwanted incidents that may harm a system or organization.</text:p>
      <text:p text:style-name="P33"><text:span text:style-name="Strong_20_Emphasis"><text:span text:style-name="T3">Types of Threats</text:span></text:span><text:span text:style-name="T4">:</text:span></text:p>
      <text:p text:style-name="P33"><text:span text:style-name="Strong_20_Emphasis"><text:span text:style-name="T3">Natural</text:span></text:span><text:span text:style-name="T4">: Floods, fires, earthquakes</text:span></text:p>
      <text:p text:style-name="P33"><text:span text:style-name="Strong_20_Emphasis"><text:span text:style-name="T3">Human (Intentional)</text:span></text:span><text:span text:style-name="T4">: Hackers, malicious insiders, competitors</text:span></text:p>
      <text:p text:style-name="P33"><text:span text:style-name="Strong_20_Emphasis"><text:span text:style-name="T3">Human (Unintentional)</text:span></text:span><text:span text:style-name="T4">: Accidental deletion, misconfiguration</text:span></text:p>
      <text:p text:style-name="P33"><text:span text:style-name="Strong_20_Emphasis"><text:span text:style-name="T3">Technical</text:span></text:span><text:span text:style-name="T4">: Hardware failures, software bugs, network outages</text:span></text:p>
      <text:p text:style-name="P33"><text:span text:style-name="Strong_20_Emphasis"><text:span text:style-name="T3">Threat Actors</text:span></text:span><text:span text:style-name="T4">:</text:span></text:p>
      <text:list text:style-name="L20">
        <text:list-item>
          <text:p text:style-name="P57">Script kiddies (low skill)</text:p>
        </text:list-item>
        <text:list-item>
          <text:p text:style-name="P57">Hacktivists (politically motivated)</text:p>
        </text:list-item>
        <text:list-item>
          <text:p text:style-name="P57">Cybercriminals (financially motivated)</text:p>
        </text:list-item>
        <text:list-item>
          <text:p text:style-name="P57">Nation-states (highly sophisticated)</text:p>
        </text:list-item>
        <text:list-item>
          <text:p text:style-name="P57">Malicious insiders (privileged access)</text:p>
        </text:list-item>
      </text:list>
      <text:h text:style-name="P6" text:outline-level="4">Vulnerabilities</text:h>
      <text:p text:style-name="P33"><text:span text:style-name="Strong_20_Emphasis"><text:span text:style-name="T3">Definition</text:span></text:span><text:span text:style-name="T4">:</text:span></text:p>
      <text:p text:style-name="P49">Weaknesses in a system that can be exploited by threats.</text:p>
      <text:p text:style-name="P33"><text:span text:style-name="Strong_20_Emphasis"><text:span text:style-name="T3">Common Vulnerabilities</text:span></text:span><text:span text:style-name="T4">:</text:span></text:p>
      <text:list text:style-name="L21">
        <text:list-item>
          <text:p text:style-name="P58">Unpatched software</text:p>
        </text:list-item>
        <text:list-item>
          <text:p text:style-name="P58">Weak passwords</text:p>
        </text:list-item>
        <text:list-item>
          <text:p text:style-name="P58"><text:soft-page-break/>Missing encryption</text:p>
        </text:list-item>
        <text:list-item>
          <text:p text:style-name="P58">Insecure APIs</text:p>
        </text:list-item>
        <text:list-item>
          <text:p text:style-name="P58">SQL injection flaws</text:p>
        </text:list-item>
        <text:list-item>
          <text:p text:style-name="P58">Cross-site scripting (XSS)</text:p>
        </text:list-item>
        <text:list-item>
          <text:p text:style-name="P58">Misconfigured cloud storage</text:p>
        </text:list-item>
        <text:list-item>
          <text:p text:style-name="P58">Insufficient logging</text:p>
        </text:list-item>
      </text:list>
      <text:p text:style-name="P33"><text:span text:style-name="Strong_20_Emphasis"><text:span text:style-name="T3">Vulnerability Example</text:span></text:span><text:span text:style-name="T4">:</text:span></text:p>
      <text:p text:style-name="P33"><draw:frame draw:style-name="fr1" draw:name="Image13" text:anchor-type="char" svg:width="6.1425in" svg:height="2.1217in" draw:z-index="2"><draw:image xlink:href="Pictures/10000001000002B4000000EF26FBC74D.png" xlink:type="simple" xlink:show="embed" xlink:actuate="onLoad" draw:mime-type="image/png"/></draw:frame><text:span text:style-name="Source_20_Text"><text:span text:style-name="T37"/></text:span></text:p>
      <text:h text:style-name="P6" text:outline-level="4">Risks</text:h>
      <text:p text:style-name="P33"><text:span text:style-name="Strong_20_Emphasis"><text:span text:style-name="T3">Definition</text:span></text:span><text:span text:style-name="T4">:</text:span></text:p>
      <text:p text:style-name="P49">The likelihood and impact of a threat exploiting a vulnerability.</text:p>
      <text:p text:style-name="P33"><text:span text:style-name="Strong_20_Emphasis"><text:span text:style-name="T3">Risk Formula</text:span></text:span><text:span text:style-name="T4">:</text:span></text:p>
      <text:p text:style-name="P49">Risk = Likelihood × Impact</text:p>
      <text:p text:style-name="P33"><text:span text:style-name="Strong_20_Emphasis"><text:span text:style-name="T3">Risk Levels</text:span></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P32">Likelihood</text:p>
          </table:table-cell>
          <table:table-cell table:style-name="Table2.A1" office:value-type="string">
            <text:p text:style-name="P32">Impact</text:p>
          </table:table-cell>
          <table:table-cell table:style-name="Table2.A1" office:value-type="string">
            <text:p text:style-name="P32">Risk Level</text:p>
          </table:table-cell>
        </table:table-row>
        <table:table-row>
          <table:table-cell table:style-name="Table2.A1" office:value-type="string">
            <text:p text:style-name="P28">High</text:p>
          </table:table-cell>
          <table:table-cell table:style-name="Table2.A1" office:value-type="string">
            <text:p text:style-name="P28">High</text:p>
          </table:table-cell>
          <table:table-cell table:style-name="Table2.A1" office:value-type="string">
            <text:p text:style-name="P28">Critical</text:p>
          </table:table-cell>
        </table:table-row>
        <table:table-row>
          <table:table-cell table:style-name="Table2.A1" office:value-type="string">
            <text:p text:style-name="P28">High</text:p>
          </table:table-cell>
          <table:table-cell table:style-name="Table2.A1" office:value-type="string">
            <text:p text:style-name="P28">Medium</text:p>
          </table:table-cell>
          <table:table-cell table:style-name="Table2.A1" office:value-type="string">
            <text:p text:style-name="P28">High</text:p>
          </table:table-cell>
        </table:table-row>
        <table:table-row>
          <table:table-cell table:style-name="Table2.A1" office:value-type="string">
            <text:p text:style-name="P28">Medium</text:p>
          </table:table-cell>
          <table:table-cell table:style-name="Table2.A1" office:value-type="string">
            <text:p text:style-name="P28">High</text:p>
          </table:table-cell>
          <table:table-cell table:style-name="Table2.A1" office:value-type="string">
            <text:p text:style-name="P28">High</text:p>
          </table:table-cell>
        </table:table-row>
        <table:table-row>
          <table:table-cell table:style-name="Table2.A1" office:value-type="string">
            <text:p text:style-name="P28">Medium</text:p>
          </table:table-cell>
          <table:table-cell table:style-name="Table2.A1" office:value-type="string">
            <text:p text:style-name="P28">Medium</text:p>
          </table:table-cell>
          <table:table-cell table:style-name="Table2.A1" office:value-type="string">
            <text:p text:style-name="P28">Medium</text:p>
          </table:table-cell>
        </table:table-row>
        <table:table-row>
          <table:table-cell table:style-name="Table2.A1" office:value-type="string">
            <text:p text:style-name="P28">Low</text:p>
          </table:table-cell>
          <table:table-cell table:style-name="Table2.A1" office:value-type="string">
            <text:p text:style-name="P28">High</text:p>
          </table:table-cell>
          <table:table-cell table:style-name="Table2.A1" office:value-type="string">
            <text:p text:style-name="P28">Medium</text:p>
          </table:table-cell>
        </table:table-row>
        <table:table-row>
          <table:table-cell table:style-name="Table2.A1" office:value-type="string">
            <text:p text:style-name="P28">Low</text:p>
          </table:table-cell>
          <table:table-cell table:style-name="Table2.A1" office:value-type="string">
            <text:p text:style-name="P28">Medium</text:p>
          </table:table-cell>
          <table:table-cell table:style-name="Table2.A1" office:value-type="string">
            <text:p text:style-name="P28">Low</text:p>
          </table:table-cell>
        </table:table-row>
        <table:table-row>
          <table:table-cell table:style-name="Table2.A1" office:value-type="string">
            <text:p text:style-name="P28">Low</text:p>
          </table:table-cell>
          <table:table-cell table:style-name="Table2.A1" office:value-type="string">
            <text:p text:style-name="P28">Low</text:p>
          </table:table-cell>
          <table:table-cell table:style-name="Table2.A1" office:value-type="string">
            <text:p text:style-name="P29">Low</text:p>
          </table:table-cell>
        </table:table-row>
      </table:table>
      <text:h text:style-name="P4" text:outline-level="3"><text:soft-page-break/>Attack Surfaces and Attack Vectors</text:h>
      <text:h text:style-name="P6" text:outline-level="4">Attack Surface</text:h>
      <text:p text:style-name="P33"><text:span text:style-name="Strong_20_Emphasis"><text:span text:style-name="T3">Definition</text:span></text:span><text:span text:style-name="T4">:</text:span></text:p>
      <text:p text:style-name="P49">The sum of all possible points where an attacker could enter or extract data from a system.</text:p>
      <text:p text:style-name="P89"><draw:frame draw:style-name="fr1" draw:name="Image3" text:anchor-type="char" svg:width="6.3807in" svg:height="0.9665in" draw:z-index="3"><draw:image xlink:href="Pictures/10000001000002B500000069CEC6BD22.png" xlink:type="simple" xlink:show="embed" xlink:actuate="onLoad" draw:mime-type="image/png"/></draw:frame></text:p>
      <text:p text:style-name="P33"><text:span text:style-name="Strong_20_Emphasis"><text:span text:style-name="T3">Components of Attack Surface</text:span></text:span><text:span text:style-name="T4">:</text:span></text:p>
      <text:p text:style-name="P33"><text:span text:style-name="Strong_20_Emphasis"><text:span text:style-name="T3">Network</text:span></text:span><text:span text:style-name="T4">: Open ports, network services, APIs</text:span></text:p>
      <text:p text:style-name="P33"><text:span text:style-name="Strong_20_Emphasis"><text:span text:style-name="T3">Application</text:span></text:span><text:span text:style-name="T4">: User inputs, file uploads, authentication mechanisms</text:span></text:p>
      <text:p text:style-name="P33"><text:span text:style-name="Strong_20_Emphasis"><text:span text:style-name="T3">Human</text:span></text:span><text:span text:style-name="T4">: Social engineering targets, privileged users</text:span></text:p>
      <text:p text:style-name="P33"><text:span text:style-name="Strong_20_Emphasis"><text:span text:style-name="T3">Physical</text:span></text:span><text:span text:style-name="T4">: Building access, hardware devices</text:span></text:p>
      <text:p text:style-name="P33"><text:span text:style-name="Strong_20_Emphasis"><text:span text:style-name="T3">Reducing Attack Surface</text:span></text:span><text:span text:style-name="T4">:</text:span></text:p>
      <text:list text:style-name="L22">
        <text:list-item>
          <text:p text:style-name="P59">Disable unnecessary services and ports</text:p>
        </text:list-item>
        <text:list-item>
          <text:p text:style-name="P59">Implement principle of least privilege</text:p>
        </text:list-item>
        <text:list-item>
          <text:p text:style-name="P59">Remove unused features and code</text:p>
        </text:list-item>
        <text:list-item>
          <text:p text:style-name="P59">Segment networks</text:p>
        </text:list-item>
        <text:list-item>
          <text:p text:style-name="P59">Use firewalls and access controls</text:p>
        </text:list-item>
      </text:list>
      <text:h text:style-name="P6" text:outline-level="4">Attack Vector</text:h>
      <text:p text:style-name="P33"><text:span text:style-name="Strong_20_Emphasis"><text:span text:style-name="T3">Definition</text:span></text:span><text:span text:style-name="T4">:</text:span></text:p>
      <text:p text:style-name="P49">The specific path or method used by an attacker to exploit a vulnerability.</text:p>
      <text:p text:style-name="P33"><text:span text:style-name="Strong_20_Emphasis"><text:span text:style-name="T3">Common Attack Vectors</text:span></text:span><text:span text:style-name="T4">:</text:span></text:p>
      <text:p text:style-name="P33"><text:span text:style-name="Strong_20_Emphasis"><text:span text:style-name="T3">Phishing</text:span></text:span><text:span text:style-name="T4">: Deceptive emails to steal credentials</text:span></text:p>
      <text:p text:style-name="P33"><text:span text:style-name="Strong_20_Emphasis"><text:span text:style-name="T3">SQL Injection</text:span></text:span><text:span text:style-name="T4">: Malicious database queries</text:span></text:p>
      <text:p text:style-name="P33"><text:span text:style-name="Strong_20_Emphasis"><text:span text:style-name="T3">Cross-Site Scripting (XSS)</text:span></text:span><text:span text:style-name="T4">: Injecting malicious scripts</text:span></text:p>
      <text:p text:style-name="P33"><text:span text:style-name="Strong_20_Emphasis"><text:span text:style-name="T3">Malware</text:span></text:span><text:span text:style-name="T4">: Viruses, trojans, ransomware</text:span></text:p>
      <text:p text:style-name="P33"><text:span text:style-name="Strong_20_Emphasis"><text:span text:style-name="T3">Man-in-the-Middle</text:span></text:span><text:span text:style-name="T4">: Intercepting communications</text:span></text:p>
      <text:p text:style-name="P33"><text:span text:style-name="Strong_20_Emphasis"><text:span text:style-name="T3">Brute Force</text:span></text:span><text:span text:style-name="T4">: Guessing passwords systematically</text:span></text:p>
      <text:p text:style-name="P33"><text:soft-page-break/><text:span text:style-name="Strong_20_Emphasis"><text:span text:style-name="T3">Zero-Day Exploits</text:span></text:span><text:span text:style-name="T4">: Exploiting unknown vulnerabilities</text:span></text:p>
      <text:p text:style-name="P33"><text:span text:style-name="Strong_20_Emphasis"><text:span text:style-name="T3">Social Engineering</text:span></text:span><text:span text:style-name="T4">: Manipulating people to divulge information</text:span></text:p>
      <text:p text:style-name="P33"><text:span text:style-name="Strong_20_Emphasis"><text:span text:style-name="T3">Attack Vector Example</text:span></text:span><text:span text:style-name="T4">:</text:span></text:p>
      <text:p text:style-name="P89"><draw:frame draw:style-name="fr1" draw:name="Image4" text:anchor-type="char" svg:width="4.502in" svg:height="3.4618in" draw:z-index="4"><draw:image xlink:href="Pictures/1000000100000278000001E6BADA6005.png" xlink:type="simple" xlink:show="embed" xlink:actuate="onLoad" draw:mime-type="image/png"/></draw:frame></text:p>
      <text:h text:style-name="P4" text:outline-level="3">Trust Boundaries</text:h>
      <text:p text:style-name="P33"><text:span text:style-name="Strong_20_Emphasis"><text:span text:style-name="T3">Definition</text:span></text:span><text:span text:style-name="T4">:</text:span></text:p>
      <text:p text:style-name="P49">Lines drawn on system diagrams that separate different trust zones where data or control changes trust levels.</text:p>
      <text:p text:style-name="P89"><draw:frame draw:style-name="fr2" draw:name="Image5" text:anchor-type="char" svg:width="2.3909in" svg:height="3.9264in" draw:z-index="5"><draw:image xlink:href="Pictures/10000001000001B7000002D1861CA059.png" xlink:type="simple" xlink:show="embed" xlink:actuate="onLoad" draw:mime-type="image/png"/></draw:frame></text:p>
      <text:p text:style-name="P89"/>
      <text:p text:style-name="P89"/>
      <text:p text:style-name="P89"/>
      <text:p text:style-name="P89"/>
      <text:p text:style-name="P89"/>
      <text:p text:style-name="P89"/>
      <text:p text:style-name="P33"><text:span text:style-name="Strong_20_Emphasis"><text:span text:style-name="T3"/></text:span></text:p>
      <text:p text:style-name="P33"><text:span text:style-name="Strong_20_Emphasis"><text:span text:style-name="T3"/></text:span></text:p>
      <text:p text:style-name="P33"><text:span text:style-name="Strong_20_Emphasis"><text:span text:style-name="T3"/></text:span></text:p>
      <text:p text:style-name="P33"><text:span text:style-name="Strong_20_Emphasis"><text:span text:style-name="T3"/></text:span></text:p>
      <text:p text:style-name="P33"><text:span text:style-name="Strong_20_Emphasis"><text:span text:style-name="T3"/></text:span></text:p>
      <text:p text:style-name="P33"><text:span text:style-name="Strong_20_Emphasis"><text:span text:style-name="T3"/></text:span></text:p>
      <text:p text:style-name="P33"><text:soft-page-break/><text:span text:style-name="Strong_20_Emphasis"><text:span text:style-name="T3">Why Trust Boundaries Matter</text:span></text:span><text:span text:style-name="T4">:</text:span></text:p>
      <text:list text:style-name="L23">
        <text:list-item>
          <text:p text:style-name="P60">Data crossing boundaries requires validation and sanitization</text:p>
        </text:list-item>
        <text:list-item>
          <text:p text:style-name="P60">Authentication/authorization checks should occur at boundaries</text:p>
        </text:list-item>
        <text:list-item>
          <text:p text:style-name="P60">Encryption is often required when crossing boundaries</text:p>
        </text:list-item>
        <text:list-item>
          <text:p text:style-name="P60">Logging and monitoring should track boundary crossings</text:p>
        </text:list-item>
      </text:list>
      <text:p text:style-name="P33"><text:span text:style-name="Strong_20_Emphasis"><text:span text:style-name="T3">Trust Boundary Examples</text:span></text:span><text:span text:style-name="T4">:</text:span></text:p>
      <text:list text:style-name="L24">
        <text:list-item>
          <text:p text:style-name="P61">User browser → Web server (Internet → DMZ)</text:p>
        </text:list-item>
        <text:list-item>
          <text:p text:style-name="P61">Web server → Application server (DMZ → Internal)</text:p>
        </text:list-item>
        <text:list-item>
          <text:p text:style-name="P61">Application → Database (Application layer → Data layer)</text:p>
        </text:list-item>
        <text:list-item>
          <text:p text:style-name="P61">Internal network → Cloud service (On-premise → Cloud)</text:p>
        </text:list-item>
        <text:list-item>
          <text:p text:style-name="P61">User context → Admin context (Privilege escalation boundary)</text:p>
        </text:list-item>
      </text:list>
      <text:p text:style-name="P33"><text:span text:style-name="Strong_20_Emphasis"><text:span text:style-name="T3">Key Takeaway</text:span></text:span><text:span text:style-name="T4">: Every time data or control crosses a trust boundary, it represents a potential security risk that must be addressed with appropriate controls.</text:span></text:p>
      <text:h text:style-name="P2" text:outline-level="2">Threat Modeling Methodologies</text:h>
      <text:h text:style-name="P4" text:outline-level="3">STRIDE Methodology</text:h>
      <text:p text:style-name="P49">STRIDE is a threat modeling framework developed by Microsoft that categorizes threats into six types. It’s one of the most widely used methodologies in the industry.</text:p>
      <text:p text:style-name="P89"><draw:frame draw:style-name="fr1" draw:name="Image6" text:anchor-type="char" svg:width="4.9661in" svg:height="2.4437in" draw:z-index="6"><draw:image xlink:href="Pictures/10000001000002B900000157427CF67F.png" xlink:type="simple" xlink:show="embed" xlink:actuate="onLoad" draw:mime-type="image/png"/></draw:frame></text:p>
      <text:h text:style-name="P6" text:outline-level="4">S - Spoofing Identity</text:h>
      <text:p text:style-name="P33"><text:span text:style-name="Strong_20_Emphasis"><text:span text:style-name="T3"/></text:span></text:p>
      <text:p text:style-name="P33"><text:soft-page-break/><text:span text:style-name="Strong_20_Emphasis"><text:span text:style-name="T3">Definition</text:span></text:span><text:span text:style-name="T4">:</text:span></text:p>
      <text:p text:style-name="P49">Pretending to be something or someone you’re not.</text:p>
      <text:p text:style-name="P33"><text:span text:style-name="Strong_20_Emphasis"><text:span text:style-name="T3">Examples</text:span></text:span><text:span text:style-name="T4">:</text:span></text:p>
      <text:list text:style-name="L25">
        <text:list-item>
          <text:p text:style-name="P62">Impersonating another user by stealing credentials</text:p>
        </text:list-item>
        <text:list-item>
          <text:p text:style-name="P62">Forging email sender addresses</text:p>
        </text:list-item>
        <text:list-item>
          <text:p text:style-name="P62">IP address spoofing</text:p>
        </text:list-item>
        <text:list-item>
          <text:p text:style-name="P62">Session token theft</text:p>
        </text:list-item>
        <text:list-item>
          <text:p text:style-name="P62">Fake SSL certificates</text:p>
        </text:list-item>
      </text:list>
      <text:p text:style-name="P33"><text:span text:style-name="Strong_20_Emphasis"><text:span text:style-name="T3">Mitigation Strategies</text:span></text:span><text:span text:style-name="T4">:</text:span></text:p>
      <text:list text:style-name="L26">
        <text:list-item>
          <text:p text:style-name="P63">Implement strong authentication (MFA)</text:p>
        </text:list-item>
        <text:list-item>
          <text:p text:style-name="P63">Use digital signatures</text:p>
        </text:list-item>
        <text:list-item>
          <text:p text:style-name="P63">Implement proper session management</text:p>
        </text:list-item>
        <text:list-item>
          <text:p text:style-name="P63">Use mutual TLS authentication</text:p>
        </text:list-item>
        <text:list-item>
          <text:p text:style-name="P63">Implement anti-spoofing measures (SPF, DKIM for email)</text:p>
        </text:list-item>
      </text:list>
      <text:p text:style-name="P33"><text:span text:style-name="Strong_20_Emphasis"><text:span text:style-name="T3">Real-World Example</text:span></text:span><text:span text:style-name="T4">:</text:span></text:p>
      <text:p text:style-name="P49">An attacker steals a user’s session cookie and uses it to impersonate the user on an e-commerce site, placing orders without authorization.</text:p>
      <text:h text:style-name="P6" text:outline-level="4">T - Tampering with Data</text:h>
      <text:p text:style-name="P33"><text:span text:style-name="Strong_20_Emphasis"><text:span text:style-name="T3">Definition</text:span></text:span><text:span text:style-name="T4">:</text:span></text:p>
      <text:p text:style-name="P49">Modifying data or code maliciously.</text:p>
      <text:p text:style-name="P33"><text:span text:style-name="Strong_20_Emphasis"><text:span text:style-name="T3">Examples</text:span></text:span><text:span text:style-name="T4">:</text:span></text:p>
      <text:list text:style-name="L27">
        <text:list-item>
          <text:p text:style-name="P64">Altering data in transit (man-in-the-middle)</text:p>
        </text:list-item>
        <text:list-item>
          <text:p text:style-name="P64">Modifying database records</text:p>
        </text:list-item>
        <text:list-item>
          <text:p text:style-name="P64">Changing configuration files</text:p>
        </text:list-item>
        <text:list-item>
          <text:p text:style-name="P64">SQL injection attacks</text:p>
        </text:list-item>
        <text:list-item>
          <text:p text:style-name="P64">Modifying application binaries</text:p>
        </text:list-item>
      </text:list>
      <text:p text:style-name="P33"><text:span text:style-name="Strong_20_Emphasis"><text:span text:style-name="T3">Mitigation Strategies</text:span></text:span><text:span text:style-name="T4">:</text:span></text:p>
      <text:list text:style-name="L28">
        <text:list-item>
          <text:p text:style-name="P65">Use encryption (TLS/SSL)</text:p>
        </text:list-item>
        <text:list-item>
          <text:p text:style-name="P65">Implement digital signatures</text:p>
        </text:list-item>
        <text:list-item>
          <text:p text:style-name="P65">Use hash functions for integrity checks</text:p>
        </text:list-item>
        <text:list-item>
          <text:p text:style-name="P65"><text:soft-page-break/>Input validation and sanitization</text:p>
        </text:list-item>
        <text:list-item>
          <text:p text:style-name="P65">Implement audit logging</text:p>
        </text:list-item>
        <text:list-item>
          <text:p text:style-name="P65">Use database constraints and triggers</text:p>
        </text:list-item>
      </text:list>
      <text:p text:style-name="P33"><text:span text:style-name="Strong_20_Emphasis"><text:span text:style-name="T3">Real-World Example</text:span></text:span><text:span text:style-name="T4">:</text:span></text:p>
      <text:p text:style-name="P49">An attacker intercepts an online banking transaction and changes the recipient account number before it reaches the bank’s server.</text:p>
      <text:h text:style-name="P6" text:outline-level="4">R - Repudiation</text:h>
      <text:p text:style-name="P33"><text:span text:style-name="Strong_20_Emphasis"><text:span text:style-name="T3">Definition</text:span></text:span><text:span text:style-name="T4">:</text:span></text:p>
      <text:p text:style-name="P49">Denying that you performed an action without any way to prove otherwise.</text:p>
      <text:p text:style-name="P33"><text:span text:style-name="Strong_20_Emphasis"><text:span text:style-name="T3">Examples</text:span></text:span><text:span text:style-name="T4">:</text:span></text:p>
      <text:list text:style-name="L29">
        <text:list-item>
          <text:p text:style-name="P66">User denies making a purchase</text:p>
        </text:list-item>
        <text:list-item>
          <text:p text:style-name="P66">Deleting or tampering with log files</text:p>
        </text:list-item>
        <text:list-item>
          <text:p text:style-name="P66">Claiming “I never received that email”</text:p>
        </text:list-item>
        <text:list-item>
          <text:p text:style-name="P66">Denying administrative actions</text:p>
        </text:list-item>
      </text:list>
      <text:p text:style-name="P33"><text:span text:style-name="Strong_20_Emphasis"><text:span text:style-name="T3">Mitigation Strategies</text:span></text:span><text:span text:style-name="T4">:</text:span></text:p>
      <text:list text:style-name="L30">
        <text:list-item>
          <text:p text:style-name="P67">Implement comprehensive logging and auditing</text:p>
        </text:list-item>
        <text:list-item>
          <text:p text:style-name="P67">Use digital signatures for non-repudiation</text:p>
        </text:list-item>
        <text:list-item>
          <text:p text:style-name="P67">Implement secure time-stamping</text:p>
        </text:list-item>
        <text:list-item>
          <text:p text:style-name="P67">Store logs in tamper-proof locations</text:p>
        </text:list-item>
        <text:list-item>
          <text:p text:style-name="P67">Use blockchain for critical audit trails</text:p>
        </text:list-item>
        <text:list-item>
          <text:p text:style-name="P67">Implement log aggregation and backup</text:p>
        </text:list-item>
      </text:list>
      <text:p text:style-name="P33"><text:span text:style-name="Strong_20_Emphasis"><text:span text:style-name="T3">Real-World Example</text:span></text:span><text:span text:style-name="T4">:</text:span></text:p>
      <text:p text:style-name="P49">An employee deletes important files and claims they never had access to them, but there are no logs to prove what happened.</text:p>
      <text:h text:style-name="P6" text:outline-level="4">I - Information Disclosure</text:h>
      <text:p text:style-name="P33"><text:span text:style-name="Strong_20_Emphasis"><text:span text:style-name="T3">Definition</text:span></text:span><text:span text:style-name="T4">:</text:span></text:p>
      <text:p text:style-name="P49">Exposing information to unauthorized individuals.</text:p>
      <text:p text:style-name="P33"><text:span text:style-name="Strong_20_Emphasis"><text:span text:style-name="T3">Examples</text:span></text:span><text:span text:style-name="T4">:</text:span></text:p>
      <text:list text:style-name="L31">
        <text:list-item>
          <text:p text:style-name="P68">Exposing database contents</text:p>
        </text:list-item>
        <text:list-item>
          <text:p text:style-name="P68">Leaking sensitive data in error messages</text:p>
        </text:list-item>
        <text:list-item>
          <text:p text:style-name="P68"><text:soft-page-break/>Directory traversal attacks</text:p>
        </text:list-item>
        <text:list-item>
          <text:p text:style-name="P68">Unsecured API endpoints</text:p>
        </text:list-item>
        <text:list-item>
          <text:p text:style-name="P68">Exposed configuration files</text:p>
        </text:list-item>
        <text:list-item>
          <text:p text:style-name="P68">Memory dumps containing sensitive data</text:p>
        </text:list-item>
      </text:list>
      <text:p text:style-name="P33"><text:span text:style-name="Strong_20_Emphasis"><text:span text:style-name="T3">Mitigation Strategies</text:span></text:span><text:span text:style-name="T4">:</text:span></text:p>
      <text:list text:style-name="L32">
        <text:list-item>
          <text:p text:style-name="P69">Encrypt sensitive data (at rest and in transit)</text:p>
        </text:list-item>
        <text:list-item>
          <text:p text:style-name="P69">Implement proper access controls</text:p>
        </text:list-item>
        <text:list-item>
          <text:p text:style-name="P69">Sanitize error messages</text:p>
        </text:list-item>
        <text:list-item>
          <text:p text:style-name="P69">Use secure coding practices</text:p>
        </text:list-item>
        <text:list-item>
          <text:p text:style-name="P69">Implement data classification</text:p>
        </text:list-item>
        <text:list-item>
          <text:p text:style-name="P69">Regular security audits and penetration testing</text:p>
        </text:list-item>
      </text:list>
      <text:p text:style-name="P33"><text:span text:style-name="Strong_20_Emphasis"><text:span text:style-name="T3">Real-World Example</text:span></text:span><text:span text:style-name="T4">:</text:span></text:p>
      <text:p text:style-name="P49">A web application displays detailed error messages that reveal database schema information, helping attackers craft SQL injection attacks.</text:p>
      <text:h text:style-name="P6" text:outline-level="4">D - Denial of Service</text:h>
      <text:p text:style-name="P33"><text:span text:style-name="Strong_20_Emphasis"><text:span text:style-name="T3">Definition</text:span></text:span><text:span text:style-name="T4">:</text:span></text:p>
      <text:p text:style-name="P49">Making a system or application unavailable to legitimate users.</text:p>
      <text:p text:style-name="P33"><text:span text:style-name="Strong_20_Emphasis"><text:span text:style-name="T3">Examples</text:span></text:span><text:span text:style-name="T4">:</text:span></text:p>
      <text:list text:style-name="L33">
        <text:list-item>
          <text:p text:style-name="P70">DDoS attacks flooding network with traffic</text:p>
        </text:list-item>
        <text:list-item>
          <text:p text:style-name="P70">Resource exhaustion attacks</text:p>
        </text:list-item>
        <text:list-item>
          <text:p text:style-name="P70">Application-layer attacks (Slowloris)</text:p>
        </text:list-item>
        <text:list-item>
          <text:p text:style-name="P70">Ransomware locking systems</text:p>
        </text:list-item>
        <text:list-item>
          <text:p text:style-name="P70">Database connection pool exhaustion</text:p>
        </text:list-item>
      </text:list>
      <text:p text:style-name="P33"><text:span text:style-name="Strong_20_Emphasis"><text:span text:style-name="T3">Mitigation Strategies</text:span></text:span><text:span text:style-name="T4">:</text:span></text:p>
      <text:list text:style-name="L34">
        <text:list-item>
          <text:p text:style-name="P71">Implement rate limiting</text:p>
        </text:list-item>
        <text:list-item>
          <text:p text:style-name="P71">Use DDoS protection services (Cloudflare, AWS Shield)</text:p>
        </text:list-item>
        <text:list-item>
          <text:p text:style-name="P71">Implement proper resource management</text:p>
        </text:list-item>
        <text:list-item>
          <text:p text:style-name="P71">Use auto-scaling</text:p>
        </text:list-item>
        <text:list-item>
          <text:p text:style-name="P71">Implement circuit breakers</text:p>
        </text:list-item>
        <text:list-item>
          <text:p text:style-name="P71">Set up monitoring and alerting</text:p>
        </text:list-item>
        <text:list-item>
          <text:p text:style-name="P71"><text:soft-page-break/>Create incident response plans</text:p>
        </text:list-item>
      </text:list>
      <text:p text:style-name="P33"><text:span text:style-name="Strong_20_Emphasis"><text:span text:style-name="T3">Real-World Example</text:span></text:span><text:span text:style-name="T4">:</text:span></text:p>
      <text:p text:style-name="P49">An attacker floods an e-commerce website with requests during Black Friday, making it unavailable to legitimate customers and causing revenue loss.</text:p>
      <text:h text:style-name="P6" text:outline-level="4">E - Elevation of Privilege</text:h>
      <text:p text:style-name="P33"><text:span text:style-name="Strong_20_Emphasis"><text:span text:style-name="T3">Definition</text:span></text:span><text:span text:style-name="T4">: Gaining higher-level permissions than authorized.</text:span></text:p>
      <text:p text:style-name="P33"><text:span text:style-name="Strong_20_Emphasis"><text:span text:style-name="T3">Examples</text:span></text:span><text:span text:style-name="T4">:</text:span></text:p>
      <text:list text:style-name="L35">
        <text:list-item>
          <text:p text:style-name="P72">Exploiting buffer overflows to gain admin access</text:p>
        </text:list-item>
        <text:list-item>
          <text:p text:style-name="P72">SQL injection to bypass authentication</text:p>
        </text:list-item>
        <text:list-item>
          <text:p text:style-name="P72">Privilege escalation through misconfigurations</text:p>
        </text:list-item>
        <text:list-item>
          <text:p text:style-name="P72">Exploiting vulnerable sudo configurations</text:p>
        </text:list-item>
        <text:list-item>
          <text:p text:style-name="P72">Container escape attacks</text:p>
        </text:list-item>
      </text:list>
      <text:p text:style-name="P33"><text:span text:style-name="Strong_20_Emphasis"><text:span text:style-name="T3">Mitigation Strategies</text:span></text:span><text:span text:style-name="T4">:</text:span></text:p>
      <text:list text:style-name="L36">
        <text:list-item>
          <text:p text:style-name="P73">Implement principle of least privilege</text:p>
        </text:list-item>
        <text:list-item>
          <text:p text:style-name="P73">Regular security patching</text:p>
        </text:list-item>
        <text:list-item>
          <text:p text:style-name="P73">Use role-based access control (RBAC)</text:p>
        </text:list-item>
        <text:list-item>
          <text:p text:style-name="P73">Input validation</text:p>
        </text:list-item>
        <text:list-item>
          <text:p text:style-name="P73">Secure coding practices</text:p>
        </text:list-item>
        <text:list-item>
          <text:p text:style-name="P73">Regular security assessments</text:p>
        </text:list-item>
        <text:list-item>
          <text:p text:style-name="P73">Implement proper permission boundaries</text:p>
        </text:list-item>
      </text:list>
      <text:p text:style-name="P33"><text:span text:style-name="Strong_20_Emphasis"><text:span text:style-name="T3">Real-World Example</text:span></text:span><text:span text:style-name="T4">:</text:span></text:p>
      <text:p text:style-name="P49">A regular user exploits a vulnerability in a web application to gain admin privileges and access sensitive customer data.</text:p>
      <text:h text:style-name="P4" text:outline-level="3"><text:soft-page-break/></text:h>
      <text:h text:style-name="P4" text:outline-level="3"/>
      <text:h text:style-name="P4" text:outline-level="3">STRIDE Mapping Table<text:span text:style-name="T63"/></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Component</text:p>
          </table:table-cell>
          <table:table-cell table:style-name="Table3.A1" office:value-type="string">
            <text:p text:style-name="P32">Spoofing</text:p>
          </table:table-cell>
          <table:table-cell table:style-name="Table3.A1" office:value-type="string">
            <text:p text:style-name="P32">Tampering</text:p>
          </table:table-cell>
          <table:table-cell table:style-name="Table3.A1" office:value-type="string">
            <text:p text:style-name="P32">Repudiation</text:p>
          </table:table-cell>
          <table:table-cell table:style-name="Table3.A1" office:value-type="string">
            <text:p text:style-name="P32">Info Disclosure</text:p>
          </table:table-cell>
          <table:table-cell table:style-name="Table3.A1" office:value-type="string">
            <text:p text:style-name="P32">DoS</text:p>
          </table:table-cell>
          <table:table-cell table:style-name="Table3.A1" office:value-type="string">
            <text:p text:style-name="P32">Elevation</text:p>
          </table:table-cell>
        </table:table-row>
        <table:table-row>
          <table:table-cell table:style-name="Table3.A1" office:value-type="string">
            <text:p text:style-name="P28">External Entity</text:p>
          </table:table-cell>
          <table:table-cell table:style-name="Table3.A1" office:value-type="string">
            <text:p text:style-name="P28">✓</text:p>
          </table:table-cell>
          <table:table-cell table:style-name="Table3.A1" office:value-type="string">
            <text:p text:style-name="P30"/>
          </table:table-cell>
          <table:table-cell table:style-name="Table3.A1" office:value-type="string">
            <text:p text:style-name="P28">✓</text:p>
          </table:table-cell>
          <table:table-cell table:style-name="Table3.A1" office:value-type="string">
            <text:p text:style-name="P30"/>
          </table:table-cell>
          <table:table-cell table:style-name="Table3.A1" office:value-type="string">
            <text:p text:style-name="P30"/>
          </table:table-cell>
          <table:table-cell table:style-name="Table3.A1" office:value-type="string">
            <text:p text:style-name="P30"/>
          </table:table-cell>
        </table:table-row>
        <table:table-row>
          <table:table-cell table:style-name="Table3.A1" office:value-type="string">
            <text:p text:style-name="P28">Process</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row>
        <table:table-row>
          <table:table-cell table:style-name="Table3.A1" office:value-type="string">
            <text:p text:style-name="P28">Data Store</text:p>
          </table:table-cell>
          <table:table-cell table:style-name="Table3.A1" office:value-type="string">
            <text:p text:style-name="P30"/>
          </table:table-cell>
          <table:table-cell table:style-name="Table3.A1" office:value-type="string">
            <text:p text:style-name="P28">✓</text:p>
          </table:table-cell>
          <table:table-cell table:style-name="Table3.A1" office:value-type="string">
            <text:p text:style-name="P30"/>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0"/>
          </table:table-cell>
        </table:table-row>
        <table:table-row>
          <table:table-cell table:style-name="Table3.A1" office:value-type="string">
            <text:p text:style-name="P28">Data Flow</text:p>
          </table:table-cell>
          <table:table-cell table:style-name="Table3.A1" office:value-type="string">
            <text:p text:style-name="P30"/>
          </table:table-cell>
          <table:table-cell table:style-name="Table3.A1" office:value-type="string">
            <text:p text:style-name="P28">✓</text:p>
          </table:table-cell>
          <table:table-cell table:style-name="Table3.A1" office:value-type="string">
            <text:p text:style-name="P30"/>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1"/>
          </table:table-cell>
        </table:table-row>
      </table:table>
      <text:h text:style-name="P5" text:outline-level="3">DREAD Rating System</text:h>
      <text:p text:style-name="P49">DREAD is a quantitative risk assessment model that rates threats based on five factors. Each factor is scored from 1-10.</text:p>
      <text:p text:style-name="P89"><draw:frame draw:style-name="fr1" draw:name="Image7" text:anchor-type="char" svg:width="5.1835in" svg:height="3.2437in" draw:z-index="7"><draw:image xlink:href="Pictures/10000001000002B7000001B3446BA6E5.png" xlink:type="simple" xlink:show="embed" xlink:actuate="onLoad" draw:mime-type="image/png"/></draw:frame></text:p>
      <text:h text:style-name="P6" text:outline-level="4"><text:soft-page-break/></text:h>
      <text:h text:style-name="P6" text:outline-level="4">D - Damage Potential</text:h>
      <text:p text:style-name="P33"><text:span text:style-name="Strong_20_Emphasis"><text:span text:style-name="T3">Question</text:span></text:span><text:span text:style-name="T4">: How much damage will be caused if the vulnerability is exploited?</text:span></text:p>
      <text:p text:style-name="P33"><text:span text:style-name="Strong_20_Emphasis"><text:span text:style-name="T3">Rating Scale</text:span></text:span><text:span text:style-name="T4">:</text:span></text:p>
      <text:list text:style-name="L37">
        <text:list-item>
          <text:p text:style-name="P36"><text:span text:style-name="Strong_20_Emphasis"><text:span text:style-name="T3">10</text:span></text:span><text:span text:style-name="T4">: Complete system compromise, data loss, or financial ruin</text:span></text:p>
        </text:list-item>
        <text:list-item>
          <text:p text:style-name="P36"><text:span text:style-name="Strong_20_Emphasis"><text:span text:style-name="T3">7-9</text:span></text:span><text:span text:style-name="T4">: Significant data breach or major functionality loss</text:span></text:p>
        </text:list-item>
        <text:list-item>
          <text:p text:style-name="P36"><text:span text:style-name="Strong_20_Emphasis"><text:span text:style-name="T3">4-6</text:span></text:span><text:span text:style-name="T4">: Limited data exposure or moderate impact</text:span></text:p>
        </text:list-item>
        <text:list-item>
          <text:p text:style-name="P36"><text:span text:style-name="Strong_20_Emphasis"><text:span text:style-name="T3">1-3</text:span></text:span><text:span text:style-name="T4">: Minimal impact on system or data</text:span></text:p>
        </text:list-item>
      </text:list>
      <text:p text:style-name="P33"><text:span text:style-name="Strong_20_Emphasis"><text:span text:style-name="T3">Example</text:span></text:span><text:span text:style-name="T4">:</text:span></text:p>
      <text:list text:style-name="L38">
        <text:list-item>
          <text:p text:style-name="P37"><text:span text:style-name="T4">SQL injection exposing all customer records: </text:span><text:span text:style-name="Strong_20_Emphasis"><text:span text:style-name="T3">10</text:span></text:span></text:p>
        </text:list-item>
        <text:list-item>
          <text:p text:style-name="P37"><text:span text:style-name="T4">XSS attack on a single page: </text:span><text:span text:style-name="Strong_20_Emphasis"><text:span text:style-name="T3">4</text:span></text:span></text:p>
        </text:list-item>
      </text:list>
      <text:h text:style-name="P6" text:outline-level="4">R - Reproducibility</text:h>
      <text:p text:style-name="P33"><text:span text:style-name="Strong_20_Emphasis"><text:span text:style-name="T3">Question</text:span></text:span><text:span text:style-name="T4">: How easy is it to reproduce the attack?</text:span></text:p>
      <text:p text:style-name="P33"><text:span text:style-name="Strong_20_Emphasis"><text:span text:style-name="T3">Rating Scale</text:span></text:span><text:span text:style-name="T4">:</text:span></text:p>
      <text:list text:style-name="L39">
        <text:list-item>
          <text:p text:style-name="P38"><text:span text:style-name="Strong_20_Emphasis"><text:span text:style-name="T3">10</text:span></text:span><text:span text:style-name="T4">: Attack works every time, no special conditions needed</text:span></text:p>
        </text:list-item>
        <text:list-item>
          <text:p text:style-name="P38"><text:span text:style-name="Strong_20_Emphasis"><text:span text:style-name="T3">7-9</text:span></text:span><text:span text:style-name="T4">: Attack works most of the time with minimal effort</text:span></text:p>
        </text:list-item>
        <text:list-item>
          <text:p text:style-name="P38"><text:span text:style-name="Strong_20_Emphasis"><text:span text:style-name="T3">4-6</text:span></text:span><text:span text:style-name="T4">: Attack requires specific conditions or timing</text:span></text:p>
        </text:list-item>
        <text:list-item>
          <text:p text:style-name="P38"><text:span text:style-name="Strong_20_Emphasis"><text:span text:style-name="T3">1-3</text:span></text:span><text:span text:style-name="T4">: Very difficult to reproduce, requires rare circumstances</text:span></text:p>
        </text:list-item>
      </text:list>
      <text:p text:style-name="P33"><text:span text:style-name="Strong_20_Emphasis"><text:span text:style-name="T3">Example</text:span></text:span><text:span text:style-name="T4">:</text:span></text:p>
      <text:list text:style-name="L40">
        <text:list-item>
          <text:p text:style-name="P39"><text:span text:style-name="T4">Missing authentication on API endpoint: </text:span><text:span text:style-name="Strong_20_Emphasis"><text:span text:style-name="T3">10</text:span></text:span></text:p>
        </text:list-item>
        <text:list-item>
          <text:p text:style-name="P39"><text:span text:style-name="T4">Race condition that occurs occasionally: </text:span><text:span text:style-name="Strong_20_Emphasis"><text:span text:style-name="T3">3</text:span></text:span></text:p>
        </text:list-item>
      </text:list>
      <text:h text:style-name="P6" text:outline-level="4">E - Exploitability</text:h>
      <text:p text:style-name="P33"><text:span text:style-name="Strong_20_Emphasis"><text:span text:style-name="T3">Question</text:span></text:span><text:span text:style-name="T4">: How easy is it to launch the attack?</text:span></text:p>
      <text:p text:style-name="P33"><text:span text:style-name="Strong_20_Emphasis"><text:span text:style-name="T3">Rating Scale</text:span></text:span><text:span text:style-name="T4">:</text:span></text:p>
      <text:list text:style-name="L41">
        <text:list-item>
          <text:p text:style-name="P40"><text:span text:style-name="Strong_20_Emphasis"><text:span text:style-name="T3">10</text:span></text:span><text:span text:style-name="T4">: Requires only a web browser, no special tools</text:span></text:p>
        </text:list-item>
        <text:list-item>
          <text:p text:style-name="P40"><text:span text:style-name="Strong_20_Emphasis"><text:span text:style-name="T3">7-9</text:span></text:span><text:span text:style-name="T4">: Requires basic hacking tools (Burp Suite, SQLmap)</text:span></text:p>
        </text:list-item>
        <text:list-item>
          <text:p text:style-name="P40"><text:span text:style-name="Strong_20_Emphasis"><text:span text:style-name="T3">4-6</text:span></text:span><text:span text:style-name="T4">: Requires advanced tools and moderate skill</text:span></text:p>
        </text:list-item>
        <text:list-item>
          <text:p text:style-name="P40"><text:span text:style-name="Strong_20_Emphasis"><text:span text:style-name="T3">1-3</text:span></text:span><text:span text:style-name="T4">: Requires custom tools and expert-level skills</text:span></text:p>
        </text:list-item>
      </text:list>
      <text:p text:style-name="P33"><text:span text:style-name="Strong_20_Emphasis"><text:span text:style-name="T3">Example</text:span></text:span><text:span text:style-name="T4">:</text:span></text:p>
      <text:list text:style-name="L42">
        <text:list-item>
          <text:p text:style-name="P41"><text:soft-page-break/><text:span text:style-name="T4">Clicking a malicious link: </text:span><text:span text:style-name="Strong_20_Emphasis"><text:span text:style-name="T3">10</text:span></text:span></text:p>
        </text:list-item>
        <text:list-item>
          <text:p text:style-name="P41"><text:span text:style-name="T4">Exploiting a zero-day vulnerability: </text:span><text:span text:style-name="Strong_20_Emphasis"><text:span text:style-name="T3">2</text:span></text:span></text:p>
        </text:list-item>
      </text:list>
      <text:h text:style-name="P6" text:outline-level="4">A - Affected Users</text:h>
      <text:p text:style-name="P33"><text:span text:style-name="Strong_20_Emphasis"><text:span text:style-name="T3">Question</text:span></text:span><text:span text:style-name="T4">: How many users will be affected?</text:span></text:p>
      <text:p text:style-name="P33"><text:span text:style-name="Strong_20_Emphasis"><text:span text:style-name="T3">Rating Scale</text:span></text:span><text:span text:style-name="T4">:</text:span></text:p>
      <text:list text:style-name="L43">
        <text:list-item>
          <text:p text:style-name="P42"><text:span text:style-name="Strong_20_Emphasis"><text:span text:style-name="T3">10</text:span></text:span><text:span text:style-name="T4">: All users affected</text:span></text:p>
        </text:list-item>
        <text:list-item>
          <text:p text:style-name="P42"><text:span text:style-name="Strong_20_Emphasis"><text:span text:style-name="T3">7-9</text:span></text:span><text:span text:style-name="T4">: Majority of users affected</text:span></text:p>
        </text:list-item>
        <text:list-item>
          <text:p text:style-name="P42"><text:span text:style-name="Strong_20_Emphasis"><text:span text:style-name="T3">4-6</text:span></text:span><text:span text:style-name="T4">: Significant number of users affected</text:span></text:p>
        </text:list-item>
        <text:list-item>
          <text:p text:style-name="P42"><text:span text:style-name="Strong_20_Emphasis"><text:span text:style-name="T3">1-3</text:span></text:span><text:span text:style-name="T4">: Very few users affected</text:span></text:p>
        </text:list-item>
      </text:list>
      <text:p text:style-name="P33"><text:span text:style-name="Strong_20_Emphasis"><text:span text:style-name="T3">Example</text:span></text:span><text:span text:style-name="T4">:</text:span></text:p>
      <text:list text:style-name="L44">
        <text:list-item>
          <text:p text:style-name="P43"><text:span text:style-name="T4">Authentication bypass affecting all users: </text:span><text:span text:style-name="Strong_20_Emphasis"><text:span text:style-name="T3">10</text:span></text:span></text:p>
        </text:list-item>
        <text:list-item>
          <text:p text:style-name="P43"><text:span text:style-name="T4">Vulnerability in rarely-used admin feature: </text:span><text:span text:style-name="Strong_20_Emphasis"><text:span text:style-name="T3">2</text:span></text:span></text:p>
        </text:list-item>
      </text:list>
      <text:h text:style-name="P6" text:outline-level="4">D - Discoverability</text:h>
      <text:p text:style-name="P33"><text:span text:style-name="Strong_20_Emphasis"><text:span text:style-name="T3">Question</text:span></text:span><text:span text:style-name="T4">: How easy is it to discover the vulnerability?</text:span></text:p>
      <text:p text:style-name="P33"><text:span text:style-name="Strong_20_Emphasis"><text:span text:style-name="T3">Rating Scale</text:span></text:span><text:span text:style-name="T4">:</text:span></text:p>
      <text:list text:style-name="L45">
        <text:list-item>
          <text:p text:style-name="P44"><text:span text:style-name="Strong_20_Emphasis"><text:span text:style-name="T3">10</text:span></text:span><text:span text:style-name="T4">: Vulnerability is obvious, visible in the browser</text:span></text:p>
        </text:list-item>
        <text:list-item>
          <text:p text:style-name="P44"><text:span text:style-name="Strong_20_Emphasis"><text:span text:style-name="T3">7-9</text:span></text:span><text:span text:style-name="T4">: Can be found with automated scanning tools</text:span></text:p>
        </text:list-item>
        <text:list-item>
          <text:p text:style-name="P44"><text:span text:style-name="Strong_20_Emphasis"><text:span text:style-name="T3">4-6</text:span></text:span><text:span text:style-name="T4">: Requires some investigation and analysis</text:span></text:p>
        </text:list-item>
        <text:list-item>
          <text:p text:style-name="P44"><text:span text:style-name="Strong_20_Emphasis"><text:span text:style-name="T3">1-3</text:span></text:span><text:span text:style-name="T4">: Requires source code analysis or insider knowledge</text:span></text:p>
        </text:list-item>
      </text:list>
      <text:p text:style-name="P33"><text:span text:style-name="Strong_20_Emphasis"><text:span text:style-name="T3">Example</text:span></text:span><text:span text:style-name="T4">:</text:span></text:p>
      <text:list text:style-name="L46">
        <text:list-item>
          <text:p text:style-name="P45"><text:span text:style-name="T4">Exposed API keys in JavaScript: </text:span><text:span text:style-name="Strong_20_Emphasis"><text:span text:style-name="T3">10</text:span></text:span></text:p>
        </text:list-item>
        <text:list-item>
          <text:p text:style-name="P45"><text:span text:style-name="T4">Logic flaw in complex business process: </text:span><text:span text:style-name="Strong_20_Emphasis"><text:span text:style-name="T3">3</text:span></text:span></text:p>
        </text:list-item>
      </text:list>
      <text:h text:style-name="P6" text:outline-level="4">DREAD Calculation Example</text:h>
      <text:p text:style-name="P33"><text:span text:style-name="Strong_20_Emphasis"><text:span text:style-name="T3">Vulnerability</text:span></text:span><text:span text:style-name="T4">: Unencrypted password transmission</text:span></text:p>
      <table:table table:name="Table4" table:style-name="Table4">
        <table:table-column table:style-name="Table4.A"/>
        <table:table-column table:style-name="Table4.B"/>
        <table:table-column table:style-name="Table4.C"/>
        <table:table-row>
          <table:table-cell table:style-name="Table4.A1" office:value-type="string">
            <text:p text:style-name="P32">Factor</text:p>
          </table:table-cell>
          <table:table-cell table:style-name="Table4.A1" office:value-type="string">
            <text:p text:style-name="P32">Score</text:p>
          </table:table-cell>
          <table:table-cell table:style-name="Table4.A1" office:value-type="string">
            <text:p text:style-name="P32">Justification</text:p>
          </table:table-cell>
        </table:table-row>
        <table:table-row>
          <table:table-cell table:style-name="Table4.A1" office:value-type="string">
            <text:p text:style-name="P28">Damage</text:p>
          </table:table-cell>
          <table:table-cell table:style-name="Table4.A1" office:value-type="string">
            <text:p text:style-name="P28">9</text:p>
          </table:table-cell>
          <table:table-cell table:style-name="Table4.A1" office:value-type="string">
            <text:p text:style-name="P28">Could compromise user accounts</text:p>
          </table:table-cell>
        </table:table-row>
        <table:table-row>
          <table:table-cell table:style-name="Table4.A1" office:value-type="string">
            <text:p text:style-name="P28">Reproducibility</text:p>
          </table:table-cell>
          <table:table-cell table:style-name="Table4.A1" office:value-type="string">
            <text:p text:style-name="P28">10</text:p>
          </table:table-cell>
          <table:table-cell table:style-name="Table4.A1" office:value-type="string">
            <text:p text:style-name="P28">Happens on every login</text:p>
          </table:table-cell>
        </table:table-row>
        <table:table-row>
          <table:table-cell table:style-name="Table4.A1" office:value-type="string">
            <text:p text:style-name="P28">Exploitability</text:p>
          </table:table-cell>
          <table:table-cell table:style-name="Table4.A1" office:value-type="string">
            <text:p text:style-name="P28">8</text:p>
          </table:table-cell>
          <table:table-cell table:style-name="Table4.A1" office:value-type="string">
            <text:p text:style-name="P28">Easy with network sniffing tools</text:p>
          </table:table-cell>
        </table:table-row>
        <text:soft-page-break/>
        <table:table-row>
          <table:table-cell table:style-name="Table4.A1" office:value-type="string">
            <text:p text:style-name="P28">Affected Users</text:p>
          </table:table-cell>
          <table:table-cell table:style-name="Table4.A1" office:value-type="string">
            <text:p text:style-name="P28">10</text:p>
          </table:table-cell>
          <table:table-cell table:style-name="Table4.A1" office:value-type="string">
            <text:p text:style-name="P28">All users affected</text:p>
          </table:table-cell>
        </table:table-row>
        <table:table-row>
          <table:table-cell table:style-name="Table4.A1" office:value-type="string">
            <text:p text:style-name="P28">Discoverability</text:p>
          </table:table-cell>
          <table:table-cell table:style-name="Table4.A1" office:value-type="string">
            <text:p text:style-name="P28">9</text:p>
          </table:table-cell>
          <table:table-cell table:style-name="Table4.A1" office:value-type="string">
            <text:p text:style-name="P28">Visible in network traffic</text:p>
          </table:table-cell>
        </table:table-row>
        <table:table-row>
          <table:table-cell table:style-name="Table4.A1" office:value-type="string">
            <text:p text:style-name="P27"><text:span text:style-name="Strong_20_Emphasis"><text:span text:style-name="T64">TOTAL</text:span></text:span></text:p>
          </table:table-cell>
          <table:table-cell table:style-name="Table4.A1" office:value-type="string">
            <text:p text:style-name="P27"><text:span text:style-name="Strong_20_Emphasis"><text:span text:style-name="T64">46</text:span></text:span></text:p>
          </table:table-cell>
          <table:table-cell table:style-name="Table4.A1" office:value-type="string">
            <text:p text:style-name="P30"/>
          </table:table-cell>
        </table:table-row>
        <table:table-row>
          <table:table-cell table:style-name="Table4.A1" office:value-type="string">
            <text:p text:style-name="P27"><text:span text:style-name="Strong_20_Emphasis"><text:span text:style-name="T64">RISK LEVEL</text:span></text:span></text:p>
          </table:table-cell>
          <table:table-cell table:style-name="Table4.A1" office:value-type="string">
            <text:p text:style-name="P27"><text:span text:style-name="Strong_20_Emphasis"><text:span text:style-name="T64">9.2/10</text:span></text:span></text:p>
          </table:table-cell>
          <table:table-cell table:style-name="Table4.A1" office:value-type="string">
            <text:p text:style-name="P27"><text:span text:style-name="Strong_20_Emphasis"><text:span text:style-name="T64">CRITICAL</text:span></text:span></text:p>
          </table:table-cell>
        </table:table-row>
      </table:table>
      <text:p text:style-name="P33"><text:span text:style-name="Strong_20_Emphasis"><text:span text:style-name="T3">Risk Level Interpretation</text:span></text:span><text:span text:style-name="T4">:</text:span></text:p>
      <text:list text:style-name="L47">
        <text:list-item>
          <text:p text:style-name="P46"><text:span text:style-name="Strong_20_Emphasis"><text:span text:style-name="T3">8.0-10.0</text:span></text:span><text:span text:style-name="T4">: Critical (Fix immediately)</text:span></text:p>
        </text:list-item>
        <text:list-item>
          <text:p text:style-name="P46"><text:span text:style-name="Strong_20_Emphasis"><text:span text:style-name="T3">6.0-7.9</text:span></text:span><text:span text:style-name="T4">: High (Fix within days)</text:span></text:p>
        </text:list-item>
        <text:list-item>
          <text:p text:style-name="P46"><text:span text:style-name="Strong_20_Emphasis"><text:span text:style-name="T3">4.0-5.9</text:span></text:span><text:span text:style-name="T4">: Medium (Fix within weeks)</text:span></text:p>
        </text:list-item>
        <text:list-item>
          <text:p text:style-name="P46"><text:span text:style-name="Strong_20_Emphasis"><text:span text:style-name="T3">2.0-3.9</text:span></text:span><text:span text:style-name="T4">: Low (Fix when possible)</text:span></text:p>
        </text:list-item>
        <text:list-item>
          <text:p text:style-name="P46"><text:span text:style-name="Strong_20_Emphasis"><text:span text:style-name="T3">0.0-1.9</text:span></text:span><text:span text:style-name="T4">: Informational (Consider fixing)</text:span></text:p>
        </text:list-item>
      </text:list>
      <text:h text:style-name="P4" text:outline-level="3">PASTA Process</text:h>
      <text:p text:style-name="P49">PASTA (Process for Attack Simulation and Threat Analysis) is a risk-centric, seven-stage threat modeling methodology.</text:p>
      <text:p text:style-name="P89"><draw:frame draw:style-name="fr1" draw:name="Image8" text:anchor-type="char" svg:width="4.5583in" svg:height="4.2217in" draw:z-index="8"><draw:image xlink:href="Pictures/100000010000027C0000024DBABD7250.png" xlink:type="simple" xlink:show="embed" xlink:actuate="onLoad" draw:mime-type="image/png"/></draw:frame></text:p>
      <text:h text:style-name="P6" text:outline-level="4"/>
      <text:h text:style-name="P6" text:outline-level="4"/>
      <text:h text:style-name="P6" text:outline-level="4"/>
      <text:h text:style-name="P6" text:outline-level="4"/>
      <text:h text:style-name="P6" text:outline-level="4"/>
      <text:h text:style-name="P6" text:outline-level="4"/>
      <text:h text:style-name="P6" text:outline-level="4"/>
      <text:h text:style-name="P6" text:outline-level="4"/>
      <text:h text:style-name="P6" text:outline-level="4">Stage 1: Define Objectives</text:h>
      <text:p text:style-name="P49">Define business objectives and security requirements.</text:p>
      <text:p text:style-name="P33"><text:soft-page-break/><text:span text:style-name="Strong_20_Emphasis"><text:span text:style-name="T3">Activities</text:span></text:span><text:span text:style-name="T4">:</text:span></text:p>
      <text:list text:style-name="L48">
        <text:list-item>
          <text:p text:style-name="P74">Identify business goals</text:p>
        </text:list-item>
        <text:list-item>
          <text:p text:style-name="P74">Define security and compliance requirements</text:p>
        </text:list-item>
        <text:list-item>
          <text:p text:style-name="P74">Determine impact tolerance</text:p>
        </text:list-item>
        <text:list-item>
          <text:p text:style-name="P74">Establish success criteria</text:p>
        </text:list-item>
      </text:list>
      <text:p text:style-name="P33"><text:span text:style-name="Strong_20_Emphasis"><text:span text:style-name="T3">Output</text:span></text:span><text:span text:style-name="T4">: Security objectives document</text:span></text:p>
      <text:h text:style-name="P6" text:outline-level="4">Stage 2: Define Technical Scope</text:h>
      <text:p text:style-name="P49">Define the technical scope of the analysis.</text:p>
      <text:p text:style-name="P33"><text:span text:style-name="Strong_20_Emphasis"><text:span text:style-name="T3">Activities</text:span></text:span><text:span text:style-name="T4">:</text:span></text:p>
      <text:list text:style-name="L49">
        <text:list-item>
          <text:p text:style-name="P75">Inventory hardware and software</text:p>
        </text:list-item>
        <text:list-item>
          <text:p text:style-name="P75">Document network architecture</text:p>
        </text:list-item>
        <text:list-item>
          <text:p text:style-name="P75">Identify dependencies and integrations</text:p>
        </text:list-item>
        <text:list-item>
          <text:p text:style-name="P75">Define boundaries</text:p>
        </text:list-item>
      </text:list>
      <text:p text:style-name="P33"><text:span text:style-name="Strong_20_Emphasis"><text:span text:style-name="T3">Output</text:span></text:span><text:span text:style-name="T4">: Technical scope document</text:span></text:p>
      <text:h text:style-name="P6" text:outline-level="4">Stage 3: Application Decomposition</text:h>
      <text:p text:style-name="P49">Break down the application into components.</text:p>
      <text:p text:style-name="P33"><text:span text:style-name="Strong_20_Emphasis"><text:span text:style-name="T3">Activities</text:span></text:span><text:span text:style-name="T4">:</text:span></text:p>
      <text:list text:style-name="L50">
        <text:list-item>
          <text:p text:style-name="P76">Create data flow diagrams (DFDs)</text:p>
        </text:list-item>
        <text:list-item>
          <text:p text:style-name="P76">Identify trust boundaries</text:p>
        </text:list-item>
        <text:list-item>
          <text:p text:style-name="P76">Document actors and roles</text:p>
        </text:list-item>
        <text:list-item>
          <text:p text:style-name="P76">Map data flows</text:p>
        </text:list-item>
      </text:list>
      <text:p text:style-name="P33"><text:span text:style-name="Strong_20_Emphasis"><text:span text:style-name="T3">Output</text:span></text:span><text:span text:style-name="T4">: Detailed architecture diagrams</text:span></text:p>
      <text:h text:style-name="P6" text:outline-level="4">Stage 4: Threat Analysis</text:h>
      <text:p text:style-name="P49">Analyze potential threats using intelligence sources.</text:p>
      <text:p text:style-name="P33"><text:span text:style-name="Strong_20_Emphasis"><text:span text:style-name="T3">Activities</text:span></text:span><text:span text:style-name="T4">:</text:span></text:p>
      <text:list text:style-name="L51">
        <text:list-item>
          <text:p text:style-name="P77">Review threat intelligence feeds</text:p>
        </text:list-item>
        <text:list-item>
          <text:p text:style-name="P77">Identify relevant threat actors</text:p>
        </text:list-item>
        <text:list-item>
          <text:p text:style-name="P77">Analyze attack patterns</text:p>
        </text:list-item>
        <text:list-item>
          <text:p text:style-name="P77">Consider industry-specific threats</text:p>
        </text:list-item>
      </text:list>
      <text:p text:style-name="P33"><text:soft-page-break/><text:span text:style-name="Strong_20_Emphasis"><text:span text:style-name="T3">Output</text:span></text:span><text:span text:style-name="T4">: Threat scenarios list</text:span></text:p>
      <text:h text:style-name="P6" text:outline-level="4">Stage 5: Vulnerability Analysis</text:h>
      <text:p text:style-name="P49">Identify existing and potential vulnerabilities.</text:p>
      <text:p text:style-name="P33"><text:span text:style-name="Strong_20_Emphasis"><text:span text:style-name="T3">Activities</text:span></text:span><text:span text:style-name="T4">:</text:span></text:p>
      <text:list text:style-name="L52">
        <text:list-item>
          <text:p text:style-name="P78">Review existing vulnerabilities (CVEs)</text:p>
        </text:list-item>
        <text:list-item>
          <text:p text:style-name="P78">Analyze code for weaknesses</text:p>
        </text:list-item>
        <text:list-item>
          <text:p text:style-name="P78">Review configurations</text:p>
        </text:list-item>
        <text:list-item>
          <text:p text:style-name="P78">Conduct security assessments</text:p>
        </text:list-item>
      </text:list>
      <text:p text:style-name="P33"><text:span text:style-name="Strong_20_Emphasis"><text:span text:style-name="T3">Output</text:span></text:span><text:span text:style-name="T4">: Vulnerability assessment report</text:span></text:p>
      <text:h text:style-name="P6" text:outline-level="4">Stage 6: Attack Modeling</text:h>
      <text:p text:style-name="P49">Model how attacks could be executed.</text:p>
      <text:p text:style-name="P33"><text:span text:style-name="Strong_20_Emphasis"><text:span text:style-name="T3">Activities</text:span></text:span><text:span text:style-name="T4">:</text:span></text:p>
      <text:list text:style-name="L53">
        <text:list-item>
          <text:p text:style-name="P79">Create attack trees</text:p>
        </text:list-item>
        <text:list-item>
          <text:p text:style-name="P79">Map attack vectors</text:p>
        </text:list-item>
        <text:list-item>
          <text:p text:style-name="P79">Simulate attack scenarios</text:p>
        </text:list-item>
        <text:list-item>
          <text:p text:style-name="P79">Identify exploitation paths</text:p>
        </text:list-item>
      </text:list>
      <text:p text:style-name="P33"><text:span text:style-name="Strong_20_Emphasis"><text:span text:style-name="T3">Output</text:span></text:span><text:span text:style-name="T4">: Attack simulation models</text:span></text:p>
      <text:h text:style-name="P6" text:outline-level="4">Stage 7: Risk Analysis and Impact</text:h>
      <text:p text:style-name="P49">Analyze risks and prioritize remediation.</text:p>
      <text:p text:style-name="P33"><text:span text:style-name="Strong_20_Emphasis"><text:span text:style-name="T3">Activities</text:span></text:span><text:span text:style-name="T4">:</text:span></text:p>
      <text:list text:style-name="L54">
        <text:list-item>
          <text:p text:style-name="P80">Calculate risk scores</text:p>
        </text:list-item>
        <text:list-item>
          <text:p text:style-name="P80">Prioritize threats</text:p>
        </text:list-item>
        <text:list-item>
          <text:p text:style-name="P80">Recommend countermeasures</text:p>
        </text:list-item>
        <text:list-item>
          <text:p text:style-name="P80">Create remediation roadmap</text:p>
        </text:list-item>
      </text:list>
      <text:p text:style-name="P33"><text:span text:style-name="Strong_20_Emphasis"><text:span text:style-name="T3">Output</text:span></text:span><text:span text:style-name="T4">: Risk management plan</text:span></text:p>
      <text:h text:style-name="P4" text:outline-level="3"><text:soft-page-break/>Operationally Critical Threat, Asset, and Vulnerability Evaluation (OCTAVE)</text:h>
      <text:p text:style-name="P49">The OCTAVE threat model is a risk-based strategic assessment and planning technique for security. It is designed to help organizations big and small to understand and manage</text:p>
      <text:p text:style-name="P49">their information security risks. Developed by Carnegie Mellon University’s Software Engineering Institute (SEI), OCTAVE is tailored for organizational risk management rather</text:p>
      <text:p text:style-name="P49">than focusing solely on technical vulnerabilities. OCTAVE involves three different phases:</text:p>
      <text:p text:style-name="P33"><text:span text:style-name="Strong_20_Emphasis"><text:span text:style-name="T3">Build asset-based threat profiles:</text:span></text:span></text:p>
      <text:p text:style-name="P49">Determine which assets are most important to the organization, such as databases, intellectual property, customer information, and critical infrastructure, and then establish</text:p>
      <text:p text:style-name="P49">security requirements based on the identified threats to ensure the protection of critical assets.</text:p>
      <text:p text:style-name="P33"><text:span text:style-name="Strong_20_Emphasis"><text:span text:style-name="T3">Identify infrastructure vulnerabilities:</text:span></text:span></text:p>
      <text:p text:style-name="P49">Review the organization’s technological infrastructure to identify vulnerabilities that could be exploited and then assess current security practices and policies to find gaps or</text:p>
      <text:p text:style-name="P49">weaknesses.</text:p>
      <text:p text:style-name="P33"><text:span text:style-name="Strong_20_Emphasis"><text:span text:style-name="T3">Develop security strategy and plans:</text:span></text:span></text:p>
      <text:p text:style-name="P49">Assess the risks to the organization by considering the impact and likelihood of identified threats and vulnerabilities. Formulate strategies to mitigate the identified risks, which</text:p>
      <text:p text:style-name="P49">may include policy changes, technological solutions, and organizational practices.</text:p>
      <text:p text:style-name="P49">Although OCTAVE is typically used for organizational risk assessment rather than direct penetration testing, its principles can be applied in a PenTest environment to help prioritize and structure the testing process.</text:p>
      <text:p text:style-name="P89"><draw:frame draw:style-name="fr1" draw:name="Image9" text:anchor-type="char" svg:width="4.4543in" svg:height="2.7035in" draw:z-index="9"><draw:image xlink:href="Pictures/100000010000024400000160D466F698.png" xlink:type="simple" xlink:show="embed" xlink:actuate="onLoad" draw:mime-type="image/png"/></draw:frame></text:p>
      <text:p text:style-name="P49"/>
      <text:p text:style-name="P49"/>
      <text:p text:style-name="P49"/>
      <text:p text:style-name="P49"/>
      <text:p text:style-name="P49"/>
      <text:p text:style-name="P49"/>
      <text:p text:style-name="P49"/>
      <text:p text:style-name="P49"><text:soft-page-break/>This flowchart represents the OCTAVE approach to information security risk evaluation, which is organized into three phases. The flowchart starts with a single box labeled</text:p>
      <text:p text:style-name="P89">‘<text:span text:style-name="T61">Preparation.’ Two arrows extend from ‘Preparation,’ leading to ‘Phase 1: Organizational View’ and ‘Phase 2: Technological View.’ Both Phase 1 and Phase 2 have arrows pointing to</text:span></text:p>
      <text:p text:style-name="P89">‘<text:span text:style-name="T61">Phase 3: Strategy and Plan Development,’ indicating that the outputs of the first two phases feed into the final phase.</text:span></text:p>
      <text:p text:style-name="P49">The purpose of the flowchart is to illustrate how the organizational, technological, and analytical aspects of information security risk evaluation are structured into a three-</text:p>
      <text:p text:style-name="P49">phased approach. The phases are as follows:</text:p>
      <text:p text:style-name="P33"><text:span text:style-name="Strong_20_Emphasis"><text:span text:style-name="T3">Phase 1: Organizational View</text:span></text:span><text:span text:style-name="T4"> – This phase focuses on organizational evaluation. The analysis team identifies critical information-related assets, determines current</text:span></text:p>
      <text:p text:style-name="P49">protective measures, and creates asset-based threat profiles. Bullet points include the following:</text:p>
      <text:p text:style-name="P14"><text:span text:style-name="Source_20_Text"><text:span text:style-name="T34"><text:s text:c="9"/></text:span></text:span><text:span text:style-name="Source_20_Text"><text:span text:style-name="T35">* Assets.</text:span></text:span></text:p>
      <text:p text:style-name="P15"/>
      <text:p text:style-name="P14"><text:span text:style-name="Source_20_Text"><text:span text:style-name="T34"><text:s text:c="9"/></text:span></text:span><text:span text:style-name="Source_20_Text"><text:span text:style-name="T35">* Threats.</text:span></text:span></text:p>
      <text:p text:style-name="P15"/>
      <text:p text:style-name="P14"><text:span text:style-name="Source_20_Text"><text:span text:style-name="T34"><text:s text:c="9"/></text:span></text:span><text:span text:style-name="Source_20_Text"><text:span text:style-name="T35">* Current Practices.</text:span></text:span></text:p>
      <text:p text:style-name="P15"/>
      <text:p text:style-name="P14"><text:span text:style-name="Source_20_Text"><text:span text:style-name="T34"><text:s text:c="9"/></text:span></text:span><text:span text:style-name="Source_20_Text"><text:span text:style-name="T35">* Organization Vulnerabilities.</text:span></text:span></text:p>
      <text:p text:style-name="P15"/>
      <text:p text:style-name="P14"><text:span text:style-name="Source_20_Text"><text:span text:style-name="T34"><text:s text:c="9"/></text:span></text:span><text:span text:style-name="Source_20_Text"><text:span text:style-name="T35">* Security Requirements.</text:span></text:span></text:p>
      <text:p text:style-name="P33"><text:span text:style-name="Strong_20_Emphasis"><text:span text:style-name="T3">Phase 2: Technological View</text:span></text:span><text:span text:style-name="T4"> – This phase evaluates the organization’s information infrastructure. The analysis team identifies infrastructure vulnerabilities. Bullet points</text:span></text:p>
      <text:p text:style-name="P49">include the following:</text:p>
      <text:p text:style-name="P14"><text:span text:style-name="Source_20_Text"><text:span text:style-name="T34"><text:s text:c="9"/></text:span></text:span><text:span text:style-name="Source_20_Text"><text:span text:style-name="T35">* Key Components.</text:span></text:span></text:p>
      <text:p text:style-name="P15"/>
      <text:p text:style-name="P14"><text:span text:style-name="Source_20_Text"><text:span text:style-name="T34"><text:s text:c="9"/></text:span></text:span><text:span text:style-name="Source_20_Text"><text:span text:style-name="T35">* Technical Vulnerabilities.</text:span></text:span></text:p>
      <text:p text:style-name="P33"><text:span text:style-name="Strong_20_Emphasis"><text:span text:style-name="T3">Phase 3: Strategy and Plan Development</text:span></text:span><text:span text:style-name="T4"> – In this phase, the analysis team develops protection strategies and mitigation plans. Bullet points include the following:</text:span></text:p>
      <text:p text:style-name="P14"><text:soft-page-break/><text:span text:style-name="Source_20_Text"><text:span text:style-name="T34"><text:s text:c="9"/></text:span></text:span><text:span text:style-name="Source_20_Text"><text:span text:style-name="T35">* Risks.</text:span></text:span></text:p>
      <text:p text:style-name="P15"/>
      <text:p text:style-name="P14"><text:span text:style-name="Source_20_Text"><text:span text:style-name="T34"><text:s text:c="9"/></text:span></text:span><text:span text:style-name="Source_20_Text"><text:span text:style-name="T35">* Protection Strategy.</text:span></text:span></text:p>
      <text:p text:style-name="P15"/>
      <text:p text:style-name="P14"><text:span text:style-name="Source_20_Text"><text:span text:style-name="T34"><text:s text:c="9"/></text:span></text:span><text:span text:style-name="Source_20_Text"><text:span text:style-name="T35">* Mitigation Plans.</text:span></text:span></text:p>
      <text:h text:style-name="P4" text:outline-level="3">Attack Trees</text:h>
      <text:p text:style-name="P49">Attack trees are a visual representation of attacks against a system, showing the goal at the top and various paths to achieve it below.</text:p>
      <text:p text:style-name="P89"><draw:frame draw:style-name="fr1" draw:name="Image10" text:anchor-type="char" svg:width="6.3807in" svg:height="1.6819in" draw:z-index="10"><draw:image xlink:href="Pictures/10000001000002BA000000B891BF1BC5.png" xlink:type="simple" xlink:show="embed" xlink:actuate="onLoad" draw:mime-type="image/png"/></draw:frame></text:p>
      <text:h text:style-name="P6" text:outline-level="4">Components of Attack Trees</text:h>
      <text:p text:style-name="P33"><text:span text:style-name="Strong_20_Emphasis"><text:span text:style-name="T3">Root Node</text:span></text:span><text:span text:style-name="T4">: The attacker’s ultimate goal</text:span></text:p>
      <text:p text:style-name="P33"><text:span text:style-name="Strong_20_Emphasis"><text:span text:style-name="T3">OR Nodes</text:span></text:span><text:span text:style-name="T4">: Different ways to achieve a goal (any one path succeeds)</text:span></text:p>
      <text:p text:style-name="P33"><text:span text:style-name="Strong_20_Emphasis"><text:span text:style-name="T3">AND Nodes</text:span></text:span><text:span text:style-name="T4">: Required steps that must all succeed</text:span></text:p>
      <text:p text:style-name="P33"><text:span text:style-name="Strong_20_Emphasis"><text:span text:style-name="T3">Leaf Nodes</text:span></text:span><text:span text:style-name="T4">: Specific attack actions</text:span></text:p>
      <text:h text:style-name="P6" text:outline-level="4">Attack Tree Example: E-commerce Data Breach</text:h>
      <text:p text:style-name="P89"><draw:frame draw:style-name="fr1" draw:name="Image11" text:anchor-type="char" svg:width="6.3807in" svg:height="2.2929in" draw:z-index="11"><draw:image xlink:href="Pictures/10000001000002BD000000FC6C1EA37E.png" xlink:type="simple" xlink:show="embed" xlink:actuate="onLoad" draw:mime-type="image/png"/></draw:frame></text:p>
      <text:h text:style-name="P6" text:outline-level="4"><text:soft-page-break/>Using Attack Trees</text:h>
      <text:p text:style-name="P33"><text:span text:style-name="Strong_20_Emphasis"><text:span text:style-name="T3">Benefits</text:span></text:span><text:span text:style-name="T4">:</text:span></text:p>
      <text:list text:style-name="L55">
        <text:list-item>
          <text:p text:style-name="P81">Visual representation of attack scenarios</text:p>
        </text:list-item>
        <text:list-item>
          <text:p text:style-name="P81">Helps identify multiple attack paths</text:p>
        </text:list-item>
        <text:list-item>
          <text:p text:style-name="P81">Facilitates risk analysis</text:p>
        </text:list-item>
        <text:list-item>
          <text:p text:style-name="P81">Supports security investment decisions</text:p>
        </text:list-item>
        <text:list-item>
          <text:p text:style-name="P81">Communicates threats to non-technical stakeholders</text:p>
        </text:list-item>
      </text:list>
      <text:p text:style-name="P33"><text:span text:style-name="Strong_20_Emphasis"><text:span text:style-name="T3">Steps to Create</text:span></text:span><text:span text:style-name="T4">:</text:span></text:p>
      <text:list text:style-name="L56">
        <text:list-item>
          <text:p text:style-name="P82">Identify the attacker’s goal (root)</text:p>
        </text:list-item>
        <text:list-item>
          <text:p text:style-name="P82">Brainstorm ways to achieve that goal</text:p>
        </text:list-item>
        <text:list-item>
          <text:p text:style-name="P82">Break down each approach into sub-goals</text:p>
        </text:list-item>
        <text:list-item>
          <text:p text:style-name="P82">Continue until reaching atomic actions</text:p>
        </text:list-item>
        <text:list-item>
          <text:p text:style-name="P82">Assign likelihood and cost to each path</text:p>
        </text:list-item>
        <text:list-item>
          <text:p text:style-name="P82">Prioritize defenses based on analysis</text:p>
        </text:list-item>
      </text:list>
      <text:h text:style-name="P4" text:outline-level="3">Methodology Comparison</text:h>
      <text:p text:style-name="P49">Choosing the right methodology depends on your project context, timeline, and goals.<text:span text:style-name="T63"/></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2">Methodology</text:p>
          </table:table-cell>
          <table:table-cell table:style-name="Table5.A1" office:value-type="string">
            <text:p text:style-name="P32">Best For</text:p>
          </table:table-cell>
          <table:table-cell table:style-name="Table5.A1" office:value-type="string">
            <text:p text:style-name="P32">Complexity</text:p>
          </table:table-cell>
          <table:table-cell table:style-name="Table5.A1" office:value-type="string">
            <text:p text:style-name="P32">Time Required</text:p>
          </table:table-cell>
          <table:table-cell table:style-name="Table5.A1" office:value-type="string">
            <text:p text:style-name="P32">Output</text:p>
          </table:table-cell>
        </table:table-row>
        <table:table-row>
          <table:table-cell table:style-name="Table5.A1" office:value-type="string">
            <text:p text:style-name="P27"><text:span text:style-name="Strong_20_Emphasis"><text:span text:style-name="T64">STRIDE</text:span></text:span></text:p>
          </table:table-cell>
          <table:table-cell table:style-name="Table5.A1" office:value-type="string">
            <text:p text:style-name="P28">General purpose, design phase</text:p>
          </table:table-cell>
          <table:table-cell table:style-name="Table5.A1" office:value-type="string">
            <text:p text:style-name="P28">Low-Medium</text:p>
          </table:table-cell>
          <table:table-cell table:style-name="Table5.A1" office:value-type="string">
            <text:p text:style-name="P28">2-4 hours</text:p>
          </table:table-cell>
          <table:table-cell table:style-name="Table5.A1" office:value-type="string">
            <text:p text:style-name="P28">Threat categories</text:p>
          </table:table-cell>
        </table:table-row>
        <table:table-row>
          <table:table-cell table:style-name="Table5.A1" office:value-type="string">
            <text:p text:style-name="P27"><text:span text:style-name="Strong_20_Emphasis"><text:span text:style-name="T64">DREAD</text:span></text:span></text:p>
          </table:table-cell>
          <table:table-cell table:style-name="Table5.A1" office:value-type="string">
            <text:p text:style-name="P28">Risk prioritization</text:p>
          </table:table-cell>
          <table:table-cell table:style-name="Table5.A1" office:value-type="string">
            <text:p text:style-name="P28">Low</text:p>
          </table:table-cell>
          <table:table-cell table:style-name="Table5.A1" office:value-type="string">
            <text:p text:style-name="P28">1-2 hours</text:p>
          </table:table-cell>
          <table:table-cell table:style-name="Table5.A1" office:value-type="string">
            <text:p text:style-name="P28">Quantitative scores</text:p>
          </table:table-cell>
        </table:table-row>
        <table:table-row>
          <table:table-cell table:style-name="Table5.A1" office:value-type="string">
            <text:p text:style-name="P27"><text:span text:style-name="Strong_20_Emphasis"><text:span text:style-name="T64">PASTA</text:span></text:span></text:p>
          </table:table-cell>
          <table:table-cell table:style-name="Table5.A1" office:value-type="string">
            <text:p text:style-name="P28">Comprehensive analysis</text:p>
          </table:table-cell>
          <table:table-cell table:style-name="Table5.A1" office:value-type="string">
            <text:p text:style-name="P28">High</text:p>
          </table:table-cell>
          <table:table-cell table:style-name="Table5.A1" office:value-type="string">
            <text:p text:style-name="P28">2-3 days</text:p>
          </table:table-cell>
          <table:table-cell table:style-name="Table5.A1" office:value-type="string">
            <text:p text:style-name="P28">Complete risk assessment</text:p>
          </table:table-cell>
        </table:table-row>
        <table:table-row>
          <table:table-cell table:style-name="Table5.A1" office:value-type="string">
            <text:p text:style-name="P27"><text:span text:style-name="Strong_20_Emphasis"><text:span text:style-name="T64">OCTAVE</text:span></text:span></text:p>
          </table:table-cell>
          <table:table-cell table:style-name="Table5.A1" office:value-type="string">
            <text:p text:style-name="P28">Organizational level risk assessments and governance</text:p>
          </table:table-cell>
          <table:table-cell table:style-name="Table5.A1" office:value-type="string">
            <text:p text:style-name="P28">Medium–High</text:p>
          </table:table-cell>
          <table:table-cell table:style-name="Table5.A1" office:value-type="string">
            <text:p text:style-name="P28">1–2 days</text:p>
          </table:table-cell>
          <table:table-cell table:style-name="Table5.A1" office:value-type="string">
            <text:p text:style-name="P28">Business-focused risk profile</text:p>
          </table:table-cell>
        </table:table-row>
        <table:table-row>
          <table:table-cell table:style-name="Table5.A1" office:value-type="string">
            <text:p text:style-name="P27"><text:span text:style-name="Strong_20_Emphasis"><text:span text:style-name="T64">Attack Trees</text:span></text:span></text:p>
          </table:table-cell>
          <table:table-cell table:style-name="Table5.A1" office:value-type="string">
            <text:p text:style-name="P28">Visual communication, specific scenarios</text:p>
          </table:table-cell>
          <table:table-cell table:style-name="Table5.A1" office:value-type="string">
            <text:p text:style-name="P28">Medium</text:p>
          </table:table-cell>
          <table:table-cell table:style-name="Table5.A1" office:value-type="string">
            <text:p text:style-name="P28">3-6 hours</text:p>
          </table:table-cell>
          <table:table-cell table:style-name="Table5.A1" office:value-type="string">
            <text:p text:style-name="P29">Attack path diagrams</text:p>
          </table:table-cell>
        </table:table-row>
      </table:table>
      <text:h text:style-name="P7" text:outline-level="4">When to Use Each Methodology</text:h>
      <text:p text:style-name="P33"><text:span text:style-name="Strong_20_Emphasis"><text:span text:style-name="T3">Use STRIDE when</text:span></text:span><text:span text:style-name="T4">:</text:span></text:p>
      <text:list text:style-name="L57">
        <text:list-item>
          <text:p text:style-name="P83">Starting a new project</text:p>
        </text:list-item>
        <text:list-item>
          <text:p text:style-name="P83"><text:soft-page-break/>You need a systematic approach</text:p>
        </text:list-item>
        <text:list-item>
          <text:p text:style-name="P83">Working with developers</text:p>
        </text:list-item>
        <text:list-item>
          <text:p text:style-name="P83">Time is limited but coverage is important</text:p>
        </text:list-item>
        <text:list-item>
          <text:p text:style-name="P83">You want industry-standard methodology</text:p>
        </text:list-item>
      </text:list>
      <text:p text:style-name="P33"><text:span text:style-name="Strong_20_Emphasis"><text:span text:style-name="T3">Use DREAD when</text:span></text:span><text:span text:style-name="T4">:</text:span></text:p>
      <text:list text:style-name="L58">
        <text:list-item>
          <text:p text:style-name="P84">You have multiple threats to prioritize</text:p>
        </text:list-item>
        <text:list-item>
          <text:p text:style-name="P84">You need to justify security investments</text:p>
        </text:list-item>
        <text:list-item>
          <text:p text:style-name="P84">Communicating with management</text:p>
        </text:list-item>
        <text:list-item>
          <text:p text:style-name="P84">You want quantifiable risk scores</text:p>
        </text:list-item>
        <text:list-item>
          <text:p text:style-name="P84">Resources are limited</text:p>
        </text:list-item>
      </text:list>
      <text:p text:style-name="P33"><text:span text:style-name="Strong_20_Emphasis"><text:span text:style-name="T3">Use PASTA when</text:span></text:span><text:span text:style-name="T4">:</text:span></text:p>
      <text:list text:style-name="L59">
        <text:list-item>
          <text:p text:style-name="P85">Building critical systems</text:p>
        </text:list-item>
        <text:list-item>
          <text:p text:style-name="P85">Compliance requires comprehensive analysis</text:p>
        </text:list-item>
        <text:list-item>
          <text:p text:style-name="P85">You have time and resources</text:p>
        </text:list-item>
        <text:list-item>
          <text:p text:style-name="P85">Executive stakeholders need detailed reports</text:p>
        </text:list-item>
        <text:list-item>
          <text:p text:style-name="P85">Risk-centric approach is needed</text:p>
        </text:list-item>
      </text:list>
      <text:p text:style-name="P33"><text:span text:style-name="Strong_20_Emphasis"><text:span text:style-name="T3">Use Attack Trees when</text:span></text:span><text:span text:style-name="T4">:</text:span></text:p>
      <text:list text:style-name="L60">
        <text:list-item>
          <text:p text:style-name="P86">Analyzing specific attack scenarios</text:p>
        </text:list-item>
        <text:list-item>
          <text:p text:style-name="P86">Communicating with non-technical stakeholders</text:p>
        </text:list-item>
        <text:list-item>
          <text:p text:style-name="P86">Identifying optimal defense strategies</text:p>
        </text:list-item>
        <text:list-item>
          <text:p text:style-name="P86">Evaluating security investments</text:p>
        </text:list-item>
        <text:list-item>
          <text:p text:style-name="P86">Teaching security concepts</text:p>
        </text:list-item>
      </text:list>
      <text:p text:style-name="P33"><text:span text:style-name="Strong_20_Emphasis"><text:span text:style-name="T3">Use OCTAVE especially OCTAVE Allegro when</text:span></text:span><text:span text:style-name="T4">:</text:span></text:p>
      <text:list text:style-name="L61">
        <text:list-item>
          <text:p text:style-name="P87">Aligning security priorities with business leaders and executives</text:p>
        </text:list-item>
        <text:list-item>
          <text:p text:style-name="P87">Performing enterprise-wide, department-level, or information-centric risk assessments</text:p>
        </text:list-item>
        <text:list-item>
          <text:p text:style-name="P87">Letting business or non-security teams own and drive the risk process</text:p>
        </text:list-item>
        <text:list-item>
          <text:p text:style-name="P87">Meeting compliance requirements for formal risk assessment (ISO 27001, NIST CSF, SOC 2, HIPAA, PCI DSS, etc.)</text:p>
        </text:list-item>
        <text:list-item>
          <text:p text:style-name="P87">Operating with small or overstretched security teams</text:p>
        </text:list-item>
      </text:list>
      <text:h text:style-name="P6" text:outline-level="4"><text:soft-page-break/>Combined Approach</text:h>
      <text:p text:style-name="P49">Many organizations combine methodologies:</text:p>
      <text:list text:style-name="L62">
        <text:list-item>
          <text:p text:style-name="P47"><text:span text:style-name="Strong_20_Emphasis"><text:span text:style-name="T3">STRIDE</text:span></text:span><text:span text:style-name="T4"> to identify threats systematically</text:span></text:p>
        </text:list-item>
        <text:list-item>
          <text:p text:style-name="P47"><text:span text:style-name="Strong_20_Emphasis"><text:span text:style-name="T3">Attack Trees</text:span></text:span><text:span text:style-name="T4"> to visualize critical attack paths</text:span></text:p>
        </text:list-item>
        <text:list-item>
          <text:p text:style-name="P47"><text:span text:style-name="Strong_20_Emphasis"><text:span text:style-name="T3">DREAD</text:span></text:span><text:span text:style-name="T4"> to prioritize remediation efforts</text:span></text:p>
        </text:list-item>
        <text:list-item>
          <text:p text:style-name="P47"><text:span text:style-name="Strong_20_Emphasis"><text:span text:style-name="T3">PASTA</text:span></text:span><text:span text:style-name="T4"> for periodic comprehensive reviews</text:span></text:p>
        </text:list-item>
        <text:list-item>
          <text:p text:style-name="P47"><text:span text:style-name="Strong_20_Emphasis"><text:span text:style-name="T3">OCTAVE Allegro</text:span></text:span><text:span text:style-name="T4"> for enterprise-wide, business-owned risk assessments and compliance</text:span></text:p>
        </text:list-item>
      </text:list>
      <text:p text:style-name="P33"><text:span text:style-name="Strong_20_Emphasis"><text:span text:style-name="T3">Best Practice</text:span></text:span><text:span text:style-name="T4">:</text:span></text:p>
      <text:p text:style-name="P49">Start with STRIDE for breadth, use Attack Trees for depth on critical assets, and DREAD for prioritization.</text:p>
      <text:h text:style-name="P2" text:outline-level="2">The Threat Modeling Process</text:h>
      <text:p text:style-name="P49">The threat modeling process is a structured six-step methodology for identifying, evaluating, and mitigating security risks across the lifecycle of a system or application. Each step builds understanding of what you are protecting, how attackers could interact with it, and which controls most effectively reduce risk.</text:p>
      <text:p text:style-name="P89"><draw:frame draw:style-name="fr1" draw:name="Image12" text:anchor-type="char" svg:width="6.3807in" svg:height="1.1516in" draw:z-index="12"><draw:image xlink:href="Pictures/10000001000002BA0000007EC9874904.png" xlink:type="simple" xlink:show="embed" xlink:actuate="onLoad" draw:mime-type="image/png"/></draw:frame></text:p>
      <text:p text:style-name="P33"><text:span text:style-name="Strong_20_Emphasis"><text:span text:style-name="T3">Step 1 – Define System Architecture and Scope</text:span></text:span></text:p>
      <text:p text:style-name="P49">The process begins by establishing what needs to be protected through a clear definition of the system architecture and scope. This involves documenting assumptions, constraints, and business requirements, as well as producing architecture diagrams such as Data Flow Diagrams (DFDs) that illustrate system components, data flows, and trust boundaries. Explicitly stating what is in scope and out of scope ensures that the analysis focuses on the correct elements.</text:p>
      <text:p text:style-name="P33"><text:span text:style-name="Strong_20_Emphasis"><text:span text:style-name="T3">Step 2 – Identify Assets and Entry Points</text:span></text:span></text:p>
      <text:p text:style-name="P49">The next step is to identify and classify all valuable assets based on their confidentiality, integrity, and availability needs. These include sensitive data, authentication mechanisms, <text:soft-page-break/>APIs, infrastructure components, and administrative interfaces. In parallel, all entry points such as login pages, APIs, file upload endpoints, and admin panels are cataloged to determine where attackers could interact with the system.</text:p>
      <text:p text:style-name="P33"><text:span text:style-name="Strong_20_Emphasis"><text:span text:style-name="T3">Step 3 – Identify Threats</text:span></text:span></text:p>
      <text:p text:style-name="P49">With assets and entry points understood, threats are identified using structured methodologies such as STRIDE. Each data flow, component, and data store is examined for potential risks including spoofing, tampering, repudiation, information disclosure, denial of service, and elevation of privilege. Threat scenarios and attacker personas help ensure a complete and realistic understanding of how the system could be attacked.</text:p>
      <text:p text:style-name="P33"><text:span text:style-name="Strong_20_Emphasis"><text:span text:style-name="T3">Step 4 – Document Vulnerabilities</text:span></text:span></text:p>
      <text:p text:style-name="P49">This step focuses on identifying weaknesses that may enable the identified threats. Vulnerabilities are discovered through code reviews, configuration audits, dependency analysis, and automated scanning tools. Each vulnerability is documented and mapped to its corresponding threats, assets, and affected system areas to maintain traceability and clarity.</text:p>
      <text:p text:style-name="P33"><text:span text:style-name="Strong_20_Emphasis"><text:span text:style-name="T3">Step 5 – Rate and Prioritize Risks</text:span></text:span></text:p>
      <text:p text:style-name="P49">All threats and vulnerabilities are then evaluated and prioritized using risk-scoring methods such as DREAD or CVSS. This analysis considers both impact and likelihood, resulting in a ranked list of risks that guides remediation efforts. The final output includes a remediation backlog, risk matrix, and an executive summary highlighting the most critical risks.</text:p>
      <text:p text:style-name="P33"><text:span text:style-name="Strong_20_Emphasis"><text:span text:style-name="T3">Step 6 – Develop and Implement Mitigation Strategies</text:span></text:span></text:p>
      <text:p text:style-name="P49">The final step is to define and apply mitigation strategies to reduce or eliminate the prioritized risks. These strategies may include preventive controls (e.g., input validation, authentication hardening), detective controls (logging and monitoring), corrective actions (patching, rate limiting), and compensating controls when ideal solutions are not feasible. Each mitigation is verified through testing to ensure it effectively addresses the associated risks.</text:p>
      <text:h text:style-name="P4" text:outline-level="3">Iterative Process</text:h>
      <text:p text:style-name="P49">Threat modeling is not a one-time activity:</text:p>
      <text:p text:style-name="P33"><text:span text:style-name="Strong_20_Emphasis"><text:span text:style-name="T3">When to Update Threat Models</text:span></text:span><text:span text:style-name="T4">:</text:span></text:p>
      <text:list text:style-name="L63">
        <text:list-item>
          <text:p text:style-name="P88">New features or functionality</text:p>
        </text:list-item>
        <text:list-item>
          <text:p text:style-name="P88">Architecture changes</text:p>
        </text:list-item>
        <text:list-item>
          <text:p text:style-name="P88">New threat intelligence</text:p>
        </text:list-item>
        <text:list-item>
          <text:p text:style-name="P88">After security incidents</text:p>
        </text:list-item>
        <text:list-item>
          <text:p text:style-name="P88">Compliance requirements change</text:p>
        </text:list-item>
        <text:list-item>
          <text:p text:style-name="P88"><text:soft-page-break/>Annually at minimum</text:p>
        </text:list-item>
      </text:list>
      <text:p text:style-name="P16"><text:span text:style-name="Strong_20_Emphasis"><text:span text:style-name="T5">Key Takeaway</text:span></text:span><text:span text:style-name="T6">: Threat modeling is a living process that should evolve with your system and the threat landscape.</text:span></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apple-system" svg:font-family="apple-system, BlinkMacSystemFont, 'Segoe UI', Roboto, sans-serif"/>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2T08:46:42.982178572</meta:creation-date>
    <meta:print-date>2026-06-19T19:19:12.453498714</meta:print-date>
    <dc:date>2026-06-20T08:55:12.739079277</dc:date>
    <meta:editing-duration>PT1M25S</meta:editing-duration>
    <meta:editing-cycles>1</meta:editing-cycles>
    <meta:document-statistic meta:table-count="5" meta:image-count="13" meta:object-count="0" meta:page-count="28" meta:paragraph-count="642" meta:word-count="3660" meta:character-count="25214" meta:non-whitespace-character-count="22347"/>
    <meta:generator>LibreOffice/24.2.7.2$Linux_X86_64 LibreOffice_project/420$Build-2</meta:generator>
  </office:meta>
</office:document-meta>
</file>